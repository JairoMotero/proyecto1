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Negrita" style:font-family-generic="swiss" style:font-pitch="variable"/>
    <style:font-face style:name="Calibri1" svg:font-family="Calibri" style:font-adornments="Negrita itálica" style:font-family-generic="swiss" style:font-pitch="variable"/>
    <style:font-face style:name="Calibri2" svg:font-family="Calibri" style:font-adornments="Normal" style:font-family-generic="swiss" style:font-pitch="variable"/>
    <style:font-face style:name="Calibri3" svg:font-family="Calibri,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pitch="variable"/>
    <style:font-face style:name="Montserrat Black" svg:font-family="'Montserrat Black'" style:font-adornments="Regular" style:font-pitch="variable"/>
    <style:font-face style:name="Montserrat Medium" svg:font-family="'Montserrat Mediu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Resumen-Proyecto" style:family="table">
      <style:table-properties style:width="17cm" table:align="margins" style:may-break-between-rows="true" table:border-model="collapsing"/>
    </style:style>
    <style:style style:name="Resumen-Proyecto.A" style:family="table-column">
      <style:table-column-properties style:column-width="8.491cm" style:rel-column-width="32733*"/>
    </style:style>
    <style:style style:name="Resumen-Proyecto.B" style:family="table-column">
      <style:table-column-properties style:column-width="8.509cm" style:rel-column-width="32802*"/>
    </style:style>
    <style:style style:name="Resumen-Proyecto.A1" style:family="table-cell">
      <style:table-cell-properties fo:background-color="transparent" fo:padding="0.097cm" fo:border="0.5pt solid #000000" style:writing-mode="page">
        <style:background-image/>
      </style:table-cell-properties>
    </style:style>
    <style:style style:name="Resumen-Proyecto.2" style:family="table-row">
      <style:table-row-properties fo:keep-together="auto"/>
    </style:style>
    <style:style style:name="Resumen-Proyecto.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Resumen-Proyecto.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1" style:family="table-row">
      <style:table-row-properties style:min-row-height="0.591cm"/>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7.929cm" table:align="left"/>
    </style:style>
    <style:style style:name="Tabla2.A" style:family="table-column">
      <style:table-column-properties style:column-width="4.771cm"/>
    </style:style>
    <style:style style:name="Tabla2.B" style:family="table-column">
      <style:table-column-properties style:column-width="3.157cm"/>
    </style:style>
    <style:style style:name="Tabla2.A1" style:family="table-cell">
      <style:table-cell-properties style:vertical-align="middle" fo:padding="0.049cm" fo:border="none"/>
    </style:style>
    <style:style style:name="P1" style:family="paragraph" style:parent-style-name="Standard" style:master-page-name="First_20_Page">
      <style:paragraph-properties fo:text-align="center" style:justify-single-word="false" style:page-number="auto"/>
      <style:text-properties officeooo:rsid="00198c07" officeooo:paragraph-rsid="00357f49"/>
    </style:style>
    <style:style style:name="P2" style:family="paragraph" style:parent-style-name="Standard">
      <style:paragraph-properties fo:text-align="center" style:justify-single-word="false"/>
      <style:text-properties officeooo:rsid="00198c07" officeooo:paragraph-rsid="00357f49"/>
    </style:style>
    <style:style style:name="P3" style:family="paragraph" style:parent-style-name="Standard">
      <style:paragraph-properties fo:margin-top="0.101cm" fo:margin-bottom="0.101cm" style:contextual-spacing="false" fo:text-align="center" style:justify-single-word="false"/>
      <style:text-properties style:font-name="Montserrat" fo:font-size="13pt" fo:font-weight="bold" officeooo:rsid="00198c07" officeooo:paragraph-rsid="00357f49" style:font-size-asian="13pt" style:font-weight-asian="bold" style:font-size-complex="13pt" style:font-weight-complex="bold"/>
    </style:style>
    <style:style style:name="P4" style:family="paragraph" style:parent-style-name="Standard">
      <style:paragraph-properties fo:margin-top="0.101cm" fo:margin-bottom="0.101cm" style:contextual-spacing="false" fo:text-align="center" style:justify-single-word="false"/>
      <style:text-properties style:font-name="Montserrat" fo:font-size="16pt" fo:font-weight="bold" officeooo:rsid="00198c07" officeooo:paragraph-rsid="00357f49" style:font-size-asian="16pt" style:font-weight-asian="bold" style:font-size-complex="16pt" style:font-weight-complex="bold"/>
    </style:style>
    <style:style style:name="P5" style:family="paragraph" style:parent-style-name="Standard">
      <style:paragraph-properties fo:margin-top="0.101cm" fo:margin-bottom="0.101cm" style:contextual-spacing="false" fo:text-align="center" style:justify-single-word="false"/>
      <style:text-properties style:font-name="Montserrat" fo:font-size="14pt" fo:font-weight="bold" officeooo:rsid="00198c07" officeooo:paragraph-rsid="00357f49" style:font-size-asian="14pt" style:font-weight-asian="bold" style:font-size-complex="14pt" style:font-weight-complex="bold"/>
    </style:style>
    <style:style style:name="P6" style:family="paragraph" style:parent-style-name="Standard">
      <style:paragraph-properties fo:line-height="115%" fo:text-align="center" style:justify-single-word="false"/>
      <style:text-properties style:font-name="Montserrat" fo:font-size="24pt" style:text-underline-style="solid" style:text-underline-width="auto" style:text-underline-color="font-color" fo:font-weight="bold" officeooo:rsid="00357f49" officeooo:paragraph-rsid="00357f49" style:font-size-asian="24pt" style:font-weight-asian="bold" style:font-size-complex="24pt" style:font-weight-complex="bold"/>
    </style:style>
    <style:style style:name="P7" style:family="paragraph" style:parent-style-name="Standard">
      <style:paragraph-properties fo:margin-left="0cm" fo:line-height="115%" fo:text-align="center" style:justify-single-word="false" fo:text-indent="0cm" style:auto-text-indent="false"/>
      <style:text-properties style:font-name="Montserrat" fo:font-size="18pt" fo:font-weight="bold" officeooo:rsid="00357f49" officeooo:paragraph-rsid="00357f49" style:font-size-asian="18pt" style:font-weight-asian="bold" style:font-size-complex="18pt" style:font-weight-complex="bold"/>
    </style:style>
    <style:style style:name="P8" style:family="paragraph" style:parent-style-name="Standard">
      <style:paragraph-properties fo:text-align="end" style:justify-single-word="false"/>
      <style:text-properties fo:font-weight="bold" officeooo:rsid="00198c07" officeooo:paragraph-rsid="00357f49" style:font-weight-asian="bold" style:font-weight-complex="bold"/>
    </style:style>
    <style:style style:name="P9" style:family="paragraph" style:parent-style-name="Standard">
      <style:paragraph-properties fo:margin-top="0.101cm" fo:margin-bottom="0.101cm" style:contextual-spacing="false" fo:text-align="end" style:justify-single-word="false"/>
      <style:text-properties fo:font-weight="bold" officeooo:rsid="00198c07" officeooo:paragraph-rsid="00357f49" style:font-weight-asian="bold" style:font-weight-complex="bold"/>
    </style:style>
    <style:style style:name="P10" style:family="paragraph" style:parent-style-name="Standard">
      <style:paragraph-properties fo:margin-top="0.101cm" fo:margin-bottom="0.101cm" style:contextual-spacing="false" fo:text-align="end" style:justify-single-word="false"/>
      <style:text-properties style:font-name="Montserrat" fo:font-weight="bold" officeooo:rsid="00198c07" officeooo:paragraph-rsid="00357f49" style:font-weight-asian="bold" style:font-weight-complex="bold"/>
    </style:style>
    <style:style style:name="P11" style:family="paragraph" style:parent-style-name="Text_20_body">
      <style:paragraph-properties fo:break-before="page"/>
      <style:text-properties fo:font-weight="bold" officeooo:rsid="001d298b" officeooo:paragraph-rsid="00357f49" style:font-weight-asian="bold" style:font-weight-complex="bold"/>
    </style:style>
    <style:style style:name="P12" style:family="paragraph" style:parent-style-name="Table_20_Contents">
      <style:text-properties style:font-name="Montserrat" fo:font-size="12pt" officeooo:paragraph-rsid="00357f49" style:font-size-asian="12pt" style:font-size-complex="12pt"/>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Montserrat" fo:font-size="12pt" fo:font-style="normal" fo:text-shadow="none" style:text-underline-style="none" fo:font-weight="bold" officeooo:rsid="001d298b" officeooo:paragraph-rsid="00357f49"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Montserrat" fo:font-size="12pt" fo:font-style="normal" fo:text-shadow="none" style:text-underline-style="none" fo:font-weight="normal" officeooo:rsid="001d298b" officeooo:paragraph-rsid="00357f4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text-properties fo:font-size="12pt" officeooo:paragraph-rsid="00357f49" style:font-size-asian="12pt" style:font-size-complex="12pt"/>
    </style:style>
    <style:style style:name="P16" style:family="paragraph" style:parent-style-name="Table_20_Contents">
      <style:paragraph-properties fo:margin-top="0.199cm" fo:margin-bottom="0cm" style:contextual-spacing="false" fo:line-height="115%" fo:text-align="start" style:justify-single-word="false"/>
      <style:text-properties style:use-window-font-color="true" loext:opacity="0%" style:text-outline="false" style:text-line-through-style="none" style:text-line-through-type="none" style:font-name="Montserrat Black" fo:font-size="12pt" fo:font-style="normal" fo:text-shadow="none" style:text-underline-style="none" fo:font-weight="bold" officeooo:rsid="001f075e" officeooo:paragraph-rsid="00357f49"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text-align="justify" style:justify-single-word="false"/>
      <style:text-properties style:font-name="Montserrat Medium" fo:font-size="12pt" fo:font-weight="normal" officeooo:paragraph-rsid="00357f49" style:font-size-asian="12pt" style:font-weight-asian="normal" style:font-size-complex="12pt" style:font-weight-complex="normal"/>
    </style:style>
    <style:style style:name="P18" style:family="paragraph" style:parent-style-name="Text_20_body">
      <style:paragraph-properties fo:margin-top="0.049cm" fo:margin-bottom="0.101cm" style:contextual-spacing="false"/>
      <style:text-properties style:font-name="Montserrat Black" fo:font-size="12pt" fo:language="en" fo:country="US" fo:font-weight="bold" officeooo:paragraph-rsid="00357f49" style:font-size-asian="12pt" style:font-weight-asian="bold" style:font-size-complex="12pt" style:font-weight-complex="bold"/>
    </style:style>
    <style:style style:name="P19" style:family="paragraph" style:parent-style-name="Text_20_body">
      <style:paragraph-properties fo:text-align="justify" style:justify-single-word="false" fo:orphans="0" fo:widows="0"/>
      <style:text-properties style:font-name="Montserrat Medium" fo:font-size="12pt" fo:language="en" fo:country="US" fo:font-weight="normal" officeooo:rsid="001e9531" officeooo:paragraph-rsid="0037d4b9" style:font-size-asian="12pt" style:font-weight-asian="normal" style:font-size-complex="12pt" style:font-weight-complex="normal"/>
    </style:style>
    <style:style style:name="P20" style:family="paragraph" style:parent-style-name="Text_20_body">
      <style:text-properties style:font-name="Montserrat Medium" fo:font-size="12pt" fo:font-weight="normal" officeooo:paragraph-rsid="00357f49" style:font-size-asian="12pt" style:font-weight-asian="normal" style:font-size-complex="12pt" style:font-weight-complex="normal"/>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Heading_20_1">
      <style:paragraph-properties fo:margin-top="0cm" fo:margin-bottom="0.25cm" style:contextual-spacing="false" fo:break-before="page"/>
    </style:style>
    <style:style style:name="P26" style:family="paragraph" style:parent-style-name="Heading_20_2">
      <style:paragraph-properties fo:margin-top="0cm" fo:margin-bottom="0.25cm" style:contextual-spacing="false" fo:text-align="start" style:justify-single-word="false"/>
    </style:style>
    <style:style style:name="P27" style:family="paragraph" style:parent-style-name="Text_20_body">
      <style:paragraph-properties fo:margin-top="0cm" fo:margin-bottom="0.25cm" style:contextual-spacing="false" fo:text-align="start" style:justify-single-word="false"/>
      <style:text-properties officeooo:paragraph-rsid="003c0534"/>
    </style:style>
    <style:style style:name="P28" style:family="paragraph" style:parent-style-name="Heading_20_2">
      <style:paragraph-properties fo:margin-top="0cm" fo:margin-bottom="0.25cm" style:contextual-spacing="false" fo:text-align="start" style:justify-single-word="false"/>
      <style:text-properties officeooo:paragraph-rsid="001ae5e3"/>
    </style:style>
    <style:style style:name="P29" style:family="paragraph" style:parent-style-name="Text_20_body">
      <style:paragraph-properties fo:margin-top="0cm" fo:margin-bottom="0.25cm" style:contextual-spacing="false" fo:text-align="start" style:justify-single-word="false"/>
      <style:text-properties fo:language="es" fo:country="ES" officeooo:paragraph-rsid="003c0534"/>
    </style:style>
    <style:style style:name="P30" style:family="paragraph" style:parent-style-name="Heading_20_2">
      <style:paragraph-properties fo:margin-top="0cm" fo:margin-bottom="0.25cm" style:contextual-spacing="false" fo:text-align="start" style:justify-single-word="false" fo:break-before="page"/>
      <style:text-properties officeooo:paragraph-rsid="001ae5e3"/>
    </style:style>
    <style:style style:name="P31" style:family="paragraph" style:parent-style-name="Heading_20_2">
      <style:paragraph-properties fo:margin-top="0cm" fo:margin-bottom="0.25cm" style:contextual-spacing="false"/>
    </style:style>
    <style:style style:name="P32" style:family="paragraph" style:parent-style-name="Text_20_body">
      <style:paragraph-properties fo:margin-top="0cm" fo:margin-bottom="0.25cm" style:contextual-spacing="false"/>
      <style:text-properties officeooo:paragraph-rsid="003c0534"/>
    </style:style>
    <style:style style:name="P33" style:family="paragraph" style:parent-style-name="Heading_20_2">
      <style:paragraph-properties fo:margin-top="0cm" fo:margin-bottom="0.25cm" style:contextual-spacing="false" fo:break-before="page"/>
    </style:style>
    <style:style style:name="P34" style:family="paragraph" style:parent-style-name="Heading_20_1">
      <style:paragraph-properties fo:margin-top="0cm" fo:margin-bottom="0.25cm" style:contextual-spacing="false" fo:break-before="page"/>
      <style:text-properties officeooo:paragraph-rsid="00207385"/>
    </style:style>
    <style:style style:name="P35" style:family="paragraph" style:parent-style-name="Heading_20_2">
      <style:paragraph-properties fo:margin-top="0cm" fo:margin-bottom="0.25cm" style:contextual-spacing="false"/>
      <style:text-properties officeooo:paragraph-rsid="00207385"/>
    </style:style>
    <style:style style:name="P36" style:family="paragraph" style:parent-style-name="Heading_20_3">
      <style:paragraph-properties fo:margin-top="0cm" fo:margin-bottom="0.25cm" style:contextual-spacing="false"/>
    </style:style>
    <style:style style:name="P37" style:family="paragraph" style:parent-style-name="Text_20_body">
      <style:paragraph-properties fo:margin-top="0cm" fo:margin-bottom="0.25cm" style:contextual-spacing="false"/>
      <style:text-properties officeooo:rsid="00207385" officeooo:paragraph-rsid="003c0534"/>
    </style:style>
    <style:style style:name="P38" style:family="paragraph" style:parent-style-name="Heading_20_3">
      <style:paragraph-properties fo:margin-top="0cm" fo:margin-bottom="0.25cm" style:contextual-spacing="false" fo:break-before="page"/>
      <style:text-properties officeooo:paragraph-rsid="003c0534"/>
    </style:style>
    <style:style style:name="P39" style:family="paragraph" style:parent-style-name="Text_20_body">
      <style:paragraph-properties fo:margin-top="0cm" fo:margin-bottom="0.25cm" style:contextual-spacing="false"/>
      <style:text-properties officeooo:rsid="00228c3a" officeooo:paragraph-rsid="003c0534"/>
    </style:style>
    <style:style style:name="P40" style:family="paragraph" style:parent-style-name="Text_20_body">
      <style:paragraph-properties fo:margin-top="0cm" fo:margin-bottom="0.25cm" style:contextual-spacing="false"/>
      <style:text-properties officeooo:rsid="00242426" officeooo:paragraph-rsid="003c0534"/>
    </style:style>
    <style:style style:name="P41" style:family="paragraph" style:parent-style-name="Heading_20_3">
      <style:paragraph-properties fo:margin-top="0cm" fo:margin-bottom="0.25cm" style:contextual-spacing="false" fo:break-before="page"/>
    </style:style>
    <style:style style:name="P42" style:family="paragraph" style:parent-style-name="Text_20_body">
      <style:paragraph-properties fo:margin-top="0cm" fo:margin-bottom="0.25cm" style:contextual-spacing="false"/>
      <style:text-properties officeooo:rsid="00242426" officeooo:paragraph-rsid="003d8c48"/>
    </style:style>
    <style:style style:name="P43" style:family="paragraph" style:parent-style-name="Text_20_body">
      <style:paragraph-properties fo:margin-top="0cm" fo:margin-bottom="0.25cm" style:contextual-spacing="false"/>
      <style:text-properties officeooo:rsid="002491d9" officeooo:paragraph-rsid="003d8c48"/>
    </style:style>
    <style:style style:name="P44" style:family="paragraph" style:parent-style-name="Heading_20_3">
      <style:paragraph-properties fo:break-before="page"/>
    </style:style>
    <style:style style:name="P45" style:family="paragraph" style:parent-style-name="Text_20_body">
      <style:text-properties officeooo:paragraph-rsid="003d8c48"/>
    </style:style>
    <style:style style:name="P46" style:family="paragraph" style:parent-style-name="Text_20_body">
      <style:paragraph-properties fo:margin-top="0cm" fo:margin-bottom="0.25cm" style:contextual-spacing="false"/>
      <style:text-properties officeooo:rsid="0026461c" officeooo:paragraph-rsid="003e975c"/>
    </style:style>
    <style:style style:name="P47" style:family="paragraph" style:parent-style-name="Text_20_body">
      <style:paragraph-properties fo:margin-top="0cm" fo:margin-bottom="0.25cm" style:contextual-spacing="false"/>
      <style:text-properties officeooo:rsid="002670e9" officeooo:paragraph-rsid="003e975c"/>
    </style:style>
    <style:style style:name="P48" style:family="paragraph" style:parent-style-name="Text_20_body">
      <style:paragraph-properties fo:margin-top="0cm" fo:margin-bottom="0.25cm" style:contextual-spacing="false"/>
      <style:text-properties officeooo:paragraph-rsid="003e975c"/>
    </style:style>
    <style:style style:name="P49" style:family="paragraph" style:parent-style-name="Heading_20_2">
      <style:paragraph-properties fo:margin-top="0cm" fo:margin-bottom="0.25cm" style:contextual-spacing="false"/>
      <style:text-properties officeooo:paragraph-rsid="003e975c"/>
    </style:style>
    <style:style style:name="P50" style:family="paragraph" style:parent-style-name="Heading_20_2">
      <style:paragraph-properties fo:margin-top="0cm" fo:margin-bottom="0.25cm" style:contextual-spacing="false" fo:break-before="page"/>
      <style:text-properties officeooo:paragraph-rsid="003e975c"/>
    </style:style>
    <style:style style:name="P51" style:family="paragraph" style:parent-style-name="Text_20_body">
      <style:paragraph-properties fo:margin-top="0cm" fo:margin-bottom="0.25cm" style:contextual-spacing="false"/>
      <style:text-properties officeooo:rsid="002978da" officeooo:paragraph-rsid="003e975c"/>
    </style:style>
    <style:style style:name="P52" style:family="paragraph" style:parent-style-name="Text_20_body">
      <style:paragraph-properties fo:margin-top="0cm" fo:margin-bottom="0.25cm" style:contextual-spacing="false"/>
      <style:text-properties officeooo:rsid="002adb9d" officeooo:paragraph-rsid="003e975c"/>
    </style:style>
    <style:style style:name="P53" style:family="paragraph" style:parent-style-name="Text_20_body">
      <style:paragraph-properties fo:margin-top="0cm" fo:margin-bottom="0.25cm" style:contextual-spacing="false"/>
      <style:text-properties officeooo:rsid="002adb9d" officeooo:paragraph-rsid="003f96fe"/>
    </style:style>
    <style:style style:name="P54" style:family="paragraph" style:parent-style-name="Text_20_body">
      <style:paragraph-properties fo:margin-top="0cm" fo:margin-bottom="0.25cm" style:contextual-spacing="false"/>
      <style:text-properties officeooo:rsid="002c184d" officeooo:paragraph-rsid="003f96fe"/>
    </style:style>
    <style:style style:name="P55" style:family="paragraph" style:parent-style-name="Text_20_body">
      <style:paragraph-properties fo:margin-top="0cm" fo:margin-bottom="0.25cm" style:contextual-spacing="false"/>
      <style:text-properties officeooo:rsid="002ce8d8" officeooo:paragraph-rsid="003f96fe"/>
    </style:style>
    <style:style style:name="P56" style:family="paragraph" style:parent-style-name="Text_20_body">
      <style:paragraph-properties fo:margin-top="0cm" fo:margin-bottom="0.25cm" style:contextual-spacing="false"/>
      <style:text-properties officeooo:rsid="002ee5da" officeooo:paragraph-rsid="003f96fe"/>
    </style:style>
    <style:style style:name="P57" style:family="paragraph" style:parent-style-name="Text_20_body">
      <style:paragraph-properties fo:margin-top="0cm" fo:margin-bottom="0.25cm" style:contextual-spacing="false"/>
      <style:text-properties officeooo:paragraph-rsid="003f96fe"/>
    </style:style>
    <style:style style:name="P58" style:family="paragraph" style:parent-style-name="Text_20_body">
      <style:paragraph-properties fo:margin-top="0cm" fo:margin-bottom="0.25cm" style:contextual-spacing="false"/>
      <style:text-properties officeooo:rsid="0032c5af" officeooo:paragraph-rsid="003f96fe"/>
    </style:style>
    <style:style style:name="P59" style:family="paragraph" style:parent-style-name="Table_20_Contents">
      <style:text-properties officeooo:rsid="003f96fe" officeooo:paragraph-rsid="003f96fe"/>
    </style:style>
    <style:style style:name="P60" style:family="paragraph" style:parent-style-name="Table_20_Contents">
      <style:paragraph-properties fo:text-align="end" style:justify-single-word="false"/>
      <style:text-properties officeooo:rsid="003f96fe" officeooo:paragraph-rsid="003f96fe"/>
    </style:style>
    <style:style style:name="P61" style:family="paragraph" style:parent-style-name="Table_20_Contents">
      <style:paragraph-properties fo:text-align="end" style:justify-single-word="false"/>
    </style:style>
    <style:style style:name="P62" style:family="paragraph" style:parent-style-name="Text_20_body">
      <style:paragraph-properties fo:margin-top="0cm" fo:margin-bottom="0.25cm" style:contextual-spacing="false"/>
    </style:style>
    <style:style style:name="P63" style:family="paragraph" style:parent-style-name="Text_20_body">
      <style:paragraph-properties fo:margin-top="0cm" fo:margin-bottom="0.25cm" style:contextual-spacing="false"/>
      <style:text-properties officeooo:rsid="00333684" officeooo:paragraph-rsid="003f96fe"/>
    </style:style>
    <style:style style:name="P64" style:family="paragraph" style:parent-style-name="Text_20_body">
      <style:paragraph-properties fo:margin-top="0cm" fo:margin-bottom="0.25cm" style:contextual-spacing="false"/>
      <style:text-properties officeooo:rsid="0033d034" officeooo:paragraph-rsid="0040bc6c"/>
    </style:style>
    <style:style style:name="P65" style:family="paragraph" style:parent-style-name="Heading_20_1">
      <style:paragraph-properties fo:break-before="page"/>
    </style:style>
    <style:style style:name="P66" style:family="paragraph" style:parent-style-name="Text_20_body">
      <style:text-properties officeooo:paragraph-rsid="00440547"/>
    </style:style>
    <style:style style:name="P67" style:family="paragraph" style:parent-style-name="Text_20_body">
      <style:text-properties officeooo:paragraph-rsid="0044dafe"/>
    </style:style>
    <style:style style:name="P68" style:family="paragraph" style:parent-style-name="Heading_20_3">
      <style:paragraph-properties fo:break-before="page"/>
      <style:text-properties officeooo:rsid="0044dafe" officeooo:paragraph-rsid="0044dafe"/>
    </style:style>
    <style:style style:name="P69" style:family="paragraph" style:parent-style-name="Heading_20_2" style:list-style-name="">
      <style:paragraph-properties fo:line-height="100%" fo:text-align="start" style:justify-single-word="false">
        <style:tab-stops/>
      </style:paragraph-properties>
    </style:style>
    <style:style style:name="P70" style:family="paragraph" style:parent-style-name="Heading_20_2">
      <style:paragraph-properties fo:break-before="page"/>
    </style:style>
    <style:style style:name="P71" style:family="paragraph" style:parent-style-name="Text_20_body">
      <style:text-properties officeooo:paragraph-rsid="00454a50"/>
    </style:style>
    <style:style style:name="P72" style:family="paragraph" style:parent-style-name="Text_20_body">
      <style:text-properties fo:font-weight="bold" officeooo:rsid="00467ee3" officeooo:paragraph-rsid="00467ee3" style:font-weight-asian="bold" style:font-weight-complex="bold"/>
    </style:style>
    <style:style style:name="P73" style:family="paragraph" style:parent-style-name="Text_20_body">
      <style:text-properties officeooo:paragraph-rsid="00467ee3"/>
    </style:style>
    <style:style style:name="P74" style:family="paragraph" style:parent-style-name="Text_20_body">
      <style:text-properties fo:font-weight="bold" officeooo:paragraph-rsid="00467ee3" style:font-weight-asian="bold" style:font-weight-complex="bold"/>
    </style:style>
    <style:style style:name="P75" style:family="paragraph" style:parent-style-name="Text_20_body">
      <style:text-properties officeooo:rsid="00467ee3" officeooo:paragraph-rsid="00467ee3"/>
    </style:style>
    <style:style style:name="P76" style:family="paragraph" style:parent-style-name="Text_20_body">
      <style:text-properties officeooo:paragraph-rsid="0046c06f"/>
    </style:style>
    <style:style style:name="P77" style:family="paragraph" style:parent-style-name="Text_20_body">
      <style:text-properties fo:font-weight="bold" officeooo:paragraph-rsid="0046c06f" style:font-weight-asian="bold" style:font-weight-complex="bold"/>
    </style:style>
    <style:style style:name="P78" style:family="paragraph" style:parent-style-name="Text_20_body">
      <style:paragraph-properties fo:break-before="page"/>
      <style:text-properties officeooo:paragraph-rsid="0046c06f"/>
    </style:style>
    <style:style style:name="T1" style:family="text">
      <style:text-properties style:font-name="Montserrat"/>
    </style:style>
    <style:style style:name="T2" style:family="text">
      <style:text-properties style:font-name="Montserrat" officeooo:rsid="00357f49"/>
    </style:style>
    <style:style style:name="T3" style:family="text">
      <style:text-properties officeooo:rsid="00585175"/>
    </style:style>
    <style:style style:name="T4" style:family="text">
      <style:text-properties style:font-name="Montserrat Medium" fo:font-weight="normal" officeooo:rsid="00357f49" style:font-weight-asian="normal" style:font-weight-complex="normal"/>
    </style:style>
    <style:style style:name="T5" style:family="text">
      <style:text-properties style:font-name="Montserrat Medium" fo:font-weight="normal" officeooo:rsid="001e9531" style:font-weight-asian="normal" style:font-weight-complex="normal"/>
    </style:style>
    <style:style style:name="T6" style:family="text">
      <style:text-properties style:font-name="Montserrat Medium" fo:font-weight="normal" officeooo:rsid="00557b5d" style:font-weight-asian="normal" style:font-weight-complex="normal"/>
    </style:style>
    <style:style style:name="T7" style:family="text">
      <style:text-properties fo:font-weight="bold" officeooo:rsid="001ef31a" style:font-weight-asian="bold" style:font-weight-complex="bold"/>
    </style:style>
    <style:style style:name="T8" style:family="text">
      <style:text-properties style:font-name="Montserrat Medium" officeooo:rsid="003745a9"/>
    </style:style>
    <style:style style:name="T9" style:family="text">
      <style:text-properties style:use-window-font-color="true" loext:opacity="0%" style:text-outline="false" style:text-line-through-style="none" style:text-line-through-type="none" style:font-name="Montserrat" fo:font-style="normal" fo:text-shadow="none" style:text-underline-style="none" fo:font-weight="bold" officeooo:rsid="001ef31a" style:font-style-asian="normal" style:font-weight-asian="bold" style:font-style-complex="normal" style:font-weight-complex="bold" style:text-overline-style="none" style:text-overline-color="font-color"/>
    </style:style>
    <style:style style:name="T10" style:family="text">
      <style:text-properties style:use-window-font-color="true" loext:opacity="0%" style:text-outline="false" style:text-line-through-style="none" style:text-line-through-type="none" style:font-name="Montserrat" fo:font-style="normal" fo:text-shadow="none" style:text-underline-style="none" fo:font-weight="normal" officeooo:rsid="001ef31a" style:font-style-asian="normal" style:font-weight-asian="normal" style:font-style-complex="normal" style:font-weight-complex="normal" style:text-overline-style="none" style:text-overline-color="font-color"/>
    </style:style>
    <style:style style:name="T11" style:family="text">
      <style:text-properties style:font-name="Montserrat Medium" fo:font-weight="normal" style:font-weight-asian="normal" style:font-weight-complex="normal"/>
    </style:style>
    <style:style style:name="T12" style:family="text">
      <style:text-properties officeooo:rsid="0038c59c"/>
    </style:style>
    <style:style style:name="T13" style:family="text">
      <style:text-properties officeooo:rsid="001ae5e3"/>
    </style:style>
    <style:style style:name="T14" style:family="text">
      <style:text-properties fo:language="es" fo:country="ES"/>
    </style:style>
    <style:style style:name="T15" style:family="text">
      <style:text-properties fo:language="es" fo:country="ES" officeooo:rsid="001ae5e3"/>
    </style:style>
    <style:style style:name="T16" style:family="text">
      <style:text-properties officeooo:rsid="00394da6"/>
    </style:style>
    <style:style style:name="T17" style:family="text">
      <style:text-properties officeooo:rsid="00207385"/>
    </style:style>
    <style:style style:name="T18" style:family="text">
      <style:text-properties officeooo:rsid="003ad326"/>
    </style:style>
    <style:style style:name="T19" style:family="text">
      <style:text-properties officeooo:rsid="00228c3a"/>
    </style:style>
    <style:style style:name="T20" style:family="text">
      <style:text-properties officeooo:rsid="003d8c48"/>
    </style:style>
    <style:style style:name="T21" style:family="text">
      <style:text-properties officeooo:rsid="003e975c"/>
    </style:style>
    <style:style style:name="T22" style:family="text">
      <style:text-properties officeooo:rsid="002670e9"/>
    </style:style>
    <style:style style:name="T23" style:family="text">
      <style:text-properties officeooo:rsid="002978da"/>
    </style:style>
    <style:style style:name="T24" style:family="text">
      <style:text-properties officeooo:rsid="002adb9d"/>
    </style:style>
    <style:style style:name="T25" style:family="text">
      <style:text-properties officeooo:rsid="003f96fe"/>
    </style:style>
    <style:style style:name="T26" style:family="text">
      <style:text-properties officeooo:rsid="00333684"/>
    </style:style>
    <style:style style:name="T27" style:family="text">
      <style:text-properties officeooo:rsid="0040bc6c"/>
    </style:style>
    <style:style style:name="T28" style:family="text">
      <style:text-properties officeooo:rsid="0044dafe"/>
    </style:style>
    <style:style style:name="T29" style:family="text">
      <style:text-properties officeooo:rsid="00454a50"/>
    </style:style>
    <style:style style:name="T30" style:family="text">
      <style:text-properties officeooo:rsid="00467ee3"/>
    </style:style>
    <style:style style:name="T31" style:family="text">
      <style:text-properties officeooo:rsid="0046c06f"/>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3">Dpto- Informática – I.E.S La Marisma</text:p>
      <text:p text:style-name="P4">MÓDULO PROYECTO INTERMODULAR</text:p>
      <text:p text:style-name="P5">C.F.G.M.</text:p>
      <text:p text:style-name="P4">SISTEMAS MICROINFORMÁTICOS Y REDES</text:p>
      <text:p text:style-name="P2"/>
      <text:p text:style-name="P2"/>
      <text:p text:style-name="P2"/>
      <text:p text:style-name="P2"/>
      <text:p text:style-name="P2"/>
      <text:p text:style-name="P2"/>
      <text:p text:style-name="P2"/>
      <text:p text:style-name="P2"/>
      <text:p text:style-name="P6">Privanube</text:p>
      <text:p text:style-name="P7">Nube privada creada y configurada mediante Proxmox</text:p>
      <text:p text:style-name="P2"/>
      <text:p text:style-name="P2"/>
      <text:p text:style-name="P2"/>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1">Autor: </text:span><text:span text:style-name="T2">Jairo Motero García</text:span></text:p>
      <text:p text:style-name="P10">Fecha: 28/04/2026</text:p>
      <text:p text:style-name="P10">Tutor: Juan Limón <text:span text:style-name="T3">Limón</text:span></text:p>
      <text:p text:style-name="P11">HOJA RESUMEN-PROYECTO</text:p>
      <table:table table:name="Resumen-Proyecto" table:style-name="Resumen-Proyecto" table:template-name="Default Style">
        <table:table-column table:style-name="Resumen-Proyecto.A"/>
        <table:table-column table:style-name="Resumen-Proyecto.B"/>
        <table:table-row>
          <table:table-cell table:style-name="Resumen-Proyecto.A1" table:number-columns-spanned="2" office:value-type="string">
            <text:p text:style-name="P12">Título del proyecto: <text:span text:style-name="T4">Priva nube</text:span></text:p>
          </table:table-cell>
          <table:covered-table-cell/>
        </table:table-row>
        <table:table-row table:style-name="Resumen-Proyecto.2">
          <table:table-cell table:style-name="Resumen-Proyecto.A2" office:value-type="string">
            <text:p text:style-name="P13">Autor: <text:span text:style-name="T4">Jairo Motero García</text:span></text:p>
          </table:table-cell>
          <table:table-cell table:style-name="Resumen-Proyecto.B2" office:value-type="string">
            <text:p text:style-name="P13">Fecha: <text:span text:style-name="T5"><text:s/></text:span><text:span text:style-name="T4">27</text:span><text:span text:style-name="T5">– 0</text:span><text:span text:style-name="T4">5</text:span><text:span text:style-name="T5"> – 2026</text:span></text:p>
          </table:table-cell>
        </table:table-row>
        <table:table-row table:style-name="Resumen-Proyecto.2">
          <table:table-cell table:style-name="Resumen-Proyecto.B2" table:number-columns-spanned="2" office:value-type="string">
            <text:p text:style-name="P13">Tutor: <text:span text:style-name="T5">Juan Limón </text:span><text:span text:style-name="T6">Limón</text:span></text:p>
          </table:table-cell>
          <table:covered-table-cell/>
        </table:table-row>
        <table:table-row table:style-name="Resumen-Proyecto.2">
          <table:table-cell table:style-name="Resumen-Proyecto.B2" table:number-columns-spanned="2" office:value-type="string">
            <text:p text:style-name="P13">Titulación: <text:span text:style-name="T5">Sistemas Microinformáticos y Redes</text:span></text:p>
          </table:table-cell>
          <table:covered-table-cell/>
        </table:table-row>
        <table:table-row table:style-name="Resumen-Proyecto.2">
          <table:table-cell table:style-name="Resumen-Proyecto.B2" table:number-columns-spanned="2" office:value-type="string">
            <text:p text:style-name="P13">Palabras clave: </text:p>
            <text:p text:style-name="P14"><text:span text:style-name="T7">Castellano - </text:span><text:span text:style-name="T8">Nextcloud, nube privada, Proxmox, HTTPS, almacenamiento, ngrok</text:span></text:p>
            <text:p text:style-name="P15"><text:span text:style-name="T9">Inglés</text:span><text:span text:style-name="T10"> - </text:span><text:span text:style-name="T11">Nextcloud, private cloud, Proxmox, HTTPS, storage, ngrok</text:span></text:p>
          </table:table-cell>
          <table:covered-table-cell/>
        </table:table-row>
        <table:table-row>
          <table:table-cell table:style-name="Resumen-Proyecto.B2" table:number-columns-spanned="2" office:value-type="string">
            <text:p text:style-name="P16">RESUMEN DEL PROYECTO (ESPAÑOL)</text:p>
            <text:p text:style-name="P17">El proyecto PrivaNube consiste en la implantación de una nube privada basada en Nextcloud para la empresa Infosur, con el objetivo de centralizar el almacenamiento de archivos y facilitar el acceso a la información de forma segura.<text:line-break/><text:line-break/>La solución se ha desplegado sobre un servidor virtualizado en Proxmox, permitiendo el acceso local mediante https://10.4.0.206 y el acceso externo a través de un túnel público generado con ngrok.<text:line-break/><text:line-break/>Además, se ha configurado el acceso mediante HTTPS para proteger las conexiones. El proyecto permite simular una solución realista de nube privada para una pequeña empresa, aplicando conocimientos de sistemas, redes, virtualización y seguridad.</text:p>
            <text:p text:style-name="P18">PROJECT SUMMARY (ENGLISH)</text:p>
            <text:p text:style-name="P19">The PrivaNube project consists of deploying a private cloud solution based on Nextcloud for the company Infosur, with the aim of centralizing file storage and improving secure access to information.<text:line-break/><text:line-break/>The solution has been deployed on a virtualized server using Proxmox, allowing local access through https://10.4.0.206 and external access through a public tunnel generated with ngrok.<text:line-break/><text:line-break/>In addition, HTTPS access has been configured to protect communications. This project simulates a realistic private cloud solution for a small company, applying knowledge of systems, networking, virtualization and security.</text:p>
          </table:table-cell>
          <table:covered-table-cell/>
        </table:table-row>
      </table:table>
      <text:p text:style-name="P20"/>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21">Indice</text:p>
          </text:index-title>
          <text:p text:style-name="P22"><text:a xlink:type="simple" xlink:href="#__RefHeading___Toc62_1307444459" text:style-name="Index_20_Link" text:visited-style-name="Index_20_Link">Introducción<text:tab/>4</text:a></text:p>
          <text:p text:style-name="P23"><text:a xlink:type="simple" xlink:href="#__RefHeading___Toc64_1307444459" text:style-name="Index_20_Link" text:visited-style-name="Index_20_Link">1.1 Introducción a la memoria<text:tab/>4</text:a></text:p>
          <text:p text:style-name="P23"><text:a xlink:type="simple" xlink:href="#__RefHeading___Toc64_1307444459%20Copia%201" text:style-name="Index_20_Link" text:visited-style-name="Index_20_Link">1.2 Descripción<text:tab/>4</text:a></text:p>
          <text:p text:style-name="P23"><text:a xlink:type="simple" xlink:href="#__RefHeading___Toc64_1307444459%20Copia%201%20Copia%201" text:style-name="Index_20_Link" text:visited-style-name="Index_20_Link">1.3 Objetivos generales<text:tab/>5</text:a></text:p>
          <text:p text:style-name="P23"><text:a xlink:type="simple" xlink:href="#__RefHeading___Toc508_193255832" text:style-name="Index_20_Link" text:visited-style-name="Index_20_Link">1.4 Beneficios<text:tab/>5</text:a></text:p>
          <text:p text:style-name="P23"><text:a xlink:type="simple" xlink:href="#__RefHeading___Toc510_193255832" text:style-name="Index_20_Link" text:visited-style-name="Index_20_Link">1.5 Motivaciones personales<text:tab/>6</text:a></text:p>
          <text:p text:style-name="P23"><text:a xlink:type="simple" xlink:href="#__RefHeading___Toc512_193255832" text:style-name="Index_20_Link" text:visited-style-name="Index_20_Link">1.6 Estructura de la memoria<text:tab/>6</text:a></text:p>
          <text:p text:style-name="P22"><text:a xlink:type="simple" xlink:href="#__RefHeading___Toc514_193255832" text:style-name="Index_20_Link" text:visited-style-name="Index_20_Link">Estudio de viabilidad<text:tab/>7</text:a></text:p>
          <text:p text:style-name="P23"><text:a xlink:type="simple" xlink:href="#__RefHeading___Toc516_193255832" text:style-name="Index_20_Link" text:visited-style-name="Index_20_Link">2.1 Introducción<text:tab/>7</text:a></text:p>
          <text:p text:style-name="P24"><text:a xlink:type="simple" xlink:href="#__RefHeading___Toc518_193255832" text:style-name="Index_20_Link" text:visited-style-name="Index_20_Link">2.1.1 Tipología y palabras clave<text:tab/>7</text:a></text:p>
          <text:p text:style-name="P24"><text:a xlink:type="simple" xlink:href="#__RefHeading___Toc520_193255832" text:style-name="Index_20_Link" text:visited-style-name="Index_20_Link">2.1.2 Descripción<text:tab/>8</text:a></text:p>
          <text:p text:style-name="P24"><text:a xlink:type="simple" xlink:href="#__RefHeading___Toc522_193255832" text:style-name="Index_20_Link" text:visited-style-name="Index_20_Link">2.1.3 Objetivos del proyecto<text:tab/>8</text:a></text:p>
          <text:p text:style-name="P24"><text:a xlink:type="simple" xlink:href="#__RefHeading___Toc524_193255832" text:style-name="Index_20_Link" text:visited-style-name="Index_20_Link">2.1.4 Clasificación de los objetivos<text:tab/>9</text:a></text:p>
          <text:p text:style-name="P24"><text:a xlink:type="simple" xlink:href="#__RefHeading___Toc526_193255832" text:style-name="Index_20_Link" text:visited-style-name="Index_20_Link">2.1.5 Definiciones, acrónimos y abreviaciones<text:tab/>9</text:a></text:p>
          <text:p text:style-name="P24"><text:a xlink:type="simple" xlink:href="#__RefHeading___Toc528_193255832" text:style-name="Index_20_Link" text:visited-style-name="Index_20_Link">2.1.6 Partes interesadas<text:tab/>10</text:a></text:p>
          <text:p text:style-name="P24"><text:a xlink:type="simple" xlink:href="#__RefHeading___Toc530_193255832" text:style-name="Index_20_Link" text:visited-style-name="Index_20_Link">2.1.7 Referencias<text:tab/>10</text:a></text:p>
          <text:p text:style-name="P24"><text:a xlink:type="simple" xlink:href="#__RefHeading___Toc532_193255832" text:style-name="Index_20_Link" text:visited-style-name="Index_20_Link">2.1.8 Documentación del proyecto<text:tab/>11</text:a></text:p>
          <text:p text:style-name="P23"><text:a xlink:type="simple" xlink:href="#__RefHeading___Toc534_193255832" text:style-name="Index_20_Link" text:visited-style-name="Index_20_Link">2.2 Estudio de la situación actual<text:tab/>11</text:a></text:p>
          <text:p text:style-name="P24"><text:a xlink:type="simple" xlink:href="#__RefHeading___Toc536_193255832" text:style-name="Index_20_Link" text:visited-style-name="Index_20_Link">2.2.1 Contexto<text:tab/>11</text:a></text:p>
          <text:p text:style-name="P24"><text:a xlink:type="simple" xlink:href="#__RefHeading___Toc538_193255832" text:style-name="Index_20_Link" text:visited-style-name="Index_20_Link">2.2.2 Lógica del sistema<text:tab/>11</text:a></text:p>
          <text:p text:style-name="P24"><text:a xlink:type="simple" xlink:href="#__RefHeading___Toc540_193255832" text:style-name="Index_20_Link" text:visited-style-name="Index_20_Link">2.2.3 Descripción física<text:tab/>12</text:a></text:p>
          <text:p text:style-name="P24"><text:a xlink:type="simple" xlink:href="#__RefHeading___Toc542_193255832" text:style-name="Index_20_Link" text:visited-style-name="Index_20_Link">2.2.4 Diagnóstico del sistema actual<text:tab/>12</text:a></text:p>
          <text:p text:style-name="P24"><text:a xlink:type="simple" xlink:href="#__RefHeading___Toc544_193255832" text:style-name="Index_20_Link" text:visited-style-name="Index_20_Link">2.2.5 Normativa y legislación<text:tab/>12</text:a></text:p>
          <text:p text:style-name="P23"><text:a xlink:type="simple" xlink:href="#__RefHeading___Toc546_193255832" text:style-name="Index_20_Link" text:visited-style-name="Index_20_Link">2.3 Requisitos del sistema<text:tab/>13</text:a></text:p>
          <text:p text:style-name="P24"><text:a xlink:type="simple" xlink:href="#__RefHeading___Toc548_193255832" text:style-name="Index_20_Link" text:visited-style-name="Index_20_Link">2.3.1 Requisitos<text:tab/>13</text:a></text:p>
          <text:p text:style-name="P24"><text:a xlink:type="simple" xlink:href="#__RefHeading___Toc550_193255832" text:style-name="Index_20_Link" text:visited-style-name="Index_20_Link">2.3.2 Restricciones del sistema<text:tab/>13</text:a></text:p>
          <text:p text:style-name="P24"><text:a xlink:type="simple" xlink:href="#__RefHeading___Toc552_193255832" text:style-name="Index_20_Link" text:visited-style-name="Index_20_Link">2.3.3 Catalogación y priorización de los requisitos<text:tab/>14</text:a></text:p>
          <text:p text:style-name="P23"><text:a xlink:type="simple" xlink:href="#__RefHeading___Toc554_193255832" text:style-name="Index_20_Link" text:visited-style-name="Index_20_Link">2.4 Alternativas y selección de la solución<text:tab/>14</text:a></text:p>
          <text:p text:style-name="P24"><text:a xlink:type="simple" xlink:href="#__RefHeading___Toc556_193255832" text:style-name="Index_20_Link" text:visited-style-name="Index_20_Link">2.4.1 Alternativa 1: Servicios externos en la nube<text:tab/>14</text:a></text:p>
          <text:p text:style-name="P24"><text:a xlink:type="simple" xlink:href="#__RefHeading___Toc558_193255832" text:style-name="Index_20_Link" text:visited-style-name="Index_20_Link">2.4.2 Alternativa 2: Nube privada con Nextcloud<text:tab/>15</text:a></text:p>
          <text:p text:style-name="P24"><text:a xlink:type="simple" xlink:href="#__RefHeading___Toc560_193255832" text:style-name="Index_20_Link" text:visited-style-name="Index_20_Link">2.4.x Conclusiones<text:tab/>15</text:a></text:p>
          <text:p text:style-name="P23"><text:a xlink:type="simple" xlink:href="#__RefHeading___Toc562_193255832" text:style-name="Index_20_Link" text:visited-style-name="Index_20_Link">2.5 Planificación del proyecto<text:tab/>16</text:a></text:p>
          <text:p text:style-name="P24"><text:a xlink:type="simple" xlink:href="#__RefHeading___Toc564_193255832" text:style-name="Index_20_Link" text:visited-style-name="Index_20_Link">2.5.1 Recursos del proyecto<text:tab/>16</text:a></text:p>
          <text:p text:style-name="P24"><text:a xlink:type="simple" xlink:href="#__RefHeading___Toc566_193255832" text:style-name="Index_20_Link" text:visited-style-name="Index_20_Link">2.5.2 Tareas del proyecto<text:tab/>16</text:a></text:p>
          <text:p text:style-name="P24"><text:a xlink:type="simple" xlink:href="#__RefHeading___Toc568_193255832" text:style-name="Index_20_Link" text:visited-style-name="Index_20_Link">2.5.3 Planificación temporal<text:tab/>17</text:a></text:p>
          <text:p text:style-name="P23"><text:a xlink:type="simple" xlink:href="#__RefHeading___Toc570_193255832" text:style-name="Index_20_Link" text:visited-style-name="Index_20_Link">2.6 Evaluación de riesgos<text:tab/>18</text:a></text:p>
          <text:p text:style-name="P24"><text:a xlink:type="simple" xlink:href="#__RefHeading___Toc572_193255832" text:style-name="Index_20_Link" text:visited-style-name="Index_20_Link">2.6.1 Lista de riesgos<text:tab/>18</text:a></text:p>
          <text:p text:style-name="P24"><text:a xlink:type="simple" xlink:href="#__RefHeading___Toc574_193255832" text:style-name="Index_20_Link" text:visited-style-name="Index_20_Link">2.6.2 Catalogación de riesgos<text:tab/>18</text:a></text:p>
          <text:p text:style-name="P24"><text:a xlink:type="simple" xlink:href="#__RefHeading___Toc576_193255832" text:style-name="Index_20_Link" text:visited-style-name="Index_20_Link">2.6.3 Plan de contingencia<text:tab/>19</text:a></text:p>
          <text:p text:style-name="P23"><text:a xlink:type="simple" xlink:href="#__RefHeading___Toc578_193255832" text:style-name="Index_20_Link" text:visited-style-name="Index_20_Link">2.7 Presupuesto<text:tab/>20</text:a></text:p>
          <text:p text:style-name="P24"><text:a xlink:type="simple" xlink:href="#__RefHeading___Toc580_193255832" text:style-name="Index_20_Link" text:visited-style-name="Index_20_Link">2.7.1 Estimación de coste material<text:tab/>20</text:a></text:p>
          <text:p text:style-name="P24"><text:a xlink:type="simple" xlink:href="#__RefHeading___Toc582_193255832" text:style-name="Index_20_Link" text:visited-style-name="Index_20_Link">2.7.2 Estimación de coste personal<text:tab/>21</text:a></text:p>
          <text:p text:style-name="P24"><text:a xlink:type="simple" xlink:href="#__RefHeading___Toc584_193255832" text:style-name="Index_20_Link" text:visited-style-name="Index_20_Link">2.7.3 Resumen y análisis coste-beneficio<text:tab/>21</text:a></text:p>
          <text:p text:style-name="P23"><text:a xlink:type="simple" xlink:href="#__RefHeading___Toc586_193255832" text:style-name="Index_20_Link" text:visited-style-name="Index_20_Link"><text:soft-page-break/>2.8 Conclusiones<text:tab/>23</text:a></text:p>
          <text:p text:style-name="P24"><text:a xlink:type="simple" xlink:href="#__RefHeading___Toc588_193255832" text:style-name="Index_20_Link" text:visited-style-name="Index_20_Link">2.8.1 Beneficios<text:tab/>23</text:a></text:p>
          <text:p text:style-name="P24"><text:a xlink:type="simple" xlink:href="#__RefHeading___Toc590_193255832" text:style-name="Index_20_Link" text:visited-style-name="Index_20_Link">2.8.2 Inconvenientes<text:tab/>24</text:a></text:p>
        </text:index-body>
      </text:table-of-content>
      <text:p text:style-name="Standard"/>
      <text:h text:style-name="P25" text:outline-level="1"><text:bookmark-start text:name="__RefHeading___Toc62_1307444459"/><text:span text:style-name="T12">1. </text:span>Introducción<text:bookmark-end text:name="__RefHeading___Toc62_1307444459"/></text:h>
      <text:h text:style-name="P26" text:outline-level="2"><text:bookmark-start text:name="__RefHeading___Toc64_1307444459"/>1.1 Introducción a la memoria<text:bookmark-end text:name="__RefHeading___Toc64_1307444459"/></text:h>
      <text:p text:style-name="P27">El presente documento recoge el desarrollo del proyecto “PrivaNube”, cuyo objetivo principal es la implantación de una nube privada basada en Nextcloud para la empresa Infosur.</text:p>
      <text:p text:style-name="P27">En la actualidad, muchas empresas necesitan disponer de un sistema centralizado para almacenar, compartir y gestionar archivos de forma segura. El uso de plataformas de nube privada permite mantener un mayor control sobre la información, mejorar la organización interna y reducir la dependencia de servicios externos.</text:p>
      <text:p text:style-name="P27">Este proyecto se ha desarrollado sobre un entorno virtualizado mediante Proxmox, aprovechando los recursos asignados para la realización del proyecto. Además, se ha configurado el acceso seguro mediante HTTPS y se ha habilitado el acceso externo a la interfaz web de Nextcloud utilizando un túnel público generado con ngrok.</text:p>
      <text:p text:style-name="P27">La finalidad de esta memoria es explicar de forma ordenada el análisis, diseño, implementación y validación de la solución, mostrando tanto los objetivos alcanzados como las limitaciones encontradas durante el proceso.</text:p>
      <text:h text:style-name="P28" text:outline-level="2"><text:bookmark-start text:name="__RefHeading___Toc64_1307444459 Copia 1"/>1.<text:span text:style-name="T13">2 </text:span><text:span text:style-name="T14">Descripción</text:span><text:bookmark-end text:name="__RefHeading___Toc64_1307444459 Copia 1"/></text:h>
      <text:p text:style-name="P29">El proyecto PrivaNube consiste en la instalación y configuración de una plataforma de nube privada utilizando Nextcloud como aplicación principal.</text:p>
      <text:p text:style-name="P29">Nextcloud permite a los usuarios almacenar archivos, acceder a ellos desde distintos dispositivos, compartir información y utilizar funciones adicionales como calendario, contactos y gestión colaborativa básica. De esta forma, se simula una solución realista para una pequeña empresa que necesita centralizar sus datos y mejorar el acceso a la información.</text:p>
      <text:p text:style-name="P29">La infraestructura se ha desplegado sobre un servidor virtualizado en Proxmox, donde se aloja el servicio principal de Nextcloud. El acceso local se realiza mediante la dirección: <text:a xlink:type="simple" xlink:href="https://10.4.0.206/" text:style-name="Internet_20_link" text:visited-style-name="Visited_20_Internet_20_Link">https://10.4.0.206</text:a></text:p>
      <text:p text:style-name="P29">Además, para comprobar el acceso desde fuera de la red local, se ha utilizado un túnel público mediante ngrok, accesible desde la siguiente dirección:</text:p>
      <text:p text:style-name="P29"><text:a xlink:type="simple" xlink:href="https://backache-aneurism-marsupial.ngrok-free.dev/" text:style-name="Internet_20_link" text:visited-style-name="Visited_20_Internet_20_Link">https://backache-aneurism-marsupial.ngrok-free.dev</text:a></text:p>
      <text:p text:style-name="P29">Durante el desarrollo del proyecto también se ha configurado el acceso mediante HTTPS, mejorando la seguridad de las conexiones entre los usuarios y el servicio.</text:p>
      <text:h text:style-name="P30" text:outline-level="2"><text:bookmark-start text:name="__RefHeading___Toc64_1307444459 Copia 1 Copia 1"/><text:span text:style-name="T14">1.</text:span><text:span text:style-name="T15">3 </text:span><text:span text:style-name="T14">Objetivos generales</text:span><text:bookmark-end text:name="__RefHeading___Toc64_1307444459 Copia 1 Copia 1"/></text:h>
      <text:p text:style-name="P29">Los objetivos principales del proyecto son los siguientes:</text:p>
      <text:p text:style-name="P29"><text:span text:style-name="T12">· </text:span>Implantar una nube privada funcional basada en Nextcloud.<text:line-break/><text:span text:style-name="T12">· </text:span>Centralizar el almacenamiento de archivos de la empresa.<text:line-break/><text:span text:style-name="T12">· </text:span>Desplegar el servicio sobre una infraestructura virtualizada mediante Proxmox.<text:line-break/><text:span text:style-name="T12">· </text:span>Configurar el acceso seguro mediante HTTPS.<text:line-break/><text:span text:style-name="T12">· </text:span>Permitir el acceso local al servicio desde la red del centro.<text:line-break/><text:span text:style-name="T12">· </text:span>Validar el acceso externo a la interfaz web mediante ngrok.<text:line-break/><text:span text:style-name="T12">· </text:span>Comprobar el funcionamiento general de la plataforma mediante pruebas reales.<text:line-break/><text:span text:style-name="T12">· </text:span>Documentar las limitaciones detectadas durante el desarrollo del proyecto.</text:p>
      <text:h text:style-name="P31" text:outline-level="2"><text:bookmark-start text:name="__RefHeading___Toc508_193255832"/>1.4 Beneficios<text:bookmark-end text:name="__RefHeading___Toc508_193255832"/></text:h>
      <text:p text:style-name="P27">La implantación de PrivaNube aporta diferentes beneficios para una pequeña empresa como Infosur:</text:p>
      <text:p text:style-name="P27"><text:span text:style-name="T12">· </text:span>Centralización de la información en un único servicio.<text:line-break/><text:span text:style-name="T12">· </text:span>Acceso a los archivos desde distintos equipos y ubicaciones.<text:line-break/><text:span text:style-name="T12">· </text:span>Mayor control sobre los datos frente al uso exclusivo de servicios externos.<text:line-break/><text:span text:style-name="T12">· </text:span>Mejora de la seguridad mediante acceso cifrado con HTTPS.<text:line-break/><text:span text:style-name="T12">· </text:span>Posibilidad de ampliar el sistema en el futuro con más usuarios o funcionalidades.<text:line-break/><text:span text:style-name="T12">· </text:span>Uso de software libre, reduciendo costes de licencias.<text:line-break/><text:span text:style-name="T12">· </text:span>Aprovechamiento de una infraestructura virtualizada ya disponible.</text:p>
      <text:p text:style-name="P27">Gracias a esta solución, la empresa puede disponer de una plataforma propia de almacenamiento y colaboración, adaptada a sus necesidades y con posibilidad de crecimiento.</text:p>
      <text:h text:style-name="Heading_20_2" text:outline-level="2">1.5 Motivaciones personales</text:h>
      <text:p text:style-name="P32">La realización de este proyecto surge como una oportunidad para aplicar de forma práctica los conocimientos adquiridos durante el ciclo formativo de Sistemas Microinformáticos y Redes.</text:p>
      <text:p text:style-name="P32">Se ha elegido una solución basada en Nextcloud porque permite trabajar con conceptos reales de administración de sistemas, servicios web, virtualización, seguridad y acceso remoto. Además, se trata de una herramienta útil en entornos empresariales, especialmente para pequeñas empresas que necesitan organizar sus archivos sin depender completamente de plataformas externas.</text:p>
      <text:p text:style-name="P32">El proyecto también ha supuesto un reto personal, ya que ha requerido instalar, configurar, probar y documentar una solución funcional, resolviendo incidencias reales durante el proceso.</text:p>
      <text:h text:style-name="P33" text:outline-level="2"><text:bookmark-start text:name="__RefHeading___Toc512_193255832"/>1.6 Estructura de la memoria<text:bookmark-end text:name="__RefHeading___Toc512_193255832"/></text:h>
      <text:p text:style-name="P32">El presente documento se organiza en diferentes apartados que explican las fases principales del proyecto.</text:p>
      <text:p text:style-name="P32">En primer lugar, se realiza una introducción general al proyecto, describiendo su finalidad, objetivos y beneficios. A continuación, se desarrolla el estudio de viabilidad, donde se analiza la necesidad de la solución y los recursos disponibles.</text:p>
      <text:p text:style-name="P32">Posteriormente, se presenta el análisis y diseño del sistema, detallando la arquitectura utilizada, la aplicación principal y la forma de acceso al servicio. Después, se explica la implementación realizada, incluyendo la instalación de Nextcloud, la configuración de HTTPS y el acceso externo mediante ngrok.</text:p>
      <text:p text:style-name="P32">Finalmente, se recogen las pruebas de funcionamiento, las medidas de seguridad aplicadas, las incidencias encontradas y las conclusiones obtenidas tras la realización del proyecto.</text:p>
      <text:h text:style-name="P34" text:outline-level="1"><text:bookmark-start text:name="__RefHeading___Toc514_193255832"/>2. ESTUDIO DE VIABILIDAD<text:bookmark-end text:name="__RefHeading___Toc514_193255832"/></text:h>
      <text:h text:style-name="P35" text:outline-level="2"><text:bookmark-start text:name="__RefHeading___Toc516_193255832"/>2.1 Introducción <text:bookmark-end text:name="__RefHeading___Toc516_193255832"/></text:h>
      <text:p text:style-name="P32">El estudio de viabilidad tiene como finalidad analizar si el proyecto PrivaNube puede llevarse a cabo correctamente con los recursos disponibles y si la solución propuesta responde a las necesidades planteadas para la empresa Infosur.</text:p>
      <text:p text:style-name="P32">Este proyecto se basa en la implantación de una nube privada mediante Nextcloud, desplegada sobre una infraestructura virtualizada en Proxmox. La solución permite centralizar archivos, facilitar el acceso a la información y mejorar la organización de los datos dentro de un entorno controlado.</text:p>
      <text:p text:style-name="P32">Para valorar la viabilidad del proyecto, se analizan los aspectos técnicos, económicos, operativos y legales, así como los riesgos, limitaciones y alternativas posibles.</text:p>
      <text:h text:style-name="P36" text:outline-level="3"><text:bookmark-start text:name="__RefHeading___Toc518_193255832"/>2.1.1 Tipología y palabras clave<text:bookmark-end text:name="__RefHeading___Toc518_193255832"/></text:h>
      <text:p text:style-name="P32">Este proyecto pertenece a la tipología de implantación, administración y documentación de un servicio en red, ya que consiste en desplegar, configurar y validar una plataforma de nube privada accesible mediante navegador web.</text:p>
      <text:p text:style-name="P32">También se puede clasificar como un proyecto de virtualización y servicios cloud, debido al uso de Proxmox como entorno de virtualización y Nextcloud como aplicación principal de almacenamiento y colaboración.</text:p>
      <text:p text:style-name="P32">Palabras clave en castellano:<text:line-break/>Nextcloud, nube privada, Proxmox, HTTPS, almacenamiento, ngrok.</text:p>
      <text:p text:style-name="P32">Palabras clave en inglés:<text:line-break/>Nextcloud, private cloud, Proxmox, HTTPS, storage, ngrok.2.1.2 Descripción</text:p>
      <text:p text:style-name="P32">El proyecto PrivaNube consiste en la implantación de una nube privada basada en Nextcloud, destinada a centralizar el almacenamiento de archivos y facilitar el acceso a la información de forma organizada.</text:p>
      <text:p text:style-name="P32">La solución se aloja sobre un servidor virtualizado mediante Proxmox, aprovechando los recursos asignados para el desarrollo del proyecto. Nextcloud permite gestionar archivos, usuarios y servicios adicionales como calendario, contactos y compartición de documentos.</text:p>
      <text:p text:style-name="P32">El sistema dispone de acceso local mediante la dirección: <text:a xlink:type="simple" xlink:href="https://10.4.0.206/" text:style-name="Internet_20_link" text:visited-style-name="Visited_20_Internet_20_Link">https://10.4.0.206</text:a></text:p>
      <text:p text:style-name="P32">Además, se ha habilitado el acceso externo a la interfaz web mediante una URL pública generada con ngrok: <text:a xlink:type="simple" xlink:href="https://backache-aneurism-marsupial.ngrok-free.dev/" text:style-name="Internet_20_link" text:visited-style-name="Visited_20_Internet_20_Link">https://backache-aneurism-marsupial.ngrok-free.dev</text:a></text:p>
      <text:p text:style-name="P32">Gracias a esta configuración, el proyecto permite demostrar el funcionamiento de una nube privada en un entorno realista, tanto desde la red local como desde ubicaciones externas.</text:p>
      <text:h text:style-name="Heading_20_3" text:outline-level="3"><text:soft-page-break/>2.1.3 Objetivos del proyecto</text:h>
      <text:p text:style-name="P37">El proyecto se ha planteado siguiendo un enfoque MVP (Minimum Viable Product), es decir, una versión mínima funcional que permita validar el objetivo principal del sistema sin añadir complejidad innecesaria.</text:p>
      <text:p text:style-name="P37">El MVP de PrivaNube se centra en los siguientes elementos:</text:p>
      <text:p text:style-name="P32"><text:span text:style-name="T16">· </text:span><text:span text:style-name="T17">Servidor virtualizado mediante Proxmox.<text:line-break/></text:span><text:span text:style-name="T16">· </text:span><text:span text:style-name="T17">Instalación y configuración de Nextcloud.<text:line-break/></text:span><text:span text:style-name="T16">· </text:span><text:span text:style-name="T17">Acceso local seguro mediante HTTPS.<text:line-break/></text:span><text:span text:style-name="T16">· </text:span><text:span text:style-name="T17">Acceso externo a la interfaz web mediante ngrok.<text:line-break/></text:span><text:span text:style-name="T16">· </text:span><text:span text:style-name="T17">Validación del funcionamiento desde diferentes equipos.<text:line-break/></text:span><text:span text:style-name="T16">· </text:span><text:span text:style-name="T17">Uso básico de la plataforma para almacenamiento y acceso a archivos.</text:span></text:p>
      <text:p text:style-name="P37">No se contempla en esta fase una implantación empresarial completa con dominio propio definitivo, alta disponibilidad o integración avanzada con otros sistemas. Estas mejoras quedan planteadas como posibles ampliaciones futuras.</text:p>
      <text:p text:style-name="P37">Este enfoque permite asegurar primero el funcionamiento principal de la solución antes de añadir elementos más complejos.</text:p>
      <text:h text:style-name="P38" text:outline-level="3" text:is-list-header="true"><text:bookmark-start text:name="__RefHeading___Toc524_193255832"/>2.1.4 Clasificación de los objetivos<text:bookmark-end text:name="__RefHeading___Toc524_193255832"/></text:h>
      <text:p text:style-name="P37">El objetivo principal del proyecto es implantar una nube privada funcional basada en Nextcloud, desplegada sobre una infraestructura virtualizada mediante Proxmox, que permita centralizar archivos y acceder a ellos de forma segura.</text:p>
      <text:p text:style-name="P37">Los objetivos principales son:</text:p>
      <text:p text:style-name="P32"><text:span text:style-name="T16">· </text:span><text:span text:style-name="T17">Implantar una plataforma de nube privada mediante Nextcloud.<text:line-break/></text:span><text:span text:style-name="T16">· </text:span><text:span text:style-name="T17">Centralizar el almacenamiento de archivos de la empresa.<text:line-break/></text:span><text:span text:style-name="T16">· </text:span><text:span text:style-name="T17">Desplegar el servicio sobre un entorno virtualizado con Proxmox.<text:line-break/></text:span><text:span text:style-name="T16">· </text:span><text:span text:style-name="T17">Configurar acceso seguro mediante HTTPS.<text:line-break/></text:span><text:span text:style-name="T16">· </text:span><text:span text:style-name="T17">Permitir el acceso local al servicio desde la red del centro.<text:line-break/></text:span><text:span text:style-name="T16">· </text:span><text:span text:style-name="T17">Validar el acceso externo mediante ngrok.<text:line-break/></text:span><text:span text:style-name="T16">· </text:span><text:span text:style-name="T17">Comprobar el funcionamiento de la plataforma desde diferentes equipos.<text:line-break/></text:span><text:span text:style-name="T16">· </text:span><text:span text:style-name="T17">Documentar la instalación, configuración, pruebas y limitaciones detectadas.</text:span></text:p>
      <text:h text:style-name="P36" text:outline-level="3"><text:bookmark-start text:name="__RefHeading___Toc526_193255832"/>2.1.5 Definiciones, acrónimos y abreviaciones<text:bookmark-end text:name="__RefHeading___Toc526_193255832"/></text:h>
      <text:p text:style-name="P39">Los objetivos del proyecto se pueden clasificar en cuatro grupos principales:</text:p>
      <text:p text:style-name="P39">Objetivos técnicos<text:line-break/><text:span text:style-name="T18">· </text:span>Desplegar Nextcloud sobre un servidor virtualizado.<text:line-break/><text:span text:style-name="T18">· </text:span>Configurar el acceso mediante HTTPS.<text:line-break/><text:span text:style-name="T18">· </text:span>Habilitar acceso externo mediante ngrok.<text:line-break/><text:span text:style-name="T18">· </text:span>Comprobar el funcionamiento local y externo del servicio.</text:p>
      <text:p text:style-name="P39">Objetivos funcionales<text:line-break/><text:span text:style-name="T18">· </text:span>Permitir el almacenamiento centralizado de archivos.<text:line-break/><text:span text:style-name="T18">· </text:span>Facilitar el acceso a la información mediante navegador web.<text:line-break/><text:span text:style-name="T18">· </text:span>Permitir la gestión básica de usuarios y archivos.<text:line-break/><text:span text:style-name="T18">· </text:span>Usar funciones adicionales como calendario, contactos o compartición de documentos.</text:p>
      <text:p text:style-name="P39">Objetivos formativos<text:line-break/><text:span text:style-name="T18">· </text:span>Aplicar conocimientos de administración de sistemas.<text:line-break/><text:span text:style-name="T18">· </text:span>Trabajar con virtualización mediante Proxmox.<text:line-break/><text:span text:style-name="T18">· </text:span>Configurar servicios web seguros.<text:line-break/><text:span text:style-name="T18">· </text:span>Resolver incidencias reales durante el desarrollo del proyecto.</text:p>
      <text:p text:style-name="P39"><text:span text:style-name="T19">Objetivos de documentación<text:line-break/></text:span><text:span text:style-name="T18">· </text:span><text:span text:style-name="T19">Elaborar una memoria clara y ordenada.<text:line-break/></text:span><text:span text:style-name="T18">· </text:span><text:span text:style-name="T19">Justificar las decisiones técnicas tomadas.<text:line-break/></text:span><text:span text:style-name="T18">· </text:span><text:span text:style-name="T19">Documentar pruebas, resultados y limitaciones.<text:line-break/></text:span><text:span text:style-name="T18">· </text:span><text:span text:style-name="T19">Presentar una solución comprensible y defendible académicamente.</text:span></text:p>
      <text:h text:style-name="P36" text:outline-level="3"><text:bookmark-start text:name="__RefHeading___Toc528_193255832"/><text:soft-page-break/>2.1.6 Partes interesadas<text:bookmark-end text:name="__RefHeading___Toc528_193255832"/></text:h>
      <text:p text:style-name="P40">A continuación, se recogen algunos términos utilizados durante el proyecto:</text:p>
      <text:p text:style-name="P40">Nextcloud: Plataforma de nube privada que permite almacenar, compartir y gestionar archivos mediante una interfaz web.</text:p>
      <text:p text:style-name="P40">Proxmox VE: Plataforma de virtualización utilizada para crear y administrar máquinas virtuales.</text:p>
      <text:p text:style-name="P40">Nube privada: Sistema de almacenamiento y servicios cloud gestionado en una infraestructura propia o controlada.</text:p>
      <text:p text:style-name="P40">HTTPS: Protocolo seguro de comunicación web que cifra la información transmitida entre cliente y servidor.</text:p>
      <text:p text:style-name="P40">SSL/TLS: Tecnología utilizada para cifrar conexiones y proteger datos durante la comunicación.</text:p>
      <text:p text:style-name="P40">ngrok: Herramienta que permite crear túneles públicos temporales hacia servicios alojados en una red local.</text:p>
      <text:p text:style-name="P40">Servidor: Equipo físico o virtual encargado de ofrecer servicios a otros dispositivos.</text:p>
      <text:p text:style-name="P40">VM: Máquina virtual. Sistema virtualizado que funciona de forma independiente dentro de un servidor físico.</text:p>
      <text:p text:style-name="P40">MVP: Producto mínimo viable. Versión básica pero funcional de un proyecto.</text:p>
      <text:p text:style-name="P40">IP: Dirección que identifica a un dispositivo dentro de una red.</text:p>
      <text:h text:style-name="P41" text:outline-level="3"><text:bookmark-start text:name="__RefHeading___Toc530_193255832"/>2.1.7 Referencias<text:bookmark-end text:name="__RefHeading___Toc530_193255832"/></text:h>
      <text:p text:style-name="P42">Las partes interesadas son las personas o entidades que intervienen directa o indirectamente en el proyecto.</text:p>
      <text:p text:style-name="P42">Alumno desarrollador<text:line-break/>Es el responsable de diseñar, instalar, configurar, probar y documentar el sistema. También se encarga de resolver las incidencias técnicas que aparecen durante el desarrollo.</text:p>
      <text:p text:style-name="P42">Profesor-tutor<text:line-break/>Supervisa el avance del proyecto, orienta en la toma de decisiones y evalúa tanto la documentación como la defensa final.</text:p>
      <text:p text:style-name="P42">Empresa Infosur<text:line-break/>Representa el entorno empresarial para el que se plantea la solución. El proyecto simula una nube privada que podría ser útil para centralizar archivos y mejorar la organización interna.</text:p>
      <text:p text:style-name="P42">Usuarios finales<text:line-break/>Son los posibles trabajadores o usuarios que accederían a Nextcloud para consultar, subir, descargar o compartir archivos.</text:p>
      <text:p text:style-name="P42">Centro educativo<text:line-break/>Proporciona el marco académico del proyecto, las normas de elaboración y parte de los recursos necesarios para su desarrollo.</text:p>
      <text:h text:style-name="Heading_20_3" text:outline-level="3">2.1.8 Documentación del proyecto</text:h>
      <text:p text:style-name="P43">Para el desarrollo del proyecto se han utilizado diferentes fuentes de información técnica y académica.</text:p>
      <text:p text:style-name="P43">Entre las referencias principales se encuentran:</text:p>
      <text:p text:style-name="P43"><text:span text:style-name="T20">· </text:span>Documentación oficial de Nextcloud.<text:line-break/><text:span text:style-name="T20">· </text:span>Documentación oficial de Proxmox VE.<text:line-break/><text:span text:style-name="T20">· </text:span>Documentación de ngrok.<text:line-break/><text:span text:style-name="T20">· </text:span>Recursos sobre configuración de HTTPS y certificados SSL/TLS.<text:line-break/><text:span text:style-name="T20">· </text:span>Normas del Proyecto Intermodular del ciclo de Sistemas Microinformáticos y Redes.<text:line-break/><text:span text:style-name="T20">· </text:span>Material trabajado durante el ciclo formativo.<text:line-break/><text:span text:style-name="T20">· </text:span>Consultas técnicas realizadas durante la instalación y configuración del sistema.</text:p>
      <text:p text:style-name="P43">Estas referencias han servido para orientar la instalación, resolver incidencias y justificar las decisiones técnicas adoptadas.</text:p>
      <text:h text:style-name="P31" text:outline-level="2" text:is-list-header="true"/>
      <text:h text:style-name="P44" text:outline-level="3">2.1.9. Documentación del proyecto</text:h>
      <text:p text:style-name="P45">La documentación del proyecto tiene como finalidad recoger de forma ordenada todo el proceso realizado, desde la idea inicial hasta las pruebas finales.</text:p>
      <text:p text:style-name="P45">La memoria incluye el estudio de viabilidad, el análisis del sistema, el diseño de la solución, la implementación, las pruebas realizadas y las conclusiones obtenidas.</text:p>
      <text:p text:style-name="P45">También se incorporarán capturas de pantalla, esquemas y evidencias que demuestren el funcionamiento del sistema. Estas capturas se añadirán especialmente en los apartados de implementación y pruebas, donde será necesario demostrar el acceso local, el acceso externo, el uso de HTTPS y el funcionamiento de Nextcloud.</text:p>
      <text:h text:style-name="P33" text:outline-level="2"><text:bookmark-start text:name="__RefHeading___Toc534_193255832"/>2.2 Estudio de la situación actual<text:bookmark-end text:name="__RefHeading___Toc534_193255832"/></text:h>
      <text:h text:style-name="P36" text:outline-level="3"><text:bookmark-start text:name="__RefHeading___Toc536_193255832"/>2.2.1 Contexto<text:bookmark-end text:name="__RefHeading___Toc536_193255832"/></text:h>
      <text:p text:style-name="P46">Actualmente, muchas pequeñas empresas necesitan almacenar y compartir archivos de forma centralizada. En muchos casos, se utilizan servicios externos como Google Drive, OneDrive o Dropbox, que son cómodos, pero implican depender de proveedores externos.</text:p>
      <text:p text:style-name="P46">También puede ocurrir que los documentos estén repartidos entre varios equipos, memorias externas o carpetas locales, lo que dificulta la organización y el control de la información.</text:p>
      <text:p text:style-name="P46">Este proyecto surge como una alternativa basada en una nube privada, permitiendo que la empresa disponga de una plataforma propia de almacenamiento y colaboración. Para ello, se utiliza Nextcloud como solución principal, desplegada sobre Proxmox y accesible mediante navegador web.</text:p>
      <text:h text:style-name="P36" text:outline-level="3"><text:bookmark-start text:name="__RefHeading___Toc538_193255832"/>2.2.2 Lógica del sistema<text:bookmark-end text:name="__RefHeading___Toc538_193255832"/></text:h>
      <text:p text:style-name="P46">La lógica del sistema se basa en una estructura sencilla y funcional.</text:p>
      <text:p text:style-name="P46">El servidor virtualizado en Proxmox aloja el servicio Nextcloud. Los usuarios acceden a la plataforma mediante navegador web para gestionar archivos, compartir información y utilizar funciones adicionales como calendario o contactos.</text:p>
      <text:p text:style-name="P46">El acceso local se realiza mediante la dirección: <text:a xlink:type="simple" xlink:href="https://10.4.0.206/" text:style-name="Internet_20_link" text:visited-style-name="Visited_20_Internet_20_Link">https://10.4.0.206</text:a></text:p>
      <text:p text:style-name="P46">Para permitir el acceso desde fuera de la red local, se utiliza ngrok, que genera una URL pública temporal. Esta URL permite acceder a la interfaz web de Nextcloud desde diferentes ubicaciones.</text:p>
      <text:p text:style-name="P46">El sistema funciona de la siguiente forma:</text:p>
      <text:p text:style-name="P46"><text:span text:style-name="T21">· </text:span>El usuario accede a Nextcloud desde un navegador.<text:line-break/><text:span text:style-name="T21">· </text:span>La conexión se realiza mediante HTTPS.<text:line-break/><text:span text:style-name="T21">· </text:span>Nextcloud muestra la interfaz web.<text:line-break/><text:span text:style-name="T21">· </text:span>El usuario puede gestionar archivos y servicios disponibles.<text:line-break/><text:span text:style-name="T21">· </text:span>Si accede desde fuera de la red local, la conexión se realiza mediante el túnel de ngrok.</text:p>
      <text:h text:style-name="P41" text:outline-level="3"><text:bookmark-start text:name="__RefHeading___Toc540_193255832"/>2.2.3 Descripción física<text:bookmark-end text:name="__RefHeading___Toc540_193255832"/></text:h>
      <text:p text:style-name="P46">La infraestructura física del proyecto se basa en un servidor asignado para la realización del trabajo. Sobre este servidor se utiliza Proxmox, que permite ejecutar el servicio en un entorno virtualizado.</text:p>
      <text:p text:style-name="P46">El alumno no ha tenido que adquirir hardware propio, ya que los recursos han sido proporcionados para el desarrollo del proyecto.</text:p>
      <text:p text:style-name="P46">La estructura física y lógica puede resumirse de la siguiente forma:</text:p>
      <text:p text:style-name="P46"><text:span text:style-name="T21">· </text:span>Servidor físico asignado.<text:line-break/><text:span text:style-name="T21">· </text:span>Entorno de virtualización mediante Proxmox.<text:line-break/><text:span text:style-name="T21">· </text:span>Máquina o servicio donde se aloja Nextcloud.<text:line-break/><text:span text:style-name="T21">· </text:span>Acceso local desde la red del centro.<text:line-break/><text:span text:style-name="T21">· </text:span>Acceso externo mediante ngrok.<text:line-break/><text:span text:style-name="T21">· </text:span>Conexión segura mediante HTTPS.</text:p>
      <text:p text:style-name="P46">Esta estructura permite simular una solución empresarial sin necesidad de utilizar una infraestructura compleja ni realizar una inversión económica.</text:p>
      <text:h text:style-name="P36" text:outline-level="3"><text:bookmark-start text:name="__RefHeading___Toc542_193255832"/>2.2.4 Diagnóstico del sistema actual<text:bookmark-end text:name="__RefHeading___Toc542_193255832"/></text:h>
      <text:p text:style-name="P46">Antes de la implantación de PrivaNube, no se dispone de una solución propia de nube privada dentro del entorno planteado.</text:p>
      <text:p text:style-name="P46">La gestión de archivos puede depender de almacenamiento local, dispositivos externos o plataformas de terceros. Esto puede provocar problemas de organización, falta de control sobre los datos y dificultad para acceder a la información desde diferentes ubicaciones.</text:p>
      <text:p text:style-name="P46">Los principales problemas detectados son:</text:p>
      <text:p text:style-name="P46">Falta de una plataforma centralizada de archivos.<text:line-break/>Dependencia de servicios externos.<text:line-break/>Dificultad para gestionar el acceso a la información.<text:line-break/>Ausencia de una nube privada propia.<text:line-break/>Necesidad de mejorar la seguridad mediante HTTPS.<text:line-break/>Falta de documentación técnica del sistema.</text:p>
      <text:p text:style-name="P46">Por estos motivos, se plantea la implantación de Nextcloud como solución centralizada, accesible y documentada.</text:p>
      <text:h text:style-name="P41" text:outline-level="3"><text:bookmark-start text:name="__RefHeading___Toc544_193255832"/>2.2.5 Normativa y legislación<text:bookmark-end text:name="__RefHeading___Toc544_193255832"/></text:h>
      <text:p text:style-name="P46">El proyecto se desarrolla siguiendo las normas del módulo Proyecto Intermodular del ciclo de Sistemas Microinformáticos y Redes.</text:p>
      <text:p text:style-name="P46">Desde el punto de vista legal, se utilizan herramientas gratuitas o de software libre, evitando el uso de licencias propietarias de pago. Nextcloud y Proxmox son soluciones ampliamente utilizadas en entornos profesionales y permiten crear una infraestructura funcional sin costes de licencia para el proyecto.</text:p>
      <text:p text:style-name="P46">Además, al tratarse de una plataforma donde pueden almacenarse archivos, se tienen en cuenta principios básicos de seguridad y protección de la información, como:</text:p>
      <text:p text:style-name="P46"><text:span text:style-name="T21">· </text:span>Uso de conexiones cifradas mediante HTTPS.<text:line-break/><text:span text:style-name="T21">· </text:span>Gestión controlada de usuarios.<text:line-break/><text:span text:style-name="T21">· </text:span>Protección de credenciales.<text:line-break/><text:span text:style-name="T21">· </text:span>Acceso mediante servicios configurados de forma segura.<text:line-break/><text:span text:style-name="T21">· </text:span>Documentación de las limitaciones y pruebas realizadas.</text:p>
      <text:p text:style-name="P46">En una implantación empresarial real sería necesario aplicar políticas más completas de protección de datos, copias de seguridad y control de accesos.</text:p>
      <text:h text:style-name="P33" text:outline-level="2"><text:bookmark-start text:name="__RefHeading___Toc546_193255832"/>2.3 Requisitos del sistema<text:bookmark-end text:name="__RefHeading___Toc546_193255832"/></text:h>
      <text:h text:style-name="P36" text:outline-level="3"><text:bookmark-start text:name="__RefHeading___Toc548_193255832"/>2.3.1 Requisitos<text:bookmark-end text:name="__RefHeading___Toc548_193255832"/></text:h>
      <text:p text:style-name="P47">Para que el sistema pueda considerarse válido, debe cumplir una serie de requisitos funcionales y técnicos.</text:p>
      <text:p text:style-name="P47">Requisitos funcionales</text:p>
      <text:p text:style-name="P47"><text:span text:style-name="T21">· </text:span>Permitir el acceso a una plataforma de nube privada.<text:line-break/><text:span text:style-name="T21">· </text:span>Permitir subir, descargar y organizar archivos.<text:line-break/><text:span text:style-name="T21">· </text:span>Permitir el acceso mediante navegador web.<text:line-break/><text:span text:style-name="T21">· </text:span>Facilitar la gestión básica de usuarios.<text:line-break/><text:span text:style-name="T21">· </text:span>Permitir el acceso local desde la red del centro.<text:line-break/><text:span text:style-name="T21">· </text:span>Permitir acceso externo a la interfaz web mediante ngrok.<text:line-break/><text:span text:style-name="T21">· </text:span>Ofrecer una interfaz sencilla para el usuario.</text:p>
      <text:p text:style-name="P47">Requisitos técnicos</text:p>
      <text:p text:style-name="P47"><text:span text:style-name="T21">· </text:span>Estar desplegado sobre Proxmox.<text:line-break/><text:span text:style-name="T21">· </text:span>Utilizar Nextcloud como aplicación principal.<text:line-break/><text:span text:style-name="T21">· </text:span>Funcionar mediante HTTPS.<text:line-break/><text:span text:style-name="T21">· </text:span>Disponer de una dirección local funcional.<text:line-break/><text:span text:style-name="T21">· </text:span>Disponer de una URL externa temporal mediante ngrok.<text:line-break/><text:span text:style-name="T21">· </text:span>Mantener una configuración documentada.<text:line-break/><text:span text:style-name="T21">· </text:span>Permitir pruebas desde diferentes equipos y ubicaciones.</text:p>
      <text:h text:style-name="P36" text:outline-level="3"><text:bookmark-start text:name="__RefHeading___Toc550_193255832"/>2.3.2 Restricciones del sistema<text:bookmark-end text:name="__RefHeading___Toc550_193255832"/></text:h>
      <text:p text:style-name="P47">El proyecto presenta varias restricciones propias de un entorno académico.</text:p>
      <text:p text:style-name="P47">Las principales restricciones son:</text:p>
      <text:p text:style-name="P48"><text:span text:style-name="T21">· </text:span><text:span text:style-name="T22">El servidor utilizado ha sido asignado para el proyecto.<text:line-break/></text:span><text:span text:style-name="T21">· </text:span><text:span text:style-name="T22">El almacenamiento disponible depende de los recursos asignados.<text:line-break/></text:span><text:span text:style-name="T21">· </text:span><text:span text:style-name="T22">No se ha contratado un dominio propio definitivo.<text:line-break/></text:span><text:span text:style-name="T21">· </text:span><text:span text:style-name="T22">El acceso externo se realiza mediante una URL temporal de ngrok.<text:line-break/></text:span><text:span text:style-name="T21">· </text:span><text:span text:style-name="T22">El cliente Nextcloud Desktop no funciona correctamente usando el dominio externo.<text:line-break/></text:span><text:span text:style-name="T21">· </text:span><text:span text:style-name="T22">El entorno no está preparado como sistema empresarial en producción.<text:line-break/></text:span><text:span text:style-name="T21">· </text:span><text:span text:style-name="T22">No se dispone de alta disponibilidad ni redundancia.<text:line-break/></text:span><text:span text:style-name="T21">· </text:span><text:span text:style-name="T22">El tiempo de desarrollo está limitado por el calendario académico.</text:span></text:p>
      <text:p text:style-name="P47">Estas restricciones no impiden validar el objetivo principal del proyecto, ya que la interfaz web de Nextcloud funciona correctamente tanto localmente como desde el exterior mediante ngrok.</text:p>
      <text:h text:style-name="P41" text:outline-level="3"><text:bookmark-start text:name="__RefHeading___Toc552_193255832"/>2.3.3 Catalogación y priorización de los requisitos<text:bookmark-end text:name="__RefHeading___Toc552_193255832"/></text:h>
      <text:p text:style-name="P47">Los requisitos se priorizan según su importancia dentro del proyecto.</text:p>
      <text:p text:style-name="P47">Requisitos de prioridad alta</text:p>
      <text:p text:style-name="P47"><text:span text:style-name="T21">· </text:span>Instalación y funcionamiento de Nextcloud.<text:line-break/><text:span text:style-name="T21">· </text:span>Acceso local mediante https://10.4.0.206.<text:line-break/><text:span text:style-name="T21">· </text:span>Configuración de HTTPS.<text:line-break/><text:span text:style-name="T21">· </text:span>Acceso externo a la interfaz web mediante ngrok.<text:line-break/><text:span text:style-name="T21">· </text:span>Funcionamiento básico de subida, descarga y gestión de archivos.<text:line-break/><text:span text:style-name="T21">· </text:span>Documentación del proceso.</text:p>
      <text:p text:style-name="P47">Requisitos de prioridad media</text:p>
      <text:p text:style-name="P47"><text:span text:style-name="T21">· </text:span>Configuración de usuarios.<text:line-break/><text:span text:style-name="T21">· </text:span>Uso de funciones adicionales como calendario o contactos.<text:line-break/><text:span text:style-name="T21">· </text:span>Organización de archivos y carpetas.<text:line-break/><text:span text:style-name="T21">· </text:span>Validación desde diferentes dispositivos.<text:line-break/><text:span text:style-name="T21">· </text:span>Mejora de la seguridad básica del sistema.</text:p>
      <text:p text:style-name="P47">Requisitos de prioridad baja</text:p>
      <text:p text:style-name="P47"><text:span text:style-name="T21">· </text:span>Dominio propio definitivo.<text:line-break/><text:span text:style-name="T21">· </text:span>Copias de seguridad avanzadas.<text:line-break/><text:span text:style-name="T21">· </text:span>Alta disponibilidad.<text:line-break/><text:span text:style-name="T21">· </text:span>Integración con otros servicios empresariales.<text:line-break/><text:span text:style-name="T21">· </text:span>Funcionamiento completo del cliente Nextcloud Desktop mediante acceso externo.</text:p>
      <text:p text:style-name="P47">Esta priorización permite centrar el proyecto en el funcionamiento principal de la nube privada, dejando las ampliaciones más complejas para mejoras futuras.</text:p>
      <text:h text:style-name="P49" text:outline-level="2" text:is-list-header="true"/>
      <text:h text:style-name="P50" text:outline-level="2"><text:bookmark-start text:name="__RefHeading___Toc554_193255832"/>2.4 Alternativas y selección de la solución<text:bookmark-end text:name="__RefHeading___Toc554_193255832"/></text:h>
      <text:h text:style-name="P36" text:outline-level="3"><text:bookmark-start text:name="__RefHeading___Toc556_193255832"/>2.4.1 Alternativa 1: Servicios externos en la nube<text:bookmark-end text:name="__RefHeading___Toc556_193255832"/></text:h>
      <text:p text:style-name="P48">Durante el diseño del proyecto se han considerado varias alternativas.</text:p>
      <text:p text:style-name="P48">Servicios externos de almacenamiento</text:p>
      <text:p text:style-name="P48">Una opción sería utilizar plataformas como Google Drive, OneDrive o Dropbox. Estas soluciones son fáciles de usar, pero implican depender de proveedores externos y ofrecen menos control sobre la infraestructura.</text:p>
      <text:p text:style-name="P48">Servidor de archivos tradicional</text:p>
      <text:p text:style-name="P48">Otra alternativa sería utilizar un servidor de archivos compartido dentro de la red local. Esta opción permite centralizar documentos, pero ofrece menos flexibilidad y menos funciones colaborativas que una nube privada.</text:p>
      <text:p text:style-name="P48">Nube privada con Nextcloud</text:p>
      <text:p text:style-name="P48">La alternativa seleccionada es implantar una nube privada mediante Nextcloud. Esta solución permite gestionar archivos desde navegador, crear usuarios, compartir documentos y ampliar funcionalidades mediante aplicaciones adicionales.</text:p>
      <text:p text:style-name="P48">Además, al desplegarse sobre Proxmox, se aprovecha una infraestructura virtualizada que facilita la administración y futuras ampliaciones.</text:p>
      <text:h text:style-name="P36" text:outline-level="3"><text:bookmark-start text:name="__RefHeading___Toc558_193255832"/>2.4.2 Alternativa 2: Nube privada con Nextcloud<text:bookmark-end text:name="__RefHeading___Toc558_193255832"/></text:h>
      <text:p text:style-name="P51">Se ha seleccionado Nextcloud sobre Proxmox como solución principal del proyecto.</text:p>
      <text:p text:style-name="P51">Esta elección se justifica por varios motivos:</text:p>
      <text:p text:style-name="P51"><text:span text:style-name="T21">· </text:span>Permite crear una nube privada funcional.<text:line-break/><text:span text:style-name="T21">· </text:span>Ofrece mayor control sobre los datos.<text:line-break/><text:span text:style-name="T21">· </text:span>Utiliza software libre.<text:line-break/><text:span text:style-name="T21">· </text:span>Puede desplegarse sobre infraestructura virtualizada.<text:line-break/><text:span text:style-name="T21">· </text:span>Permite acceso mediante navegador web.<text:line-break/><text:span text:style-name="T21">· </text:span>Puede ampliarse con aplicaciones adicionales.<text:line-break/><text:span text:style-name="T21">· </text:span>Permite simular una solución realista para una pequeña empresa.</text:p>
      <text:p text:style-name="P48"><text:span text:style-name="T23">Además, el uso de ngrok permite validar el acceso externo sin necesidad de contratar un dominio de pago, lo que resulta adecuado para un entorno académico.</text:span></text:p>
      <text:h text:style-name="P33" text:outline-level="2"><text:bookmark-start text:name="__RefHeading___Toc562_193255832"/>2.5 Planificación del proyecto<text:bookmark-end text:name="__RefHeading___Toc562_193255832"/></text:h>
      <text:h text:style-name="P36" text:outline-level="3"><text:bookmark-start text:name="__RefHeading___Toc564_193255832"/>2.5.1 <text:span text:style-name="T21">Organización y fases del proyecto</text:span><text:bookmark-end text:name="__RefHeading___Toc564_193255832"/></text:h>
      <text:p text:style-name="P52">2.5.1. Organización y fases del proyecto</text:p>
      <text:p text:style-name="P52">El proyecto se ha organizado en diferentes fases para facilitar su desarrollo.</text:p>
      <text:p text:style-name="P52">Fase 1 – Análisis inicial</text:p>
      <text:p text:style-name="P52">Se estudia la necesidad de implantar una nube privada para centralizar archivos y mejorar el acceso a la información.</text:p>
      <text:p text:style-name="P52">Fase 2 – Diseño de la solución</text:p>
      <text:p text:style-name="P52">Se decide utilizar Nextcloud como plataforma principal y Proxmox como entorno de virtualización.</text:p>
      <text:p text:style-name="P52">Fase 3 – Preparación del entorno</text:p>
      <text:p text:style-name="P52">Se prepara el servidor virtualizado y se asignan los recursos necesarios para alojar el servicio.</text:p>
      <text:p text:style-name="P52">Fase 4 – Instalación y configuración</text:p>
      <text:p text:style-name="P52">Se instala y configura Nextcloud, se habilita HTTPS y se comprueba el acceso local.</text:p>
      <text:p text:style-name="P52">Fase 5 – Acceso externo</text:p>
      <text:p text:style-name="P52">Se configura ngrok para validar el acceso externo a la interfaz web de Nextcloud.</text:p>
      <text:p text:style-name="P52">Fase 6 – Pruebas</text:p>
      <text:p text:style-name="P52">Se realizan pruebas de acceso local, acceso externo, funcionamiento web y limitaciones del cliente de escritorio.</text:p>
      <text:p text:style-name="P52">Fase 7 – Documentación final</text:p>
      <text:p text:style-name="P48"><text:span text:style-name="T24">Se redacta la memoria del proyecto, incluyendo análisis, diseño, implementación, pruebas, conclusiones y posibles mejoras.</text:span></text:p>
      <text:h text:style-name="P41" text:outline-level="3"><text:bookmark-start text:name="__RefHeading___Toc566_193255832"/>2.5.2 <text:span text:style-name="T25">Metodología de trabajo</text:span><text:bookmark-end text:name="__RefHeading___Toc566_193255832"/></text:h>
      <text:p text:style-name="P53">La metodología utilizada ha sido progresiva y práctica.</text:p>
      <text:p text:style-name="P53">El trabajo se ha dividido en fases pequeñas, validando cada avance antes de continuar con el siguiente. Esto permite detectar errores de forma más sencilla y evitar que un fallo afecte a todo el sistema.</text:p>
      <text:p text:style-name="P53">Durante el desarrollo se han realizado comprobaciones continuas, especialmente en los apartados relacionados con el acceso al servicio, HTTPS y conexión externa mediante ngrok.</text:p>
      <text:p text:style-name="P53">Esta metodología resulta adecuada para un proyecto individual, ya que permite organizar el trabajo de forma clara y adaptarse a las incidencias que aparecen durante la implementación.</text:p>
      <text:h text:style-name="Heading_20_3" text:outline-level="3">2.5.3 <text:span text:style-name="T25">Herramientas de planificación</text:span></text:h>
      <text:p text:style-name="P54">Para organizar el proyecto se han utilizado herramientas de apoyo y documentación.</text:p>
      <text:p text:style-name="P54">Entre ellas se incluyen:</text:p>
      <text:p text:style-name="P54"><text:span text:style-name="T25">· </text:span>Documentación técnica del proyecto.<text:line-break/><text:span text:style-name="T25">· </text:span>Capturas de pantalla como evidencias.<text:line-break/><text:span text:style-name="T25">· </text:span>Notas de seguimiento del proceso.<text:line-break/><text:span text:style-name="T25">· </text:span>Pruebas realizadas durante la configuración.<text:line-break/><text:span text:style-name="T25">· </text:span>Recursos oficiales de Nextcloud, Proxmox y ngrok.</text:p>
      <text:p text:style-name="P54">Estas herramientas permiten mantener un control del avance del proyecto y facilitan la elaboración de la memoria final.</text:p>
      <text:h text:style-name="P33" text:outline-level="2"><text:bookmark-start text:name="__RefHeading___Toc570_193255832"/>2.6 Evaluación de riesgos<text:bookmark-end text:name="__RefHeading___Toc570_193255832"/></text:h>
      <text:h text:style-name="P36" text:outline-level="3"><text:bookmark-start text:name="__RefHeading___Toc572_193255832"/>2.6.1 Lista de riesgos<text:bookmark-end text:name="__RefHeading___Toc572_193255832"/></text:h>
      <text:p text:style-name="P55">Durante el desarrollo del proyecto se han identificado varios riesgos que podrían afectar al funcionamiento del sistema.</text:p>
      <text:p text:style-name="P55">Los principales riesgos son:</text:p>
      <text:p text:style-name="P55"><text:span text:style-name="T25">· </text:span>Fallos de acceso al servidor.<text:line-break/><text:span text:style-name="T25">· </text:span>Problemas con la configuración HTTPS.<text:line-break/><text:span text:style-name="T25">· </text:span>Errores en la instalación o configuración de Nextcloud.<text:line-break/><text:span text:style-name="T25">· </text:span>Dependencia de la URL temporal generada por ngrok.<text:line-break/><text:span text:style-name="T25">· </text:span>Cambios en la red del centro.<text:line-break/><text:span text:style-name="T25">· </text:span>Problemas con el cliente Nextcloud Desktop.<text:line-break/><text:span text:style-name="T25">· </text:span>Pérdida de configuración si no se realizan copias de seguridad.<text:line-break/><text:span text:style-name="T25">· </text:span>Limitaciones de recursos asignados al servidor.</text:p>
      <text:h text:style-name="P36" text:outline-level="3"><text:bookmark-start text:name="__RefHeading___Toc574_193255832"/>2.6.2 Catalogación de riesgos<text:bookmark-end text:name="__RefHeading___Toc574_193255832"/></text:h>
      <text:p text:style-name="P56">Los riesgos se clasifican según su impacto en el proyecto.</text:p>
      <text:p text:style-name="P56">Riesgos críticos</text:p>
      <text:p text:style-name="P56"><text:span text:style-name="T25">· </text:span>Caída del servidor donde se aloja Nextcloud.<text:line-break/><text:span text:style-name="T25">· </text:span>Pérdida de configuración del sistema.<text:line-break/><text:span text:style-name="T25">· </text:span>Fallo completo del acceso a la plataforma.</text:p>
      <text:p text:style-name="P56">Riesgos medios</text:p>
      <text:p text:style-name="P56">Problemas con HTTPS.<text:line-break/><text:span text:style-name="T25">· </text:span>Cambios en la URL de ngrok.<text:line-break/><text:span text:style-name="T25">· </text:span>Fallos en el acceso externo.<text:line-break/><text:span text:style-name="T25">· </text:span>Limitaciones del cliente Nextcloud Desktop.</text:p>
      <text:p text:style-name="P56">Riesgos bajos</text:p>
      <text:p text:style-name="P56"><text:span text:style-name="T25">· </text:span>Errores menores de configuración.<text:line-break/><text:span text:style-name="T25">· </text:span>Problemas puntuales de acceso desde algún equipo.<text:line-break/><text:span text:style-name="T25">· </text:span>Ajustes visuales o de organización dentro de Nextcloud.</text:p>
      <text:p text:style-name="P56">Esta clasificación permite identificar qué problemas deben tener mayor prioridad durante el desarrollo y las pruebas.</text:p>
      <text:h text:style-name="P41" text:outline-level="3"><text:bookmark-start text:name="__RefHeading___Toc576_193255832"/>2.6.3 Plan de contingencia<text:bookmark-end text:name="__RefHeading___Toc576_193255832"/></text:h>
      <text:p text:style-name="P57">Para reducir el impacto de los riesgos detectados, se plantean diferentes medidas de prevención.</text:p>
      <text:p text:style-name="P57">Las principales medidas son:</text:p>
      <text:p text:style-name="P57"><text:span text:style-name="T25">· </text:span>Validar cada cambio importante antes de continuar.<text:line-break/><text:span text:style-name="T25">· </text:span>Documentar la configuración aplicada.<text:line-break/><text:span text:style-name="T25">· </text:span>Realizar capturas de los hitos importantes.<text:line-break/><text:span text:style-name="T25">· </text:span>Mantener diferenciados el acceso local y el acceso externo.<text:line-break/><text:span text:style-name="T25">· </text:span>Utilizar HTTPS para proteger las conexiones.<text:line-break/><text:span text:style-name="T25">· </text:span>Identificar claramente las limitaciones del cliente Nextcloud Desktop.<text:line-break/><text:span text:style-name="T25">· </text:span>Plantear copias de seguridad como mejora necesaria para un entorno real.</text:p>
      <text:p text:style-name="P57">Estas medidas permiten mantener el proyecto controlado y facilitar la recuperación ante posibles incidencias.</text:p>
      <text:h text:style-name="P33" text:outline-level="2"><text:bookmark-start text:name="__RefHeading___Toc578_193255832"/>2.7 Presupuesto<text:bookmark-end text:name="__RefHeading___Toc578_193255832"/></text:h>
      <text:h text:style-name="P36" text:outline-level="3"><text:bookmark-start text:name="__RefHeading___Toc580_193255832"/>2.7.1 Estimación de coste material<text:bookmark-end text:name="__RefHeading___Toc580_193255832"/></text:h>
      <text:p text:style-name="P58">2.7.1. Estimación de coste material</text:p>
      <text:p text:style-name="P58">El proyecto no ha generado coste económico directo para el alumno, ya que los recursos principales han sido asignados por el centro educativo.</text:p>
      <text:p text:style-name="P58">Los costes reales del proyecto son:</text:p>
      <table:table table:name="Tabla1" table:style-name="Tabla1">
        <table:table-column table:style-name="Tabla1.A" table:number-columns-repeated="2"/>
        <table:table-row table:style-name="Tabla1.1">
          <table:table-cell table:style-name="Tabla1.A1" office:value-type="string">
            <text:p text:style-name="P59">Recursos</text:p>
          </table:table-cell>
          <table:table-cell table:style-name="Tabla1.B1" office:value-type="string">
            <text:p text:style-name="P60">Coste</text:p>
          </table:table-cell>
        </table:table-row>
        <table:table-row>
          <table:table-cell table:style-name="Tabla1.A2" office:value-type="string">
            <text:p text:style-name="Table_20_Contents">Servidor asignado en Proxmox </text:p>
          </table:table-cell>
          <table:table-cell table:style-name="Tabla1.B2" office:value-type="string">
            <text:p text:style-name="P61">0 € </text:p>
          </table:table-cell>
        </table:table-row>
        <table:table-row>
          <table:table-cell table:style-name="Tabla1.A2" office:value-type="string">
            <text:p text:style-name="Table_20_Contents">Almacenamiento asignado </text:p>
          </table:table-cell>
          <table:table-cell table:style-name="Tabla1.B2" office:value-type="string">
            <text:p text:style-name="P61">0 € </text:p>
          </table:table-cell>
        </table:table-row>
        <table:table-row>
          <table:table-cell table:style-name="Tabla1.A2" office:value-type="string">
            <text:p text:style-name="Table_20_Contents">Nextcloud </text:p>
          </table:table-cell>
          <table:table-cell table:style-name="Tabla1.B2" office:value-type="string">
            <text:p text:style-name="P61">0 € </text:p>
          </table:table-cell>
        </table:table-row>
        <table:table-row>
          <table:table-cell table:style-name="Tabla1.A2" office:value-type="string">
            <text:p text:style-name="Table_20_Contents">Proxmox </text:p>
          </table:table-cell>
          <table:table-cell table:style-name="Tabla1.B2" office:value-type="string">
            <text:p text:style-name="P61">0 € </text:p>
          </table:table-cell>
        </table:table-row>
        <table:table-row>
          <table:table-cell table:style-name="Tabla1.A2" office:value-type="string">
            <text:p text:style-name="Table_20_Contents">ngrok </text:p>
          </table:table-cell>
          <table:table-cell table:style-name="Tabla1.B2" office:value-type="string">
            <text:p text:style-name="P61">0 € </text:p>
          </table:table-cell>
        </table:table-row>
        <table:table-row>
          <table:table-cell table:style-name="Tabla1.A2" office:value-type="string">
            <text:p text:style-name="Table_20_Contents">Certificado SSL/TLS </text:p>
          </table:table-cell>
          <table:table-cell table:style-name="Tabla1.B2" office:value-type="string">
            <text:p text:style-name="P61">0 € </text:p>
          </table:table-cell>
        </table:table-row>
      </table:table>
      <text:p text:style-name="P58"/>
      <text:p text:style-name="P58">Coste material real: 0 €</text:p>
      <text:p text:style-name="P58">En un entorno empresarial real, sí habría que tener en cuenta costes como servidor, almacenamiento, dominio, copias de seguridad, consumo eléctrico y mantenimiento.</text:p>
      <text:h text:style-name="P41" text:outline-level="3"><text:bookmark-start text:name="__RefHeading___Toc582_193255832"/>2.7.2 Estimación de coste personal<text:bookmark-end text:name="__RefHeading___Toc582_193255832"/></text:h>
      <text:p text:style-name="P62">Aunque el proyecto no ha supuesto un coste económico en mano de obra, se puede estimar el tiempo invertido como si se tratara de un trabajo profesional.</text:p>
      <text:p text:style-name="P62">Estimación aproximada:</text:p>
      <table:table table:name="Tabla2" table:style-name="Tabla2">
        <table:table-column table:style-name="Tabla2.A"/>
        <table:table-column table:style-name="Tabla2.B"/>
        <table:table-header-rows>
          <table:table-row>
            <table:table-cell table:style-name="Tabla2.A1" office:value-type="string">
              <text:p text:style-name="Table_20_Heading">Tarea</text:p>
            </table:table-cell>
            <table:table-cell table:style-name="Tabla2.A1" office:value-type="string">
              <text:p text:style-name="Table_20_Heading">Horas estimadas</text:p>
            </table:table-cell>
          </table:table-row>
        </table:table-header-rows>
        <table:table-row>
          <table:table-cell table:style-name="Tabla2.A1" office:value-type="string">
            <text:p text:style-name="Table_20_Contents">Análisis y planificación</text:p>
          </table:table-cell>
          <table:table-cell table:style-name="Tabla2.A1" office:value-type="string">
            <text:p text:style-name="P61">10 h</text:p>
          </table:table-cell>
        </table:table-row>
        <table:table-row>
          <table:table-cell table:style-name="Tabla2.A1" office:value-type="string">
            <text:p text:style-name="Table_20_Contents">Diseño de la solución</text:p>
          </table:table-cell>
          <table:table-cell table:style-name="Tabla2.A1" office:value-type="string">
            <text:p text:style-name="P61">10 h</text:p>
          </table:table-cell>
        </table:table-row>
        <table:table-row>
          <table:table-cell table:style-name="Tabla2.A1" office:value-type="string">
            <text:p text:style-name="Table_20_Contents">Instalación y configuración</text:p>
          </table:table-cell>
          <table:table-cell table:style-name="Tabla2.A1" office:value-type="string">
            <text:p text:style-name="P61">25 h</text:p>
          </table:table-cell>
        </table:table-row>
        <table:table-row>
          <table:table-cell table:style-name="Tabla2.A1" office:value-type="string">
            <text:p text:style-name="Table_20_Contents">Pruebas y correcciones</text:p>
          </table:table-cell>
          <table:table-cell table:style-name="Tabla2.A1" office:value-type="string">
            <text:p text:style-name="P61">15 h</text:p>
          </table:table-cell>
        </table:table-row>
        <table:table-row>
          <table:table-cell table:style-name="Tabla2.A1" office:value-type="string">
            <text:p text:style-name="Table_20_Contents">Documentación</text:p>
          </table:table-cell>
          <table:table-cell table:style-name="Tabla2.A1" office:value-type="string">
            <text:p text:style-name="P61">20 h</text:p>
          </table:table-cell>
        </table:table-row>
      </table:table>
      <text:p text:style-name="P62"><text:span text:style-name="Strong_20_Emphasis">Total estimado: 80 horas</text:span></text:p>
      <text:p text:style-name="P62">Si se valorase el trabajo a <text:span text:style-name="Strong_20_Emphasis">15 €/hora</text:span>, el coste personal estimado sería:</text:p>
      <text:p text:style-name="P62"><text:span text:style-name="Strong_20_Emphasis">80 h x 15 €/h = 1.200 €</text:span></text:p>
      <text:p text:style-name="P62">Este coste no ha sido pagado, pero sirve para valorar el esfuerzo técnico invertido en el proyecto.</text:p>
      <text:h text:style-name="P36" text:outline-level="3" text:is-list-header="true"><text:bookmark-start text:name="__RefHeading___Toc584_193255832"/>2.7.3 Resumen y análisis coste-beneficio<text:bookmark-end text:name="__RefHeading___Toc584_193255832"/></text:h>
      <text:p text:style-name="P63">Desde el punto de vista económico, el proyecto presenta una relación coste-beneficio positiva.</text:p>
      <text:p text:style-name="P63">El coste real para el alumno ha sido de 0 €, ya que se han utilizado recursos asignados y herramientas gratuitas. A cambio, se ha conseguido implantar una solución funcional de nube privada, accesible localmente y desde el exterior mediante ngrok.</text:p>
      <text:p text:style-name="P63">Los principales beneficios obtenidos son:</text:p>
      <text:p text:style-name="P57"><text:span text:style-name="T25">· </text:span><text:span text:style-name="T26">Implantación de una nube privada funcional.<text:line-break/></text:span><text:span text:style-name="T25">· </text:span><text:span text:style-name="T26">Uso de software libre.<text:line-break/></text:span><text:span text:style-name="T25">· </text:span><text:span text:style-name="T26">Aprovechamiento de infraestructura virtualizada.<text:line-break/></text:span><text:span text:style-name="T25">· </text:span><text:span text:style-name="T26">Acceso seguro mediante HTTPS.<text:line-break/></text:span><text:span text:style-name="T25">· </text:span><text:span text:style-name="T26">Validación externa mediante ngrok.<text:line-break/></text:span><text:span text:style-name="T25">· </text:span><text:span text:style-name="T26">Aplicación práctica de conocimientos de sistemas y redes.</text:span></text:p>
      <text:p text:style-name="P63">En conclusión, el proyecto es económicamente viable y ofrece un alto valor formativo y técnico.</text:p>
      <text:h text:style-name="P33" text:outline-level="2"><text:bookmark-start text:name="__RefHeading___Toc586_193255832"/>2.8 Conclusiones<text:bookmark-end text:name="__RefHeading___Toc586_193255832"/></text:h>
      <text:h text:style-name="P36" text:outline-level="3"><text:bookmark-start text:name="__RefHeading___Toc588_193255832"/>2.8.1 Beneficios<text:bookmark-end text:name="__RefHeading___Toc588_193255832"/></text:h>
      <text:p text:style-name="P64">Tras analizar la viabilidad del proyecto, se concluye que PrivaNube aporta varios beneficios importantes.</text:p>
      <text:p text:style-name="P64">En primer lugar, permite disponer de una plataforma de nube privada basada en Nextcloud, útil para centralizar archivos y facilitar el acceso a la información.</text:p>
      <text:p text:style-name="P64">También permite trabajar con tecnologías reales utilizadas en entornos profesionales, como Proxmox, HTTPS y servicios web. Esto aporta valor formativo, ya que el proyecto no se limita a una explicación teórica, sino que se basa en una implantación funcional.</text:p>
      <text:p text:style-name="P64">Los principales beneficios son:</text:p>
      <text:p text:style-name="P64"><text:span text:style-name="T27">· </text:span>Centralización del almacenamiento.<text:line-break/><text:span text:style-name="T27">· </text:span>Acceso mediante navegador web.<text:line-break/><text:span text:style-name="T27">· </text:span>Uso de software libre.<text:line-break/><text:span text:style-name="T27">· </text:span>Coste económico directo nulo.<text:line-break/><text:span text:style-name="T27">· </text:span>Acceso seguro mediante HTTPS.<text:line-break/><text:span text:style-name="T27">· </text:span>Acceso externo validado mediante ngrok.<text:line-break/><text:span text:style-name="T27">· </text:span>Posibilidad de ampliación futura.<text:line-break/><text:span text:style-name="T27">· </text:span>Aplicación práctica de conocimientos del ciclo.</text:p>
      <text:p text:style-name="P64">Por estos motivos, el proyecto resulta viable y adecuado para el contexto del Proyecto Intermodular.</text:p>
      <text:h text:style-name="P41" text:outline-level="3"><text:bookmark-start text:name="__RefHeading___Toc590_193255832"/>2.8.2 Inconvenientes<text:bookmark-end text:name="__RefHeading___Toc590_193255832"/></text:h>
      <text:p text:style-name="P64">A pesar de sus beneficios, el proyecto también presenta algunas limitaciones.</text:p>
      <text:p text:style-name="P64">La principal limitación es que el acceso externo se realiza mediante ngrok, que proporciona una URL temporal y no un dominio empresarial definitivo. Esto es suficiente para una demostración académica, pero no sería lo más adecuado para una empresa en producción.</text:p>
      <text:p text:style-name="P64">También se ha detectado una limitación con el cliente Nextcloud Desktop. La interfaz web funciona correctamente desde el exterior mediante:</text:p>
      <text:p text:style-name="P64"><text:a xlink:type="simple" xlink:href="https://backache-aneurism-marsupial.ngrok-free.dev/" text:style-name="Internet_20_link" text:visited-style-name="Visited_20_Internet_20_Link">https://backache-aneurism-marsupial.ngrok-free.dev</text:a></text:p>
      <text:p text:style-name="P64">Sin embargo, el cliente de escritorio no funciona correctamente utilizando esa URL externa, por lo que se valida mediante la dirección local:</text:p>
      <text:p text:style-name="P64"><text:a xlink:type="simple" xlink:href="https://10.4.0.206/" text:style-name="Internet_20_link" text:visited-style-name="Visited_20_Internet_20_Link">https://10.4.0.206</text:a></text:p>
      <text:p text:style-name="P64">Otros inconvenientes son:</text:p>
      <text:p text:style-name="P64">Dependencia de los recursos asignados.<text:line-break/>Falta de dominio propio definitivo.<text:line-break/>Ausencia de alta disponibilidad.<text:line-break/>Necesidad de mejorar copias de seguridad en una implantación real.<text:line-break/>Dependencia del entorno de red donde está alojado el servidor.</text:p>
      <text:p text:style-name="P64">Estas limitaciones no impiden cumplir el objetivo principal del proyecto, ya que la nube privada funciona correctamente mediante acceso web y queda validada tanto localmente como desde el exterior.</text:p>
      <text:h text:style-name="P65" text:outline-level="1">3. ANÁLISIS</text:h>
      <text:h text:style-name="Heading_20_2" text:outline-level="2">3.1. Introducción</text:h>
      <text:p text:style-name="P66">El análisis del sistema tiene como objetivo definir de forma clara cómo debe funcionar la solución desarrollada en el proyecto PrivaNube, identificando los usuarios que intervienen, los requisitos que debe cumplir el sistema y la lógica general de funcionamiento.</text:p>
      <text:p text:style-name="P66">Este proyecto se basa en la implantación de una nube privada mediante Nextcloud, desplegada sobre un entorno virtualizado en Proxmox. La finalidad principal es ofrecer a la empresa Infosur una plataforma centralizada para almacenar, gestionar y acceder a archivos de forma segura.</text:p>
      <text:p text:style-name="P66">A diferencia de una solución de almacenamiento local tradicional, el sistema permite acceder a la información desde un navegador web, tanto dentro de la red local como desde el exterior mediante una URL pública generada con ngrok. Además, el acceso se realiza mediante HTTPS, mejorando la seguridad de las conexiones.</text:p>
      <text:p text:style-name="P66">El análisis se centra en describir qué debe permitir el sistema, cómo interactúan los usuarios con la plataforma y cuáles son las condiciones técnicas necesarias para que la solución sea funcional.</text:p>
      <text:h text:style-name="Heading_20_2" text:outline-level="2">3.2. Requisitos funcionales de usuarios</text:h>
      <text:p text:style-name="P66">Los requisitos funcionales describen las acciones que pueden realizar los usuarios dentro del sistema. En este proyecto se identifican principalmente dos perfiles: el usuario final y el administrador del sistema.</text:p>
      <text:p text:style-name="P66">El usuario final utiliza Nextcloud para acceder a sus archivos y servicios asociados, mientras que el administrador se encarga de gestionar la plataforma, los usuarios, la configuración y el correcto funcionamiento del servicio.</text:p>
      <text:h text:style-name="P44" text:outline-level="3">3.2.1. Usuario final</text:h>
      <text:p text:style-name="P67">El usuario final es la persona que accede a Nextcloud para trabajar con los archivos almacenados en la nube privada.</text:p>
      <text:p text:style-name="P67">Desde la plataforma, el usuario puede realizar las siguientes acciones:</text:p>
      <text:p text:style-name="P67"><text:span text:style-name="T28">· </text:span>Acceder a Nextcloud mediante navegador web.<text:line-break/><text:span text:style-name="T28">· </text:span>Iniciar sesión con sus credenciales.<text:line-break/><text:span text:style-name="T28">· </text:span>Subir archivos a la plataforma.<text:line-break/><text:span text:style-name="T28">· </text:span>Descargar documentos almacenados.<text:line-break/><text:span text:style-name="T28">· </text:span>Crear carpetas para organizar la información.<text:line-break/><text:span text:style-name="T28">· </text:span>Consultar archivos desde diferentes equipos.<text:line-break/><text:span text:style-name="T28">· </text:span>Compartir documentos con otros usuarios.<text:line-break/><text:span text:style-name="T28">· </text:span>Utilizar funciones adicionales como calendario o contactos, si están habilitadas.</text:p>
      <text:p text:style-name="P67">El acceso principal se realiza desde la interfaz web de Nextcloud. Dentro de la red local, el servicio está disponible mediante:</text:p>
      <text:p text:style-name="P67"><text:a xlink:type="simple" xlink:href="https://10.4.0.206/" text:style-name="Internet_20_link" text:visited-style-name="Visited_20_Internet_20_Link">https://10.4.0.206</text:a></text:p>
      <text:p text:style-name="P67">Además, la interfaz web también puede abrirse desde el exterior mediante la URL pública generada con ngrok:</text:p>
      <text:p text:style-name="P67"><text:a xlink:type="simple" xlink:href="https://backache-aneurism-marsupial.ngrok-free.dev/" text:style-name="Internet_20_link" text:visited-style-name="Visited_20_Internet_20_Link">https://backache-aneurism-marsupial.ngrok-free.dev</text:a></text:p>
      <text:p text:style-name="P67">Esto permite que el usuario pueda acceder al servicio desde diferentes ubicaciones sin depender únicamente de la red interna.</text:p>
      <text:h text:style-name="P68" text:outline-level="3">3.2.2. Administrador del sistema</text:h>
      <text:p text:style-name="P67">El administrador del sistema es el responsable de configurar, mantener y supervisar el entorno de Nextcloud.</text:p>
      <text:p text:style-name="P67">Sus funciones principales son:</text:p>
      <text:p text:style-name="P67"><text:span text:style-name="T28">· </text:span>Acceder al panel de administración de Nextcloud.<text:line-break/><text:span text:style-name="T28">· </text:span>Crear y gestionar usuarios.<text:line-break/><text:span text:style-name="T28">· </text:span>Revisar el estado general del sistema.<text:line-break/><text:span text:style-name="T28">· </text:span>Configurar aplicaciones y servicios internos.<text:line-break/><text:span text:style-name="T28">· </text:span>Controlar el almacenamiento disponible.<text:line-break/><text:span text:style-name="T28">· </text:span>Gestionar permisos y accesos.</text:p>
      <text:p text:style-name="P67"><text:span text:style-name="T28">· </text:span>Comprobar el funcionamiento del acceso local y externo.<text:line-break/><text:span text:style-name="T28">· </text:span>Supervisar la configuración HTTPS.<text:line-break/><text:span text:style-name="T28">· </text:span>Resolver incidencias relacionadas con la conexión o el servicio.</text:p>
      <text:p text:style-name="P67">Además, el administrador también debe controlar el entorno de virtualización en Proxmox, ya que Nextcloud se encuentra alojado sobre una infraestructura virtualizada. Desde Proxmox se puede revisar el estado del servidor, los recursos asignados y el funcionamiento general de la máquina donde se ejecuta el servicio.</text:p>
      <text:h text:style-name="P44" text:outline-level="3">3.2.3. Comportamiento del sistema</text:h>
      <text:p text:style-name="P67">El sistema debe permitir que los usuarios accedan a la nube privada de forma sencilla y segura.</text:p>
      <text:p text:style-name="P67">El funcionamiento general es el siguiente:</text:p>
      <text:p text:style-name="P67"><text:span text:style-name="T28">· </text:span>El usuario introduce la dirección de acceso en el navegador.<text:line-break/><text:span text:style-name="T28">· </text:span>La conexión se realiza mediante HTTPS.<text:line-break/><text:span text:style-name="T28">· </text:span>Nextcloud muestra la pantalla de inicio de sesión.<text:line-break/><text:span text:style-name="T28">· </text:span>El usuario introduce sus credenciales.<text:line-break/><text:span text:style-name="T28">· </text:span>El sistema valida el acceso.<text:line-break/><text:span text:style-name="T28">· </text:span>Una vez dentro, el usuario puede gestionar archivos, carpetas y servicios disponibles.<text:line-break/><text:span text:style-name="T28">· </text:span>Si el acceso se realiza desde fuera de la red local, la conexión pasa a través del túnel público generado con ngrok.</text:p>
      <text:p text:style-name="P67">El comportamiento principal del sistema se basa en ofrecer una plataforma web funcional, segura y accesible. La prioridad del proyecto es validar el acceso web a Nextcloud, tanto de forma local como externa.</text:p>
      <text:p text:style-name="P67">Durante las pruebas se ha detectado una limitación con el cliente Nextcloud Desktop, ya que no funciona correctamente utilizando la URL externa de ngrok. Por este motivo, el cliente de escritorio se valida mediante la dirección local https://10.4.0.206, mientras que el acceso externo se valida desde navegador web.</text:p>
      <text:h text:style-name="P69" text:outline-level="2"/>
      <text:h text:style-name="P70" text:outline-level="2">3.3. Requisitos no funcionales</text:h>
      <text:p text:style-name="P67">Los requisitos no funcionales definen las características de calidad que debe cumplir el sistema. No explican acciones concretas del usuario, sino cómo debe comportarse la plataforma en aspectos como rendimiento, seguridad, disponibilidad, escalabilidad y mantenimiento.</text:p>
      <text:h text:style-name="Heading_20_3" text:outline-level="3">3.3.1. Rendimiento</text:h>
      <text:p text:style-name="P67">El sistema debe ofrecer un rendimiento suficiente para permitir el acceso a archivos y el uso básico de la plataforma Nextcloud.</text:p>
      <text:p text:style-name="P67">Para ello, se utiliza un entorno virtualizado mediante Proxmox, donde el servicio dispone de recursos asignados para su funcionamiento. El rendimiento dependerá de la capacidad del servidor, del almacenamiento disponible y del número de usuarios conectados.</text:p>
      <text:p text:style-name="P67">En el contexto del proyecto, el sistema está orientado a una demostración funcional y académica, por lo que no se plantea una carga elevada de usuarios simultáneos. Aun así, debe permitir realizar operaciones básicas como iniciar sesión, subir archivos, descargar documentos y navegar por la interfaz web sin errores importantes.</text:p>
      <text:h text:style-name="Heading_20_3" text:outline-level="3">3.3.2. Seguridad</text:h>
      <text:p text:style-name="P67">La seguridad es un aspecto importante en el proyecto, ya que Nextcloud puede almacenar archivos y credenciales de usuario.</text:p>
      <text:p text:style-name="P67">Las principales medidas de seguridad consideradas son:</text:p>
      <text:p text:style-name="P67"><text:span text:style-name="T28">· </text:span>Uso de HTTPS para cifrar las comunicaciones.<text:line-break/><text:span text:style-name="T28">· </text:span>Acceso mediante credenciales de usuario.<text:line-break/><text:span text:style-name="T28">· </text:span>Gestión de usuarios desde el panel de administración.<text:line-break/><text:span text:style-name="T28">· </text:span>Control del acceso local y externo.<text:line-break/><text:span text:style-name="T28">· </text:span>Uso de una URL pública temporal mediante ngrok para pruebas externas.<text:line-break/><text:span text:style-name="T28">· </text:span>Diferenciación entre acceso web funcional y limitaciones del cliente de escritorio.</text:p>
      <text:p text:style-name="P67">El uso de HTTPS permite evitar que las credenciales y datos viajen sin cifrar. Esta medida mejora la seguridad general del sistema y acerca el proyecto a una implantación más realista.</text:p>
      <text:p text:style-name="P67">En una empresa real, sería recomendable ampliar estas medidas con copias de seguridad, políticas de contraseñas, autenticación en dos pasos y un dominio propio con certificado definitivo.</text:p>
      <text:h text:style-name="P44" text:outline-level="3">3.3.3. Disponibilidad</text:h>
      <text:p text:style-name="P71">El sistema debe estar disponible para los usuarios mientras el servidor y el servicio Nextcloud se encuentren activos.</text:p>
      <text:p text:style-name="P71">En el entorno actual, la disponibilidad depende de varios elementos:</text:p>
      <text:p text:style-name="P71"><text:span text:style-name="T29">· </text:span>Funcionamiento del servidor asignado.<text:line-break/><text:span text:style-name="T29">· </text:span>Estado de la máquina o servicio en Proxmox.<text:line-break/><text:span text:style-name="T29">· </text:span>Conectividad de red.<text:line-break/><text:span text:style-name="T29">· </text:span>Correcto funcionamiento de Nextcloud.<text:line-break/><text:span text:style-name="T29">· </text:span>Disponibilidad del túnel ngrok para el acceso externo.</text:p>
      <text:p text:style-name="P71">Al tratarse de un entorno académico, no se dispone de alta disponibilidad ni redundancia. Si el servidor se apaga o el servicio se detiene, Nextcloud dejaría de estar accesible.</text:p>
      <text:p text:style-name="P71">Aun así, el sistema cumple el objetivo del proyecto, ya que permite validar el funcionamiento principal de la nube privada desde la red local y desde el exterior mediante navegador web.</text:p>
      <text:h text:style-name="P44" text:outline-level="3">3.3.4. Escalabilidad</text:h>
      <text:p text:style-name="P71">El sistema está diseñado de forma que pueda ampliarse en el futuro si la empresa necesitara más capacidad o nuevas funcionalidades.</text:p>
      <text:p text:style-name="P71">Al estar desplegado sobre Proxmox, sería posible aumentar recursos como CPU, memoria RAM o almacenamiento, siempre que la infraestructura disponible lo permita.</text:p>
      <text:p text:style-name="P71">Además, Nextcloud permite añadir funciones mediante aplicaciones internas, como calendario, contactos, formularios, edición colaborativa, integración con correo o herramientas de productividad.</text:p>
      <text:p text:style-name="P71">Entre las posibles ampliaciones futuras se encuentran:</text:p>
      <text:p text:style-name="P71"><text:span text:style-name="T29">· </text:span>Aumento del almacenamiento disponible.<text:line-break/><text:span text:style-name="T29">· </text:span>Creación de más usuarios.<text:line-break/><text:span text:style-name="T29">· </text:span>Configuración de copias de seguridad.<text:line-break/><text:span text:style-name="T29">· </text:span>Uso de dominio propio definitivo.<text:line-break/><text:span text:style-name="T29">· </text:span>Configuración de autenticación en dos factores.<text:line-break/><text:span text:style-name="T29">· </text:span>Mejora del acceso externo sin depender de ngrok.<text:line-break/><text:span text:style-name="T29">· </text:span>Integración con otros servicios empresariales.</text:p>
      <text:p text:style-name="P71">Esto convierte a PrivaNube en una solución ampliable y no limitada únicamente a una prueba básica.</text:p>
      <text:h text:style-name="P44" text:outline-level="3">3.3.5. Mantenibilidad </text:h>
      <text:p text:style-name="P71">La mantenibilidad hace referencia a la facilidad para revisar, corregir y ampliar el sistema en el futuro.</text:p>
      <text:p text:style-name="P71">El proyecto resulta mantenible porque se basa en herramientas conocidas y documentadas, como Proxmox, Nextcloud y ngrok. Además, la memoria del proyecto recoge la estructura del sistema, las decisiones tomadas, las pruebas realizadas y las limitaciones detectadas.</text:p>
      <text:p text:style-name="P71">Para mantener correctamente el sistema sería necesario:</text:p>
      <text:p text:style-name="P71"><text:span text:style-name="T29">· </text:span>Revisar periódicamente el estado del servidor.<text:line-break/><text:span text:style-name="T29">· </text:span>Aplicar actualizaciones de Nextcloud.<text:line-break/><text:span text:style-name="T29">· </text:span>Controlar el almacenamiento disponible.<text:line-break/><text:span text:style-name="T29">· </text:span>Gestionar usuarios y permisos.<text:line-break/><text:span text:style-name="T29">· </text:span>Revisar el funcionamiento de HTTPS.<text:line-break/><text:span text:style-name="T29">· </text:span>Comprobar el acceso externo cuando se utilice ngrok.<text:line-break/><text:span text:style-name="T29">· </text:span>Realizar copias de seguridad periódicas.</text:p>
      <text:p text:style-name="P71">Una documentación clara facilita que otra persona pueda entender el funcionamiento del sistema y continuar su administración si fuera necesario.</text:p>
      <text:h text:style-name="P69" text:outline-level="2"/>
      <text:h text:style-name="P70" text:outline-level="2">3.4. Casos de uso</text:h>
      <text:p text:style-name="Text_20_body">Los casos de uso representan las principales acciones que realizan los usuarios dentro del sistema. En este proyecto se centran en el acceso a Nextcloud, la gestión de archivos y la administración básica de la plataforma.</text:p>
      <text:h text:style-name="Heading_20_3" text:outline-level="3">3.4.1. Actores del sistema</text:h>
      <text:p text:style-name="Text_20_body">En el sistema se identifican los siguientes actores:</text:p>
      <text:p text:style-name="Text_20_body"><text:span text:style-name="Strong_20_Emphasis">Usuario final:</text:span> persona que accede a Nextcloud para trabajar con archivos, carpetas y servicios disponibles.</text:p>
      <text:p text:style-name="Text_20_body"><text:span text:style-name="Strong_20_Emphasis">Administrador:</text:span> persona encargada de gestionar la plataforma, los usuarios, la configuración y el mantenimiento del servicio.</text:p>
      <text:p text:style-name="Text_20_body"><text:span text:style-name="Strong_20_Emphasis">Sistema Nextcloud:</text:span> plataforma encargada de autenticar usuarios, mostrar la interfaz web y gestionar los archivos almacenados.</text:p>
      <text:p text:style-name="Text_20_body"><text:span text:style-name="Strong_20_Emphasis">Proxmox:</text:span> infraestructura de virtualización donde se aloja el servicio.</text:p>
      <text:p text:style-name="Text_20_body"><text:span text:style-name="Strong_20_Emphasis">ngrok:</text:span> herramienta utilizada para permitir el acceso externo temporal a la interfaz web de Nextcloud.</text:p>
      <text:h text:style-name="P44" text:outline-level="3">3.4.2. Caso de uso principal: acceso a la nube privada</text:h>
      <text:p text:style-name="P72">Descripción</text:p>
      <text:p text:style-name="P73">Permite a un usuario acceder a la plataforma Nextcloud para consultar y gestionar sus archivos.</text:p>
      <text:p text:style-name="P74">Flujo principal</text:p>
      <text:p text:style-name="P73">El usuario abre el navegador web.<text:line-break/>Introduce la dirección de acceso local o externa.<text:line-break/>El sistema carga la pantalla de inicio de sesión de Nextcloud.<text:line-break/>El usuario introduce sus credenciales.<text:line-break/>Nextcloud valida los datos de acceso.<text:line-break/>El usuario accede a su espacio de archivos.<text:line-break/>El usuario puede subir, descargar, consultar o compartir documentos.</text:p>
      <text:p text:style-name="P74">Resultado</text:p>
      <text:p text:style-name="P73">El usuario accede correctamente a la nube privada y puede trabajar con sus archivos desde la interfaz web.</text:p>
      <text:h text:style-name="P44" text:outline-level="3">3.4.3. Caso de uso: acceso externo mediante ngrok</text:h>
      <text:p text:style-name="P74">Descripción</text:p>
      <text:p text:style-name="P73">Permite validar el acceso a Nextcloud desde fuera de la red local mediante una URL pública temporal generada con ngrok.</text:p>
      <text:p text:style-name="P74">Flujo principal</text:p>
      <text:p text:style-name="P73">El túnel de ngrok se encuentra activo.<text:line-break/>El usuario introduce en el navegador la URL pública:</text:p>
      <text:p text:style-name="P73"><text:a xlink:type="simple" xlink:href="https://backache-aneurism-marsupial.ngrok-free.dev/" text:style-name="Internet_20_link" text:visited-style-name="Visited_20_Internet_20_Link">https://backache-aneurism-marsupial.ngrok-free.dev</text:a></text:p>
      <text:p text:style-name="P73">La petición llega al túnel de ngrok.<text:line-break/>ngrok redirige la conexión hacia el servicio Nextcloud.<text:line-break/>Se carga la interfaz web de Nextcloud.<text:line-break/>El usuario inicia sesión.<text:line-break/>El usuario puede acceder a sus archivos desde una ubicación externa.</text:p>
      <text:p text:style-name="P74">Resultado</text:p>
      <text:p text:style-name="P73">La interfaz web de Nextcloud queda accesible desde fuera de la red local, validando el acceso externo del proyecto.</text:p>
      <text:h text:style-name="P44" text:outline-level="3">3.4.4. Caso de uso: administración de usuarios</text:h>
      <text:p text:style-name="P72">Descripción</text:p>
      <text:p text:style-name="P75">Permite al administrador gestionar los usuarios de la plataforma Nextcloud.</text:p>
      <text:p text:style-name="P72">Flujo principal</text:p>
      <text:p text:style-name="P75">1. El administrador accede a Nextcloud.<text:line-break/>2. Inicia sesión con una cuenta con permisos de administración.<text:line-break/>3. Accede al apartado de gestión de usuarios.<text:line-break/>4. Crea, modifica o elimina usuarios.<text:line-break/>5. Asigna permisos o grupos si es necesario.<text:line-break/>6. Guarda los cambios realizados.</text:p>
      <text:p text:style-name="P72">Resultado</text:p>
      <text:p text:style-name="P75">El sistema queda organizado con usuarios gestionados desde el panel de administración de Nextcloud.</text:p>
      <text:h text:style-name="Heading_20_3" text:outline-level="3">3.4.5. Caso de uso: gestión de archivos</text:h>
      <text:p text:style-name="P74">Descripción</text:p>
      <text:p text:style-name="P73">Permite a los usuarios trabajar con archivos dentro de la nube privada.</text:p>
      <text:p text:style-name="P74">Flujo principal</text:p>
      <text:p text:style-name="P73"><text:span text:style-name="T30">1. </text:span>El usuario inicia sesión en Nextcloud.<text:line-break/><text:span text:style-name="T30">2. </text:span>Accede al apartado de archivos.<text:line-break/><text:span text:style-name="T30">3. </text:span>Sube un documento o crea una carpeta.<text:line-break/><text:span text:style-name="T30">4. </text:span>Organiza la información dentro de su espacio.<text:line-break/><text:span text:style-name="T30">5. </text:span>Descarga o comparte archivos cuando sea necesario.</text:p>
      <text:p text:style-name="P74">Resultado</text:p>
      <text:p text:style-name="P73">El usuario puede utilizar Nextcloud como sistema centralizado de almacenamiento y organización de documentos.</text:p>
      <text:h text:style-name="P70" text:outline-level="2">3.5. Arquitectura y flujo del sistema</text:h>
      <text:p text:style-name="P76">La arquitectura del sistema se basa en una solución sencilla y funcional, orientada a la implantación de una nube privada mediante Nextcloud.</text:p>
      <text:p text:style-name="P77">El sistema se compone de los siguientes elementos:</text:p>
      <text:p text:style-name="P76"><text:span text:style-name="T30">· </text:span>Servidor Proxmox: aloja el entorno donde se ejecuta el servicio.<text:line-break/><text:span text:style-name="T30">· </text:span>Nextcloud: aplicación principal de nube privada.<text:line-break/><text:span text:style-name="T30">· </text:span>HTTPS: mecanismo de acceso seguro.<text:line-break/><text:span text:style-name="T30">· </text:span>ngrok: herramienta para acceso externo temporal.<text:line-break/><text:span text:style-name="T30">· </text:span>Usuarios: acceden desde navegador web para trabajar con los archivos.</text:p>
      <text:p text:style-name="P77">La estructura general del sistema es la siguiente:</text:p>
      <text:p text:style-name="P76"><text:span text:style-name="T30">1. </text:span>El usuario accede desde un navegador.<text:line-break/><text:span text:style-name="T30">2. </text:span>Si está en la red local, utiliza la dirección https://10.4.0.206.<text:line-break/><text:span text:style-name="T30">3. </text:span>Si está fuera de la red local, utiliza la URL pública de ngrok.<text:line-break/><text:span text:style-name="T30">4. </text:span>La conexión se realiza mediante HTTPS.<text:line-break/><text:span text:style-name="T30">5. </text:span>Nextcloud muestra la interfaz de inicio de sesión.<text:line-break/><text:span text:style-name="T30">6. </text:span>El usuario accede a su cuenta.<text:line-break/><text:span text:style-name="T30">7. </text:span>El sistema permite gestionar archivos y servicios disponibles.</text:p>
      <text:p text:style-name="P76">Esta arquitectura permite validar el objetivo principal del proyecto: disponer de una nube privada funcional, accesible mediante web y desplegada sobre infraestructura virtualizada.</text:p>
      <text:h text:style-name="P44" text:outline-level="3">3.5.1. Flujo del sistema</text:h>
      <text:p text:style-name="P77">El flujo general del sistema puede resumirse de la siguiente forma:</text:p>
      <text:p text:style-name="P76"><text:span text:style-name="T31">1. </text:span>El usuario introduce la URL de acceso.<text:line-break/><text:span text:style-name="T31">2. </text:span>La conexión se establece mediante HTTPS.<text:line-break/><text:span text:style-name="T31">3. </text:span>El servidor responde mostrando la pantalla de Nextcloud.<text:line-break/><text:span text:style-name="T31">4. </text:span>El usuario introduce sus credenciales.<text:line-break/><text:span text:style-name="T31">5. </text:span>Nextcloud valida el acceso.<text:line-break/><text:span text:style-name="T31">6. </text:span>El usuario entra en la plataforma.<text:line-break/><text:span text:style-name="T31">7. </text:span>El usuario gestiona archivos, carpetas y servicios disponibles.<text:line-break/><text:span text:style-name="T31">8. </text:span>El administrador puede revisar usuarios, configuración y estado del sistema.</text:p>
      <text:p text:style-name="P77">En el caso del acceso externo, el flujo incluye ngrok:</text:p>
      <text:p text:style-name="P76"><text:span text:style-name="T31">1. </text:span>El usuario accede a la URL pública de ngrok.<text:line-break/><text:span text:style-name="T31">2. </text:span>ngrok recibe la conexión externa.<text:line-break/><text:span text:style-name="T31">3. </text:span>El túnel redirige la petición hacia el servicio interno.<text:line-break/><text:span text:style-name="T31">4. </text:span>Nextcloud responde mostrando la interfaz web.<text:line-break/><text:span text:style-name="T31">5. </text:span>El usuario accede al sistema desde fuera de la red local.</text:p>
      <text:p text:style-name="P76">Este flujo permite demostrar que PrivaNube no funciona únicamente dentro de la red local, sino que también puede ser accesible desde el exterior mediante navegador web.</text:p>
      <text:h text:style-name="Heading_20_2" text:outline-level="2">3.6. Conclusión del análisis</text:h>
      <text:p text:style-name="P76">Tras realizar el análisis del sistema, se puede concluir que PrivaNube responde correctamente a los objetivos definidos para el proyecto.</text:p>
      <text:p text:style-name="P76">La solución permite implantar una nube privada basada en Nextcloud, desplegada sobre una infraestructura virtualizada mediante Proxmox y accesible mediante conexiones seguras con HTTPS.</text:p>
      <text:p text:style-name="P76">El análisis ha permitido identificar los usuarios principales, los requisitos funcionales, los requisitos no funcionales y los casos de uso más importantes. También se ha definido el flujo general del sistema, diferenciando entre acceso local y acceso externo mediante ngrok.</text:p>
      <text:p text:style-name="P76">Aunque existe una limitación con el cliente Nextcloud Desktop al utilizar la URL externa, el funcionamiento principal del sistema queda validado mediante la interfaz web. Por tanto, el proyecto cumple su finalidad principal: ofrecer una plataforma de nube privada funcional, segura y adecuada para una pequeña empresa dentro de un entorno académico.</text:p>
      <text:p text:style-name="P7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Negrita" style:font-family-generic="swiss" style:font-pitch="variable"/>
    <style:font-face style:name="Calibri1" svg:font-family="Calibri" style:font-adornments="Negrita itálica" style:font-family-generic="swiss" style:font-pitch="variable"/>
    <style:font-face style:name="Calibri2" svg:font-family="Calibri" style:font-adornments="Normal" style:font-family-generic="swiss" style:font-pitch="variable"/>
    <style:font-face style:name="Calibri3" svg:font-family="Calibri,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pitch="variable"/>
    <style:font-face style:name="Montserrat Black" svg:font-family="'Montserrat Black'" style:font-adornments="Regular" style:font-pitch="variable"/>
    <style:font-face style:name="Montserrat Medium" svg:font-family="'Montserrat Mediu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2" fo:font-family="Calibri" style:font-style-name="Normal"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5cm" fo:margin-bottom="0.25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master-page-name="">
      <loext:graphic-properties draw:fill="none" draw:fill-color="#3465a4"/>
      <style:paragraph-properties fo:margin-top="0.423cm" fo:margin-bottom="0.212cm" style:contextual-spacing="false" fo:text-align="start" style:justify-single-word="false" style:page-number="auto" fo:background-color="transparent" fo:padding="0.049cm" fo:border-left="none" fo:border-right="none" fo:border-top="none" fo:border-bottom="1.5pt solid #1f3a5f">
        <style:tab-stops/>
      </style:paragraph-properties>
      <style:text-properties fo:color="#1f3a5f" loext:opacity="100%" style:font-name="Calibri" fo:font-family="Calibri" style:font-style-name="Negrita" style:font-family-generic="swiss" style:font-pitch="variable" fo:font-size="18pt" style:text-underline-style="none" fo:font-weight="bold" fo:background-color="transparent" style:font-size-asian="18pt" style:font-weight-asian="bold" style:font-size-complex="18pt" style:font-weight-complex="bold" style:text-overline-style="none" style:text-overline-color="font-color"/>
    </style:style>
    <style:style style:name="Title" style:family="paragraph" style:parent-style-name="Heading" style:next-style-name="Text_20_body" style:class="chapter">
      <loext:graphic-properties draw:fill="solid" draw:fill-color="#2a6099"/>
      <style:paragraph-properties fo:text-align="center" style:justify-single-word="false" fo:background-color="#2a6099"/>
      <style:text-properties style:font-name="Calibri" fo:font-family="Calibri" style:font-style-name="Negrita" style:font-family-generic="swiss" style:font-pitch="variable" fo:font-size="30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chapter" style:master-page-name="">
      <loext:graphic-properties draw:fill="none" draw:fill-color="#5983b0"/>
      <style:paragraph-properties fo:margin-top="0.353cm" fo:margin-bottom="0.212cm" style:contextual-spacing="false" fo:line-height="100%" fo:text-align="start" style:justify-single-word="false" style:page-number="auto" fo:background-color="transparent">
        <style:tab-stops/>
      </style:paragraph-properties>
      <style:text-properties fo:color="#4a6fa5" loext:opacity="100%" style:font-name="Calibri" fo:font-family="Calibri" style:font-style-name="Negrita"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loext:graphic-properties draw:fill="solid" draw:fill-color="#729fcf"/>
      <style:paragraph-properties fo:margin-top="0.247cm" fo:margin-bottom="0.212cm" style:contextual-spacing="false" fo:text-align="start" style:justify-single-word="false" fo:background-color="#729fcf"/>
      <style:text-properties fo:color="#ffffff" loext:opacity="100%" style:font-name="Calibri" fo:font-family="Calibri" style:font-style-name="Negrita"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master-page-name="">
      <loext:graphic-properties draw:fill="solid" draw:fill-color="#b4c7dc"/>
      <style:paragraph-properties fo:margin-top="0.212cm" fo:margin-bottom="0.212cm" style:contextual-spacing="false" fo:text-align="center" style:justify-single-word="false" style:page-number="auto" fo:background-color="#b4c7dc"/>
      <style:text-properties fo:color="#ffffff" loext:opacity="100%" style:font-name="Calibri1" fo:font-family="Calibri" style:font-style-name="Negrita itálica" style:font-family-generic="swiss" style:font-pitch="variable" fo:font-size="12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6ff0f" officeooo:paragraph-rsid="0016ff0f"/>
    </style:style>
    <style:style style:name="MP2" style:family="paragraph" style:parent-style-name="Text_20_body">
      <style:paragraph-properties fo:margin-left="0cm" fo:margin-right="0cm" fo:margin-top="0cm" fo:margin-bottom="0cm" style:contextual-spacing="false" fo:line-height="100%" fo:text-align="center" style:justify-single-word="false" fo:text-indent="0cm" style:auto-text-indent="false">
        <style:tab-stops>
          <style:tab-stop style:position="8.255cm" style:type="center"/>
          <style:tab-stop style:position="16.51cm" style:type="right"/>
        </style:tab-stops>
      </style:paragraph-properties>
      <style:text-properties fo:font-variant="normal" fo:text-transform="none" fo:color="#595959" loext:opacity="100%" style:font-name="Calibri3" fo:font-size="10pt" fo:language="es" fo:country="ES" fo:font-style="normal" fo:font-weight="normal" officeooo:paragraph-rsid="0016ff0f"/>
    </style:style>
    <style:style style:name="MT1" style:family="text">
      <style:text-properties officeooo:rsid="0018a2a4"/>
    </style:style>
    <style:page-layout style:name="Mpm1">
      <style:page-layout-properties fo:page-width="21.001cm" fo:page-height="30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Jairo Motero García<text:tab/>2SMR<text:tab/><text:span text:style-name="MT1">Documentación</text:span> del TFG</text:p>
      </style:header>
      <style:footer>
        <text:p text:style-name="MP2">Documento de planificación inicial del Proyecto Intermodular</text:p>
      </style:footer>
    </style:master-page>
    <style:master-page style:name="First_20_Page" style:display-name="First Page" style:page-layout-name="Mpm2" draw:style-name="Mdp1" style:next-style-name="Standard"/>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2T20:02:32.005584200</meta:creation-date>
    <dc:date>2026-05-20T22:32:14.868990900</dc:date>
    <meta:editing-duration>PT7H12M24S</meta:editing-duration>
    <meta:editing-cycles>43</meta:editing-cycles>
    <meta:generator>LibreOffice/25.2.7.2$Windows_X86_64 LibreOffice_project/5cbfd1ab6520636bb5f7b99185aa69bd7456825d</meta:generator>
    <meta:document-statistic meta:table-count="3" meta:image-count="0" meta:object-count="0" meta:page-count="42" meta:paragraph-count="454" meta:word-count="7269" meta:character-count="49235" meta:non-whitespace-character-count="42391"/>
  </office:meta>
</office:document-meta>
</file>