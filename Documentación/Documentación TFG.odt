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Negrita" style:font-family-generic="swiss" style:font-pitch="variable"/>
    <style:font-face style:name="Calibri1" svg:font-family="Calibri" style:font-adornments="Negrita itálica" style:font-family-generic="swiss" style:font-pitch="variable"/>
    <style:font-face style:name="Calibri2" svg:font-family="Calibri" style:font-adornments="Normal" style:font-family-generic="swiss" style:font-pitch="variable"/>
    <style:font-face style:name="Calibri3" svg:font-family="Calibri,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pitch="variable"/>
    <style:font-face style:name="Montserrat Black" svg:font-family="'Montserrat Black'" style:font-adornments="Regular" style:font-pitch="variable"/>
    <style:font-face style:name="Montserrat Medium" svg:font-family="'Montserrat Mediu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Resumen-Proyecto" style:family="table">
      <style:table-properties style:width="17cm" table:align="margins" style:may-break-between-rows="true" table:border-model="collapsing"/>
    </style:style>
    <style:style style:name="Resumen-Proyecto.A" style:family="table-column">
      <style:table-column-properties style:column-width="8.491cm" style:rel-column-width="32733*"/>
    </style:style>
    <style:style style:name="Resumen-Proyecto.B" style:family="table-column">
      <style:table-column-properties style:column-width="8.509cm" style:rel-column-width="32802*"/>
    </style:style>
    <style:style style:name="Resumen-Proyecto.A1" style:family="table-cell">
      <style:table-cell-properties fo:background-color="transparent" fo:padding="0.097cm" fo:border="0.5pt solid #000000" style:writing-mode="page">
        <style:background-image/>
      </style:table-cell-properties>
    </style:style>
    <style:style style:name="Resumen-Proyecto.2" style:family="table-row">
      <style:table-row-properties fo:keep-together="auto"/>
    </style:style>
    <style:style style:name="Resumen-Proyecto.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esumen-Proyecto.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5.76cm" table:align="left"/>
    </style:style>
    <style:style style:name="Tabla2.A" style:family="table-column">
      <style:table-column-properties style:column-width="1.838cm"/>
    </style:style>
    <style:style style:name="Tabla2.B" style:family="table-column">
      <style:table-column-properties style:column-width="5.833cm"/>
    </style:style>
    <style:style style:name="Tabla2.C" style:family="table-column">
      <style:table-column-properties style:column-width="8.089cm"/>
    </style:style>
    <style:style style:name="Tabla2.A1" style:family="table-cell">
      <style:table-cell-properties style:vertical-align="middle" fo:padding="0.049cm" fo:border="none"/>
    </style:style>
    <style:style style:name="Tabla3" style:family="table">
      <style:table-properties style:width="13.956cm" table:align="left"/>
    </style:style>
    <style:style style:name="Tabla3.A" style:family="table-column">
      <style:table-column-properties style:column-width="0.981cm"/>
    </style:style>
    <style:style style:name="Tabla3.B" style:family="table-column">
      <style:table-column-properties style:column-width="0.649cm"/>
    </style:style>
    <style:style style:name="Tabla3.C" style:family="table-column">
      <style:table-column-properties style:column-width="9.118cm"/>
    </style:style>
    <style:style style:name="Tabla3.D" style:family="table-column">
      <style:table-column-properties style:column-width="1.766cm"/>
    </style:style>
    <style:style style:name="Tabla3.E" style:family="table-column">
      <style:table-column-properties style:column-width="1.443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5.681cm"/>
    </style:style>
    <style:style style:name="Tabla4.B" style:family="table-column">
      <style:table-column-properties style:column-width="2.424cm"/>
    </style:style>
    <style:style style:name="Tabla4.C" style:family="table-column">
      <style:table-column-properties style:column-width="1.626cm"/>
    </style:style>
    <style:style style:name="Tabla4.D" style:family="table-column">
      <style:table-column-properties style:column-width="7.269cm"/>
    </style:style>
    <style:style style:name="Tabla4.A1" style:family="table-cell">
      <style:table-cell-properties style:vertical-align="middle" fo:padding="0.049cm" fo:border="none"/>
    </style:style>
    <style:style style:name="Tabla5" style:family="table">
      <style:table-properties style:width="14.589cm" table:align="left"/>
    </style:style>
    <style:style style:name="Tabla5.A" style:family="table-column">
      <style:table-column-properties style:column-width="5.228cm"/>
    </style:style>
    <style:style style:name="Tabla5.B" style:family="table-column">
      <style:table-column-properties style:column-width="7.359cm"/>
    </style:style>
    <style:style style:name="Tabla5.C" style:family="table-column">
      <style:table-column-properties style:column-width="2.002cm"/>
    </style:style>
    <style:style style:name="Tabla5.A1" style:family="table-cell">
      <style:table-cell-properties style:vertical-align="middle" fo:padding="0.049cm" fo:border="none"/>
    </style:style>
    <style:style style:name="Tabla6" style:family="table">
      <style:table-properties style:width="11.169cm" table:align="left"/>
    </style:style>
    <style:style style:name="Tabla6.A" style:family="table-column">
      <style:table-column-properties style:column-width="6.089cm"/>
    </style:style>
    <style:style style:name="Tabla6.B" style:family="table-column">
      <style:table-column-properties style:column-width="3.078cm"/>
    </style:style>
    <style:style style:name="Tabla6.C" style:family="table-column">
      <style:table-column-properties style:column-width="2.002cm"/>
    </style:style>
    <style:style style:name="Tabla6.A1" style:family="table-cell">
      <style:table-cell-properties style:vertical-align="middle" fo:padding="0.049cm" fo:border="none"/>
    </style:style>
    <style:style style:name="Tabla7" style:family="table">
      <style:table-properties style:width="6.304cm" table:align="left"/>
    </style:style>
    <style:style style:name="Tabla7.A" style:family="table-column">
      <style:table-column-properties style:column-width="4.302cm"/>
    </style:style>
    <style:style style:name="Tabla7.B" style:family="table-column">
      <style:table-column-properties style:column-width="2.002cm"/>
    </style:style>
    <style:style style:name="Tabla7.A1" style:family="table-cell">
      <style:table-cell-properties style:vertical-align="middle" fo:padding="0.049cm" fo:border="none"/>
    </style:style>
    <style:style style:name="P1" style:family="paragraph" style:parent-style-name="Standard" style:master-page-name="First_20_Page">
      <style:paragraph-properties fo:text-align="center" style:justify-single-word="false" style:page-number="auto"/>
      <style:text-properties officeooo:rsid="00198c07" officeooo:paragraph-rsid="00357f49"/>
    </style:style>
    <style:style style:name="P2" style:family="paragraph" style:parent-style-name="Standard">
      <style:paragraph-properties fo:text-align="center" style:justify-single-word="false"/>
      <style:text-properties officeooo:rsid="00198c07" officeooo:paragraph-rsid="00357f49"/>
    </style:style>
    <style:style style:name="P3" style:family="paragraph" style:parent-style-name="Standard">
      <style:paragraph-properties fo:margin-top="0.101cm" fo:margin-bottom="0.101cm" style:contextual-spacing="false" fo:text-align="center" style:justify-single-word="false"/>
      <style:text-properties style:font-name="Montserrat" fo:font-size="13pt" fo:font-weight="bold" officeooo:rsid="00198c07" officeooo:paragraph-rsid="00357f49" style:font-size-asian="13pt" style:font-weight-asian="bold" style:font-size-complex="13pt" style:font-weight-complex="bold"/>
    </style:style>
    <style:style style:name="P4" style:family="paragraph" style:parent-style-name="Standard">
      <style:paragraph-properties fo:margin-top="0.101cm" fo:margin-bottom="0.101cm" style:contextual-spacing="false" fo:text-align="center" style:justify-single-word="false"/>
      <style:text-properties style:font-name="Montserrat" fo:font-size="16pt" fo:font-weight="bold" officeooo:rsid="00198c07" officeooo:paragraph-rsid="00357f49" style:font-size-asian="16pt" style:font-weight-asian="bold" style:font-size-complex="16pt" style:font-weight-complex="bold"/>
    </style:style>
    <style:style style:name="P5" style:family="paragraph" style:parent-style-name="Standard">
      <style:paragraph-properties fo:margin-top="0.101cm" fo:margin-bottom="0.101cm" style:contextual-spacing="false" fo:text-align="center" style:justify-single-word="false"/>
      <style:text-properties style:font-name="Montserrat" fo:font-size="14pt" fo:font-weight="bold" officeooo:rsid="00198c07" officeooo:paragraph-rsid="00357f49" style:font-size-asian="14pt" style:font-weight-asian="bold" style:font-size-complex="14pt" style:font-weight-complex="bold"/>
    </style:style>
    <style:style style:name="P6" style:family="paragraph" style:parent-style-name="Standard">
      <style:paragraph-properties fo:line-height="115%" fo:text-align="center" style:justify-single-word="false"/>
      <style:text-properties style:font-name="Montserrat" fo:font-size="24pt" style:text-underline-style="solid" style:text-underline-width="auto" style:text-underline-color="font-color" fo:font-weight="bold" officeooo:rsid="00357f49" officeooo:paragraph-rsid="00357f49" style:font-size-asian="24pt" style:font-weight-asian="bold" style:font-size-complex="24pt" style:font-weight-complex="bold"/>
    </style:style>
    <style:style style:name="P7" style:family="paragraph" style:parent-style-name="Standard">
      <style:paragraph-properties fo:margin-left="0cm" fo:line-height="115%" fo:text-align="center" style:justify-single-word="false" fo:text-indent="0cm" style:auto-text-indent="false"/>
      <style:text-properties style:font-name="Montserrat" fo:font-size="18pt" fo:font-weight="bold" officeooo:rsid="00357f49" officeooo:paragraph-rsid="00357f49" style:font-size-asian="18pt" style:font-weight-asian="bold" style:font-size-complex="18pt" style:font-weight-complex="bold"/>
    </style:style>
    <style:style style:name="P8" style:family="paragraph" style:parent-style-name="Standard">
      <style:paragraph-properties fo:text-align="end" style:justify-single-word="false"/>
      <style:text-properties fo:font-weight="bold" officeooo:rsid="00198c07" officeooo:paragraph-rsid="00357f49" style:font-weight-asian="bold" style:font-weight-complex="bold"/>
    </style:style>
    <style:style style:name="P9" style:family="paragraph" style:parent-style-name="Standard">
      <style:paragraph-properties fo:margin-top="0.101cm" fo:margin-bottom="0.101cm" style:contextual-spacing="false" fo:text-align="end" style:justify-single-word="false"/>
      <style:text-properties fo:font-weight="bold" officeooo:rsid="00198c07" officeooo:paragraph-rsid="00357f49" style:font-weight-asian="bold" style:font-weight-complex="bold"/>
    </style:style>
    <style:style style:name="P10" style:family="paragraph" style:parent-style-name="Standard">
      <style:paragraph-properties fo:margin-top="0.101cm" fo:margin-bottom="0.101cm" style:contextual-spacing="false" fo:text-align="end" style:justify-single-word="false"/>
      <style:text-properties style:font-name="Montserrat" fo:font-weight="bold" officeooo:rsid="00198c07" officeooo:paragraph-rsid="00357f49" style:font-weight-asian="bold" style:font-weight-complex="bold"/>
    </style:style>
    <style:style style:name="P11" style:family="paragraph" style:parent-style-name="Text_20_body">
      <style:paragraph-properties fo:break-before="page"/>
      <style:text-properties fo:font-weight="bold" officeooo:rsid="001d298b" officeooo:paragraph-rsid="00357f49" style:font-weight-asian="bold" style:font-weight-complex="bold"/>
    </style:style>
    <style:style style:name="P12" style:family="paragraph" style:parent-style-name="Table_20_Contents">
      <style:text-properties style:font-name="Montserrat" fo:font-size="12pt" officeooo:paragraph-rsid="00357f49" style:font-size-asian="12pt" style:font-size-complex="12pt"/>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Montserrat" fo:font-size="12pt" fo:font-style="normal" fo:text-shadow="none" style:text-underline-style="none" fo:font-weight="bold" officeooo:rsid="001d298b" officeooo:paragraph-rsid="00357f49"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Montserrat" fo:font-size="12pt" fo:font-style="normal" fo:text-shadow="none" style:text-underline-style="none" fo:font-weight="normal" officeooo:rsid="001d298b" officeooo:paragraph-rsid="00357f4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text-properties fo:font-size="12pt" officeooo:paragraph-rsid="00357f49" style:font-size-asian="12pt" style:font-size-complex="12pt"/>
    </style:style>
    <style:style style:name="P16" style:family="paragraph" style:parent-style-name="Table_20_Contents">
      <style:paragraph-properties fo:margin-top="0.199cm" fo:margin-bottom="0cm" style:contextual-spacing="false" fo:line-height="115%" fo:text-align="start" style:justify-single-word="false"/>
      <style:text-properties style:use-window-font-color="true" loext:opacity="0%" style:text-outline="false" style:text-line-through-style="none" style:text-line-through-type="none" style:font-name="Montserrat Black" fo:font-size="12pt" fo:font-style="normal" fo:text-shadow="none" style:text-underline-style="none" fo:font-weight="bold" officeooo:rsid="001f075e" officeooo:paragraph-rsid="00357f49"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text-align="justify" style:justify-single-word="false"/>
      <style:text-properties style:font-name="Montserrat Medium" fo:font-size="12pt" fo:font-weight="normal" officeooo:paragraph-rsid="00357f49" style:font-size-asian="12pt" style:font-weight-asian="normal" style:font-size-complex="12pt" style:font-weight-complex="normal"/>
    </style:style>
    <style:style style:name="P18" style:family="paragraph" style:parent-style-name="Text_20_body">
      <style:paragraph-properties fo:margin-top="0.049cm" fo:margin-bottom="0.101cm" style:contextual-spacing="false"/>
      <style:text-properties style:font-name="Montserrat Black" fo:font-size="12pt" fo:language="en" fo:country="US" fo:font-weight="bold" officeooo:paragraph-rsid="00357f49" style:font-size-asian="12pt" style:font-weight-asian="bold" style:font-size-complex="12pt" style:font-weight-complex="bold"/>
    </style:style>
    <style:style style:name="P19" style:family="paragraph" style:parent-style-name="Text_20_body">
      <style:paragraph-properties fo:text-align="justify" style:justify-single-word="false" fo:orphans="0" fo:widows="0"/>
      <style:text-properties style:font-name="Montserrat Medium" fo:font-size="12pt" fo:language="en" fo:country="US" fo:font-weight="normal" officeooo:rsid="001e9531" officeooo:paragraph-rsid="0037d4b9" style:font-size-asian="12pt" style:font-weight-asian="normal" style:font-size-complex="12pt" style:font-weight-complex="normal"/>
    </style:style>
    <style:style style:name="P20" style:family="paragraph" style:parent-style-name="Text_20_body">
      <style:text-properties style:font-name="Montserrat Medium" fo:font-size="12pt" fo:font-weight="normal" officeooo:paragraph-rsid="00357f49" style:font-size-asian="12pt" style:font-weight-asian="normal" style:font-size-complex="12pt" style:font-weight-complex="normal"/>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Heading_20_1">
      <style:paragraph-properties fo:margin-top="0cm" fo:margin-bottom="0.25cm" style:contextual-spacing="false"/>
    </style:style>
    <style:style style:name="P26" style:family="paragraph" style:parent-style-name="Heading_20_2">
      <style:paragraph-properties fo:margin-top="0cm" fo:margin-bottom="0.25cm" style:contextual-spacing="false" fo:text-align="start" style:justify-single-word="false"/>
    </style:style>
    <style:style style:name="P27" style:family="paragraph" style:parent-style-name="Text_20_body">
      <style:paragraph-properties fo:margin-top="0cm" fo:margin-bottom="0.25cm" style:contextual-spacing="false" fo:text-align="start" style:justify-single-word="false"/>
    </style:style>
    <style:style style:name="P28" style:family="paragraph" style:parent-style-name="Heading_20_2">
      <style:paragraph-properties fo:margin-top="0cm" fo:margin-bottom="0.25cm" style:contextual-spacing="false" fo:text-align="start" style:justify-single-word="false"/>
      <style:text-properties officeooo:paragraph-rsid="001ae5e3"/>
    </style:style>
    <style:style style:name="P29" style:family="paragraph" style:parent-style-name="Text_20_body">
      <style:paragraph-properties fo:margin-top="0cm" fo:margin-bottom="0.25cm" style:contextual-spacing="false" fo:text-align="start" style:justify-single-word="false"/>
      <style:text-properties fo:language="es" fo:country="ES" officeooo:paragraph-rsid="001ae5e3"/>
    </style:style>
    <style:style style:name="P30" style:family="paragraph" style:parent-style-name="Heading_20_2">
      <style:paragraph-properties fo:margin-top="0cm" fo:margin-bottom="0.25cm" style:contextual-spacing="false" fo:text-align="start" style:justify-single-word="false" fo:break-before="page"/>
      <style:text-properties officeooo:paragraph-rsid="001ae5e3"/>
    </style:style>
    <style:style style:name="P31" style:family="paragraph" style:parent-style-name="Heading_20_2">
      <style:paragraph-properties fo:margin-top="0cm" fo:margin-bottom="0.25cm" style:contextual-spacing="false"/>
    </style:style>
    <style:style style:name="P32" style:family="paragraph" style:parent-style-name="Text_20_body">
      <style:paragraph-properties fo:margin-top="0cm" fo:margin-bottom="0.25cm" style:contextual-spacing="false" fo:text-align="start" style:justify-single-word="false"/>
      <style:text-properties officeooo:paragraph-rsid="0038c59c"/>
    </style:style>
    <style:style style:name="P33" style:family="paragraph" style:parent-style-name="Text_20_body">
      <style:paragraph-properties fo:margin-top="0cm" fo:margin-bottom="0.25cm" style:contextual-spacing="false"/>
    </style:style>
    <style:style style:name="P34" style:family="paragraph" style:parent-style-name="Heading_20_2">
      <style:paragraph-properties fo:margin-top="0cm" fo:margin-bottom="0.25cm" style:contextual-spacing="false" fo:break-before="page"/>
    </style:style>
    <style:style style:name="P35" style:family="paragraph" style:parent-style-name="Heading_20_1">
      <style:paragraph-properties fo:margin-top="0cm" fo:margin-bottom="0.25cm" style:contextual-spacing="false" fo:break-before="page"/>
      <style:text-properties officeooo:paragraph-rsid="00207385"/>
    </style:style>
    <style:style style:name="P36" style:family="paragraph" style:parent-style-name="Heading_20_2">
      <style:paragraph-properties fo:margin-top="0cm" fo:margin-bottom="0.25cm" style:contextual-spacing="false"/>
      <style:text-properties officeooo:paragraph-rsid="00207385"/>
    </style:style>
    <style:style style:name="P37" style:family="paragraph" style:parent-style-name="Text_20_body">
      <style:paragraph-properties fo:margin-top="0cm" fo:margin-bottom="0.25cm" style:contextual-spacing="false"/>
      <style:text-properties officeooo:paragraph-rsid="00207385"/>
    </style:style>
    <style:style style:name="P38" style:family="paragraph" style:parent-style-name="Heading_20_3">
      <style:paragraph-properties fo:margin-top="0cm" fo:margin-bottom="0.25cm" style:contextual-spacing="false"/>
    </style:style>
    <style:style style:name="P39" style:family="paragraph" style:parent-style-name="Heading_20_3">
      <style:paragraph-properties fo:margin-top="0cm" fo:margin-bottom="0.25cm" style:contextual-spacing="false" fo:break-before="page"/>
    </style:style>
    <style:style style:name="P40" style:family="paragraph" style:parent-style-name="Text_20_body">
      <style:paragraph-properties fo:margin-top="0cm" fo:margin-bottom="0.25cm" style:contextual-spacing="false"/>
      <style:text-properties officeooo:paragraph-rsid="00394da6"/>
    </style:style>
    <style:style style:name="P41" style:family="paragraph" style:parent-style-name="Text_20_body">
      <style:paragraph-properties fo:margin-top="0cm" fo:margin-bottom="0.25cm" style:contextual-spacing="false"/>
      <style:text-properties officeooo:rsid="00283e5e" officeooo:paragraph-rsid="00283e5e"/>
    </style:style>
    <style:style style:name="P42" style:family="paragraph" style:parent-style-name="Table_20_Heading">
      <style:paragraph-properties fo:margin-top="0cm" fo:margin-bottom="0.25cm" style:contextual-spacing="false"/>
    </style:style>
    <style:style style:name="P43" style:family="paragraph" style:parent-style-name="Table_20_Contents">
      <style:paragraph-properties fo:margin-top="0cm" fo:margin-bottom="0.25cm" style:contextual-spacing="false"/>
    </style:style>
    <style:style style:name="T1" style:family="text">
      <style:text-properties style:font-name="Montserrat"/>
    </style:style>
    <style:style style:name="T2" style:family="text">
      <style:text-properties style:font-name="Montserrat" officeooo:rsid="00357f49"/>
    </style:style>
    <style:style style:name="T3" style:family="text">
      <style:text-properties officeooo:rsid="00585175"/>
    </style:style>
    <style:style style:name="T4" style:family="text">
      <style:text-properties style:font-name="Montserrat Medium" fo:font-weight="normal" officeooo:rsid="00357f49" style:font-weight-asian="normal" style:font-weight-complex="normal"/>
    </style:style>
    <style:style style:name="T5" style:family="text">
      <style:text-properties style:font-name="Montserrat Medium" fo:font-weight="normal" officeooo:rsid="001e9531" style:font-weight-asian="normal" style:font-weight-complex="normal"/>
    </style:style>
    <style:style style:name="T6" style:family="text">
      <style:text-properties style:font-name="Montserrat Medium" fo:font-weight="normal" officeooo:rsid="00557b5d" style:font-weight-asian="normal" style:font-weight-complex="normal"/>
    </style:style>
    <style:style style:name="T7" style:family="text">
      <style:text-properties fo:font-weight="bold" officeooo:rsid="001ef31a" style:font-weight-asian="bold" style:font-weight-complex="bold"/>
    </style:style>
    <style:style style:name="T8" style:family="text">
      <style:text-properties style:font-name="Montserrat Medium" officeooo:rsid="003745a9"/>
    </style:style>
    <style:style style:name="T9" style:family="text">
      <style:text-properties style:use-window-font-color="true" loext:opacity="0%" style:text-outline="false" style:text-line-through-style="none" style:text-line-through-type="none" style:font-name="Montserrat" fo:font-style="normal" fo:text-shadow="none" style:text-underline-style="none" fo:font-weight="bold" officeooo:rsid="001ef31a" style:font-style-asian="normal" style:font-weight-asian="bold" style:font-style-complex="normal" style:font-weight-complex="bold" style:text-overline-style="none" style:text-overline-color="font-color"/>
    </style:style>
    <style:style style:name="T10" style:family="text">
      <style:text-properties style:use-window-font-color="true" loext:opacity="0%" style:text-outline="false" style:text-line-through-style="none" style:text-line-through-type="none" style:font-name="Montserrat" fo:font-style="normal" fo:text-shadow="none" style:text-underline-style="none" fo:font-weight="normal" officeooo:rsid="001ef31a" style:font-style-asian="normal" style:font-weight-asian="normal" style:font-style-complex="normal" style:font-weight-complex="normal" style:text-overline-style="none" style:text-overline-color="font-color"/>
    </style:style>
    <style:style style:name="T11" style:family="text">
      <style:text-properties style:font-name="Montserrat Medium" fo:font-weight="normal" style:font-weight-asian="normal" style:font-weight-complex="normal"/>
    </style:style>
    <style:style style:name="T12" style:family="text">
      <style:text-properties officeooo:rsid="0038c59c"/>
    </style:style>
    <style:style style:name="T13" style:family="text">
      <style:text-properties officeooo:rsid="001ae5e3"/>
    </style:style>
    <style:style style:name="T14" style:family="text">
      <style:text-properties fo:language="es" fo:country="ES"/>
    </style:style>
    <style:style style:name="T15" style:family="text">
      <style:text-properties fo:language="es" fo:country="ES" officeooo:rsid="001ae5e3"/>
    </style:style>
    <style:style style:name="T16" style:family="text">
      <style:text-properties officeooo:rsid="00207385"/>
    </style:style>
    <style:style style:name="T17" style:family="text">
      <style:text-properties officeooo:rsid="00394da6"/>
    </style:style>
    <style:style style:name="T18" style:family="text">
      <style:text-properties officeooo:rsid="00228c3a"/>
    </style:style>
    <style:style style:name="T19" style:family="text">
      <style:text-properties officeooo:rsid="00242426"/>
    </style:style>
    <style:style style:name="T20" style:family="text">
      <style:text-properties officeooo:rsid="002491d9"/>
    </style:style>
    <style:style style:name="T21" style:family="text">
      <style:text-properties officeooo:rsid="0026461c"/>
    </style:style>
    <style:style style:name="T22" style:family="text">
      <style:text-properties officeooo:rsid="002670e9"/>
    </style:style>
    <style:style style:name="T23" style:family="text">
      <style:text-properties officeooo:rsid="002978da"/>
    </style:style>
    <style:style style:name="T24" style:family="text">
      <style:text-properties officeooo:rsid="002adb9d"/>
    </style:style>
    <style:style style:name="T25" style:family="text">
      <style:text-properties officeooo:rsid="002c184d"/>
    </style:style>
    <style:style style:name="T26" style:family="text">
      <style:text-properties officeooo:rsid="002ce8d8"/>
    </style:style>
    <style:style style:name="T27" style:family="text">
      <style:text-properties officeooo:rsid="002ee5da"/>
    </style:style>
    <style:style style:name="T28" style:family="text">
      <style:text-properties officeooo:rsid="0032c5af"/>
    </style:style>
    <style:style style:name="T29" style:family="text">
      <style:text-properties officeooo:rsid="00333684"/>
    </style:style>
    <style:style style:name="T30" style:family="text">
      <style:text-properties officeooo:rsid="0033d034"/>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3">Dpto- Informática – I.E.S La Marisma</text:p>
      <text:p text:style-name="P4">MÓDULO PROYECTO INTERMODULAR</text:p>
      <text:p text:style-name="P5">C.F.G.M.</text:p>
      <text:p text:style-name="P4">SISTEMAS MICROINFORMÁTICOS Y REDES</text:p>
      <text:p text:style-name="P2"/>
      <text:p text:style-name="P2"/>
      <text:p text:style-name="P2"/>
      <text:p text:style-name="P2"/>
      <text:p text:style-name="P2"/>
      <text:p text:style-name="P2"/>
      <text:p text:style-name="P2"/>
      <text:p text:style-name="P2"/>
      <text:p text:style-name="P6">Privanube</text:p>
      <text:p text:style-name="P7">Nube privada creada y configurada mediante Proxmox</text:p>
      <text:p text:style-name="P2"/>
      <text:p text:style-name="P2"/>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1">Autor: </text:span><text:span text:style-name="T2">Jairo Motero García</text:span></text:p>
      <text:p text:style-name="P10">Fecha: 28/04/2026</text:p>
      <text:p text:style-name="P10">Tutor: Juan Limón <text:span text:style-name="T3">Limón</text:span></text:p>
      <text:p text:style-name="P11">HOJA RESUMEN-PROYECTO</text:p>
      <table:table table:name="Resumen-Proyecto" table:style-name="Resumen-Proyecto" table:template-name="Default Style">
        <table:table-column table:style-name="Resumen-Proyecto.A"/>
        <table:table-column table:style-name="Resumen-Proyecto.B"/>
        <table:table-row>
          <table:table-cell table:style-name="Resumen-Proyecto.A1" table:number-columns-spanned="2" office:value-type="string">
            <text:p text:style-name="P12">Título del proyecto: <text:span text:style-name="T4">Priva nube</text:span></text:p>
          </table:table-cell>
          <table:covered-table-cell/>
        </table:table-row>
        <table:table-row table:style-name="Resumen-Proyecto.2">
          <table:table-cell table:style-name="Resumen-Proyecto.A2" office:value-type="string">
            <text:p text:style-name="P13">Autor: <text:span text:style-name="T4">Jairo Motero García</text:span></text:p>
          </table:table-cell>
          <table:table-cell table:style-name="Resumen-Proyecto.B2" office:value-type="string">
            <text:p text:style-name="P13">Fecha: <text:span text:style-name="T5"><text:s/></text:span><text:span text:style-name="T4">27</text:span><text:span text:style-name="T5">– 0</text:span><text:span text:style-name="T4">5</text:span><text:span text:style-name="T5"> – 2026</text:span></text:p>
          </table:table-cell>
        </table:table-row>
        <table:table-row table:style-name="Resumen-Proyecto.2">
          <table:table-cell table:style-name="Resumen-Proyecto.B2" table:number-columns-spanned="2" office:value-type="string">
            <text:p text:style-name="P13">Tutor: <text:span text:style-name="T5">Juan Limón </text:span><text:span text:style-name="T6">Limón</text:span></text:p>
          </table:table-cell>
          <table:covered-table-cell/>
        </table:table-row>
        <table:table-row table:style-name="Resumen-Proyecto.2">
          <table:table-cell table:style-name="Resumen-Proyecto.B2" table:number-columns-spanned="2" office:value-type="string">
            <text:p text:style-name="P13">Titulación: <text:span text:style-name="T5">Sistemas Microinformáticos y Redes</text:span></text:p>
          </table:table-cell>
          <table:covered-table-cell/>
        </table:table-row>
        <table:table-row table:style-name="Resumen-Proyecto.2">
          <table:table-cell table:style-name="Resumen-Proyecto.B2" table:number-columns-spanned="2" office:value-type="string">
            <text:p text:style-name="P13">Palabras clave: </text:p>
            <text:p text:style-name="P14"><text:span text:style-name="T7">Castellano - </text:span><text:span text:style-name="T8">Nextcloud, nube privada, Proxmox, HTTPS, almacenamiento, ngrok</text:span></text:p>
            <text:p text:style-name="P15"><text:span text:style-name="T9">Inglés</text:span><text:span text:style-name="T10"> - </text:span><text:span text:style-name="T11">Nextcloud, private cloud, Proxmox, HTTPS, storage, ngrok</text:span></text:p>
          </table:table-cell>
          <table:covered-table-cell/>
        </table:table-row>
        <table:table-row>
          <table:table-cell table:style-name="Resumen-Proyecto.B2" table:number-columns-spanned="2" office:value-type="string">
            <text:p text:style-name="P16">RESUMEN DEL PROYECTO (ESPAÑOL)</text:p>
            <text:p text:style-name="P17">El proyecto PrivaNube consiste en la implantación de una nube privada basada en Nextcloud para la empresa Infosur, con el objetivo de centralizar el almacenamiento de archivos y facilitar el acceso a la información de forma segura.<text:line-break/><text:line-break/>La solución se ha desplegado sobre un servidor virtualizado en Proxmox, permitiendo el acceso local mediante https://10.4.0.206 y el acceso externo a través de un túnel público generado con ngrok.<text:line-break/><text:line-break/>Además, se ha configurado el acceso mediante HTTPS para proteger las conexiones. El proyecto permite simular una solución realista de nube privada para una pequeña empresa, aplicando conocimientos de sistemas, redes, virtualización y seguridad.</text:p>
            <text:p text:style-name="P18">PROJECT SUMMARY (ENGLISH)</text:p>
            <text:p text:style-name="P19">The PrivaNube project consists of deploying a private cloud solution based on Nextcloud for the company Infosur, with the aim of centralizing file storage and improving secure access to information.<text:line-break/><text:line-break/>The solution has been deployed on a virtualized server using Proxmox, allowing local access through https://10.4.0.206 and external access through a public tunnel generated with ngrok.<text:line-break/><text:line-break/>In addition, HTTPS access has been configured to protect communications. This project simulates a realistic private cloud solution for a small company, applying knowledge of systems, networking, virtualization and security.</text:p>
          </table:table-cell>
          <table:covered-table-cell/>
        </table:table-row>
      </table:table>
      <text:p text:style-name="P20"/>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21">Indice</text:p>
          </text:index-title>
          <text:p text:style-name="P22"><text:a xlink:type="simple" xlink:href="#__RefHeading___Toc62_1307444459" text:style-name="Index_20_Link" text:visited-style-name="Index_20_Link">Introducción<text:tab/>4</text:a></text:p>
          <text:p text:style-name="P23"><text:a xlink:type="simple" xlink:href="#__RefHeading___Toc64_1307444459" text:style-name="Index_20_Link" text:visited-style-name="Index_20_Link">1.1 Introducción a la memoria<text:tab/>4</text:a></text:p>
          <text:p text:style-name="P23"><text:a xlink:type="simple" xlink:href="#__RefHeading___Toc64_1307444459%20Copia%201" text:style-name="Index_20_Link" text:visited-style-name="Index_20_Link">1.2 Descripción<text:tab/>4</text:a></text:p>
          <text:p text:style-name="P23"><text:a xlink:type="simple" xlink:href="#__RefHeading___Toc64_1307444459%20Copia%201%20Copia%201" text:style-name="Index_20_Link" text:visited-style-name="Index_20_Link">1.3 Objetivos generales<text:tab/>5</text:a></text:p>
          <text:p text:style-name="P23"><text:a xlink:type="simple" xlink:href="#__RefHeading___Toc508_193255832" text:style-name="Index_20_Link" text:visited-style-name="Index_20_Link">1.4 Beneficios<text:tab/>5</text:a></text:p>
          <text:p text:style-name="P23"><text:a xlink:type="simple" xlink:href="#__RefHeading___Toc510_193255832" text:style-name="Index_20_Link" text:visited-style-name="Index_20_Link">1.5 Motivaciones personales<text:tab/>6</text:a></text:p>
          <text:p text:style-name="P23"><text:a xlink:type="simple" xlink:href="#__RefHeading___Toc512_193255832" text:style-name="Index_20_Link" text:visited-style-name="Index_20_Link">1.6 Estructura de la memoria<text:tab/>6</text:a></text:p>
          <text:p text:style-name="P22"><text:a xlink:type="simple" xlink:href="#__RefHeading___Toc514_193255832" text:style-name="Index_20_Link" text:visited-style-name="Index_20_Link">Estudio de viabilidad<text:tab/>7</text:a></text:p>
          <text:p text:style-name="P23"><text:a xlink:type="simple" xlink:href="#__RefHeading___Toc516_193255832" text:style-name="Index_20_Link" text:visited-style-name="Index_20_Link">2.1 Introducción<text:tab/>7</text:a></text:p>
          <text:p text:style-name="P24"><text:a xlink:type="simple" xlink:href="#__RefHeading___Toc518_193255832" text:style-name="Index_20_Link" text:visited-style-name="Index_20_Link">2.1.1 Tipología y palabras clave<text:tab/>7</text:a></text:p>
          <text:p text:style-name="P24"><text:a xlink:type="simple" xlink:href="#__RefHeading___Toc520_193255832" text:style-name="Index_20_Link" text:visited-style-name="Index_20_Link">2.1.2 Descripción<text:tab/>8</text:a></text:p>
          <text:p text:style-name="P24"><text:a xlink:type="simple" xlink:href="#__RefHeading___Toc522_193255832" text:style-name="Index_20_Link" text:visited-style-name="Index_20_Link">2.1.3 Objetivos del proyecto<text:tab/>8</text:a></text:p>
          <text:p text:style-name="P24"><text:a xlink:type="simple" xlink:href="#__RefHeading___Toc524_193255832" text:style-name="Index_20_Link" text:visited-style-name="Index_20_Link">2.1.4 Clasificación de los objetivos<text:tab/>9</text:a></text:p>
          <text:p text:style-name="P24"><text:a xlink:type="simple" xlink:href="#__RefHeading___Toc526_193255832" text:style-name="Index_20_Link" text:visited-style-name="Index_20_Link">2.1.5 Definiciones, acrónimos y abreviaciones<text:tab/>9</text:a></text:p>
          <text:p text:style-name="P24"><text:a xlink:type="simple" xlink:href="#__RefHeading___Toc528_193255832" text:style-name="Index_20_Link" text:visited-style-name="Index_20_Link">2.1.6 Partes interesadas<text:tab/>10</text:a></text:p>
          <text:p text:style-name="P24"><text:a xlink:type="simple" xlink:href="#__RefHeading___Toc530_193255832" text:style-name="Index_20_Link" text:visited-style-name="Index_20_Link">2.1.7 Referencias<text:tab/>10</text:a></text:p>
          <text:p text:style-name="P24"><text:a xlink:type="simple" xlink:href="#__RefHeading___Toc532_193255832" text:style-name="Index_20_Link" text:visited-style-name="Index_20_Link">2.1.8 Documentación del proyecto<text:tab/>11</text:a></text:p>
          <text:p text:style-name="P23"><text:a xlink:type="simple" xlink:href="#__RefHeading___Toc534_193255832" text:style-name="Index_20_Link" text:visited-style-name="Index_20_Link">2.2 Estudio de la situación actual<text:tab/>11</text:a></text:p>
          <text:p text:style-name="P24"><text:a xlink:type="simple" xlink:href="#__RefHeading___Toc536_193255832" text:style-name="Index_20_Link" text:visited-style-name="Index_20_Link">2.2.1 Contexto<text:tab/>11</text:a></text:p>
          <text:p text:style-name="P24"><text:a xlink:type="simple" xlink:href="#__RefHeading___Toc538_193255832" text:style-name="Index_20_Link" text:visited-style-name="Index_20_Link">2.2.2 Lógica del sistema<text:tab/>11</text:a></text:p>
          <text:p text:style-name="P24"><text:a xlink:type="simple" xlink:href="#__RefHeading___Toc540_193255832" text:style-name="Index_20_Link" text:visited-style-name="Index_20_Link">2.2.3 Descripción física<text:tab/>12</text:a></text:p>
          <text:p text:style-name="P24"><text:a xlink:type="simple" xlink:href="#__RefHeading___Toc542_193255832" text:style-name="Index_20_Link" text:visited-style-name="Index_20_Link">2.2.4 Diagnóstico del sistema actual<text:tab/>12</text:a></text:p>
          <text:p text:style-name="P24"><text:a xlink:type="simple" xlink:href="#__RefHeading___Toc544_193255832" text:style-name="Index_20_Link" text:visited-style-name="Index_20_Link">2.2.5 Normativa y legislación<text:tab/>12</text:a></text:p>
          <text:p text:style-name="P23"><text:a xlink:type="simple" xlink:href="#__RefHeading___Toc546_193255832" text:style-name="Index_20_Link" text:visited-style-name="Index_20_Link">2.3 Requisitos del sistema<text:tab/>13</text:a></text:p>
          <text:p text:style-name="P24"><text:a xlink:type="simple" xlink:href="#__RefHeading___Toc548_193255832" text:style-name="Index_20_Link" text:visited-style-name="Index_20_Link">2.3.1 Requisitos<text:tab/>13</text:a></text:p>
          <text:p text:style-name="P24"><text:a xlink:type="simple" xlink:href="#__RefHeading___Toc550_193255832" text:style-name="Index_20_Link" text:visited-style-name="Index_20_Link">2.3.2 Restricciones del sistema<text:tab/>13</text:a></text:p>
          <text:p text:style-name="P24"><text:a xlink:type="simple" xlink:href="#__RefHeading___Toc552_193255832" text:style-name="Index_20_Link" text:visited-style-name="Index_20_Link">2.3.3 Catalogación y priorización de los requisitos<text:tab/>14</text:a></text:p>
          <text:p text:style-name="P23"><text:a xlink:type="simple" xlink:href="#__RefHeading___Toc554_193255832" text:style-name="Index_20_Link" text:visited-style-name="Index_20_Link">2.4 Alternativas y selección de la solución<text:tab/>14</text:a></text:p>
          <text:p text:style-name="P24"><text:a xlink:type="simple" xlink:href="#__RefHeading___Toc556_193255832" text:style-name="Index_20_Link" text:visited-style-name="Index_20_Link">2.4.1 Alternativa 1: Servicios externos en la nube<text:tab/>14</text:a></text:p>
          <text:p text:style-name="P24"><text:a xlink:type="simple" xlink:href="#__RefHeading___Toc558_193255832" text:style-name="Index_20_Link" text:visited-style-name="Index_20_Link">2.4.2 Alternativa 2: Nube privada con Nextcloud<text:tab/>15</text:a></text:p>
          <text:p text:style-name="P24"><text:a xlink:type="simple" xlink:href="#__RefHeading___Toc560_193255832" text:style-name="Index_20_Link" text:visited-style-name="Index_20_Link">2.4.x Conclusiones<text:tab/>15</text:a></text:p>
          <text:p text:style-name="P23"><text:a xlink:type="simple" xlink:href="#__RefHeading___Toc562_193255832" text:style-name="Index_20_Link" text:visited-style-name="Index_20_Link">2.5 Planificación del proyecto<text:tab/>16</text:a></text:p>
          <text:p text:style-name="P24"><text:a xlink:type="simple" xlink:href="#__RefHeading___Toc564_193255832" text:style-name="Index_20_Link" text:visited-style-name="Index_20_Link">2.5.1 Recursos del proyecto<text:tab/>16</text:a></text:p>
          <text:p text:style-name="P24"><text:a xlink:type="simple" xlink:href="#__RefHeading___Toc566_193255832" text:style-name="Index_20_Link" text:visited-style-name="Index_20_Link">2.5.2 Tareas del proyecto<text:tab/>16</text:a></text:p>
          <text:p text:style-name="P24"><text:a xlink:type="simple" xlink:href="#__RefHeading___Toc568_193255832" text:style-name="Index_20_Link" text:visited-style-name="Index_20_Link">2.5.3 Planificación temporal<text:tab/>17</text:a></text:p>
          <text:p text:style-name="P23"><text:a xlink:type="simple" xlink:href="#__RefHeading___Toc570_193255832" text:style-name="Index_20_Link" text:visited-style-name="Index_20_Link">2.6 Evaluación de riesgos<text:tab/>18</text:a></text:p>
          <text:p text:style-name="P24"><text:a xlink:type="simple" xlink:href="#__RefHeading___Toc572_193255832" text:style-name="Index_20_Link" text:visited-style-name="Index_20_Link">2.6.1 Lista de riesgos<text:tab/>18</text:a></text:p>
          <text:p text:style-name="P24"><text:a xlink:type="simple" xlink:href="#__RefHeading___Toc574_193255832" text:style-name="Index_20_Link" text:visited-style-name="Index_20_Link">2.6.2 Catalogación de riesgos<text:tab/>18</text:a></text:p>
          <text:p text:style-name="P24"><text:a xlink:type="simple" xlink:href="#__RefHeading___Toc576_193255832" text:style-name="Index_20_Link" text:visited-style-name="Index_20_Link">2.6.3 Plan de contingencia<text:tab/>19</text:a></text:p>
          <text:p text:style-name="P23"><text:a xlink:type="simple" xlink:href="#__RefHeading___Toc578_193255832" text:style-name="Index_20_Link" text:visited-style-name="Index_20_Link">2.7 Presupuesto<text:tab/>20</text:a></text:p>
          <text:p text:style-name="P24"><text:a xlink:type="simple" xlink:href="#__RefHeading___Toc580_193255832" text:style-name="Index_20_Link" text:visited-style-name="Index_20_Link">2.7.1 Estimación de coste material<text:tab/>20</text:a></text:p>
          <text:p text:style-name="P24"><text:a xlink:type="simple" xlink:href="#__RefHeading___Toc582_193255832" text:style-name="Index_20_Link" text:visited-style-name="Index_20_Link">2.7.2 Estimación de coste personal<text:tab/>21</text:a></text:p>
          <text:p text:style-name="P24"><text:a xlink:type="simple" xlink:href="#__RefHeading___Toc584_193255832" text:style-name="Index_20_Link" text:visited-style-name="Index_20_Link">2.7.3 Resumen y análisis coste-beneficio<text:tab/>21</text:a></text:p>
          <text:p text:style-name="P23"><text:a xlink:type="simple" xlink:href="#__RefHeading___Toc586_193255832" text:style-name="Index_20_Link" text:visited-style-name="Index_20_Link">2.8 Conclusiones<text:tab/>23</text:a></text:p>
          <text:p text:style-name="P24"><text:a xlink:type="simple" xlink:href="#__RefHeading___Toc588_193255832" text:style-name="Index_20_Link" text:visited-style-name="Index_20_Link">2.8.1 Beneficios<text:tab/>23</text:a></text:p>
          <text:p text:style-name="P24"><text:a xlink:type="simple" xlink:href="#__RefHeading___Toc590_193255832" text:style-name="Index_20_Link" text:visited-style-name="Index_20_Link">2.8.2 Inconvenientes<text:tab/>24</text:a></text:p>
        </text:index-body>
      </text:table-of-content>
      <text:h text:style-name="P25" text:outline-level="1" text:is-list-header="true"><text:bookmark-start text:name="__RefHeading___Toc62_1307444459"/><text:soft-page-break/><text:span text:style-name="T12">1. </text:span>Introducción<text:bookmark-end text:name="__RefHeading___Toc62_1307444459"/></text:h>
      <text:h text:style-name="P26" text:outline-level="2"><text:bookmark-start text:name="__RefHeading___Toc64_1307444459"/>1.1 Introducción a la memoria<text:bookmark-end text:name="__RefHeading___Toc64_1307444459"/></text:h>
      <text:p text:style-name="P27">El presente documento recoge el desarrollo del proyecto “PrivaNube”, cuyo objetivo principal es la implantación de una nube privada basada en Nextcloud para la empresa Infosur.<text:line-break/><text:line-break/>En la actualidad, muchas empresas necesitan disponer de un sistema centralizado para almacenar, compartir y gestionar archivos de forma segura. El uso de plataformas de nube privada permite mantener un mayor control sobre la información, mejorar la organización interna y reducir la dependencia de servicios externos.<text:line-break/><text:line-break/>Este proyecto se ha desarrollado sobre un entorno virtualizado mediante Proxmox, aprovechando los recursos asignados para la realización del proyecto. Además, se ha configurado el acceso seguro mediante HTTPS y se ha habilitado el acceso externo a la interfaz web de Nextcloud utilizando un túnel público generado con ngrok.<text:line-break/><text:line-break/>La finalidad de esta memoria es explicar de forma ordenada el análisis, diseño, implementación y validación de la solución, mostrando tanto los objetivos alcanzados como las limitaciones encontradas durante el proceso.</text:p>
      <text:h text:style-name="P28" text:outline-level="2"><text:bookmark-start text:name="__RefHeading___Toc64_1307444459 Copia 1"/>1.<text:span text:style-name="T13">2 </text:span><text:span text:style-name="T14">Descripción</text:span><text:bookmark-end text:name="__RefHeading___Toc64_1307444459 Copia 1"/></text:h>
      <text:p text:style-name="P29">El proyecto PrivaNube consiste en la instalación y configuración de una plataforma de nube privada utilizando Nextcloud como aplicación principal.<text:line-break/><text:line-break/>Nextcloud permite a los usuarios almacenar archivos, acceder a ellos desde distintos dispositivos, compartir información y utilizar funciones adicionales como calendario, contactos y gestión colaborativa básica. De esta forma, se simula una solución realista para una pequeña empresa que necesita centralizar sus datos y mejorar el acceso a la información.<text:line-break/><text:line-break/><text:span text:style-name="T12">· </text:span>La infraestructura se ha desplegado sobre un servidor virtualizado en Proxmox, donde se aloja el servicio principal de Nextcloud. El acceso local se realiza mediante la dirección: https://10.4.0.206<text:line-break/><text:line-break/><text:span text:style-name="T12">· </text:span>Además, para comprobar el acceso desde fuera de la red local, se ha utilizado un túnel público mediante ngrok, accesible desde la siguiente dirección:<text:line-break/><text:line-break/>https://backache-aneurism-marsupial.ngrok-free.dev<text:line-break/><text:line-break/>Durante el desarrollo del proyecto también se ha configurado el acceso mediante HTTPS, mejorando la seguridad de las conexiones entre los usuarios y el servicio.</text:p>
      <text:h text:style-name="P30" text:outline-level="2"><text:bookmark-start text:name="__RefHeading___Toc64_1307444459 Copia 1 Copia 1"/><text:span text:style-name="T14">1.</text:span><text:span text:style-name="T15">3 </text:span><text:span text:style-name="T14">Objetivos generales</text:span><text:bookmark-end text:name="__RefHeading___Toc64_1307444459 Copia 1 Copia 1"/></text:h>
      <text:p text:style-name="P29">Los objetivos principales del proyecto son los siguientes:<text:line-break/><text:line-break/><text:span text:style-name="T12">· </text:span>Implantar una nube privada funcional basada en Nextcloud.<text:line-break/><text:span text:style-name="T12">· </text:span>Centralizar el almacenamiento de archivos de la empresa.<text:line-break/><text:span text:style-name="T12">· </text:span>Desplegar el servicio sobre una infraestructura virtualizada mediante Proxmox.<text:line-break/><text:span text:style-name="T12">· </text:span>Configurar el acceso seguro mediante HTTPS.<text:line-break/><text:span text:style-name="T12">· </text:span>Permitir el acceso local al servicio desde la red del centro.<text:line-break/><text:span text:style-name="T12">· </text:span>Validar el acceso externo a la interfaz web mediante ngrok.<text:line-break/><text:span text:style-name="T12">· </text:span>Comprobar el funcionamiento general de la plataforma mediante pruebas reales.<text:line-break/><text:span text:style-name="T12">· </text:span>Documentar las limitaciones detectadas durante el desarrollo del proyecto.</text:p>
      <text:h text:style-name="P31" text:outline-level="2"><text:bookmark-start text:name="__RefHeading___Toc508_193255832"/>1.4 Beneficios<text:bookmark-end text:name="__RefHeading___Toc508_193255832"/></text:h>
      <text:p text:style-name="P32">La implantación de PrivaNube aporta diferentes beneficios para una pequeña empresa como Infosur:<text:line-break/><text:line-break/><text:span text:style-name="T12">· </text:span>Centralización de la información en un único servicio.<text:line-break/><text:span text:style-name="T12">· </text:span>Acceso a los archivos desde distintos equipos y ubicaciones.<text:line-break/><text:span text:style-name="T12">· </text:span>Mayor control sobre los datos frente al uso exclusivo de servicios externos.<text:line-break/><text:span text:style-name="T12">· </text:span>Mejora de la seguridad mediante acceso cifrado con HTTPS.<text:line-break/><text:span text:style-name="T12">· </text:span>Posibilidad de ampliar el sistema en el futuro con más usuarios o funcionalidades.<text:line-break/><text:span text:style-name="T12">· </text:span>Uso de software libre, reduciendo costes de licencias.<text:line-break/><text:span text:style-name="T12">· </text:span>Aprovechamiento de una infraestructura virtualizada ya disponible.<text:line-break/><text:line-break/>Gracias a esta solución, la empresa puede disponer de una plataforma propia de almacenamiento y colaboración, adaptada a sus necesidades y con posibilidad de crecimiento.</text:p>
      <text:h text:style-name="Heading_20_2" text:outline-level="2">1.5 Motivaciones personales</text:h>
      <text:p text:style-name="P33">La realización de este proyecto surge como una oportunidad para aplicar de forma práctica los conocimientos adquiridos durante el ciclo formativo de Sistemas Microinformáticos y Redes.<text:line-break/><text:line-break/>Se ha elegido una solución basada en Nextcloud porque permite trabajar con conceptos reales de administración de sistemas, servicios web, virtualización, seguridad y acceso remoto. Además, se trata de una herramienta útil en entornos empresariales, especialmente para pequeñas empresas que necesitan organizar sus archivos sin depender completamente de plataformas externas.<text:line-break/><text:line-break/>El proyecto también ha supuesto un reto personal, ya que ha requerido instalar, configurar, probar y documentar una solución funcional, resolviendo incidencias reales durante el proceso.</text:p>
      <text:h text:style-name="P34" text:outline-level="2"><text:bookmark-start text:name="__RefHeading___Toc512_193255832"/>1.6 Estructura de la memoria<text:bookmark-end text:name="__RefHeading___Toc512_193255832"/></text:h>
      <text:p text:style-name="P33">El presente documento se organiza en diferentes apartados que explican las fases principales del proyecto.<text:line-break/><text:line-break/>En primer lugar, se realiza una introducción general al proyecto, describiendo su finalidad, objetivos y beneficios. A continuación, se desarrolla el estudio de viabilidad, donde se analiza la necesidad de la solución y los recursos disponibles.<text:line-break/><text:line-break/>Posteriormente, se presenta el análisis y diseño del sistema, detallando la arquitectura utilizada, la aplicación principal y la forma de acceso al servicio. Después, se explica la implementación realizada, incluyendo la instalación de Nextcloud, la configuración de HTTPS y el acceso externo mediante ngrok.<text:line-break/><text:line-break/>Finalmente, se recogen las pruebas de funcionamiento, las medidas de seguridad aplicadas, las incidencias encontradas y las conclusiones obtenidas tras la realización del proyecto.</text:p>
      <text:h text:style-name="P35" text:outline-level="1"><text:bookmark-start text:name="__RefHeading___Toc514_193255832"/>2. ESTUDIO DE VIABILIDAD<text:bookmark-end text:name="__RefHeading___Toc514_193255832"/></text:h>
      <text:h text:style-name="P36" text:outline-level="2"><text:bookmark-start text:name="__RefHeading___Toc516_193255832"/>2.1 Introducción <text:bookmark-end text:name="__RefHeading___Toc516_193255832"/></text:h>
      <text:p text:style-name="P37">El estudio de viabilidad tiene como finalidad analizar si el proyecto PrivaNube puede llevarse a cabo correctamente con los recursos disponibles y si la solución propuesta responde a las necesidades planteadas para la empresa Infosur.<text:line-break/><text:line-break/>Este proyecto se basa en la implantación de una nube privada mediante Nextcloud, desplegada sobre una infraestructura virtualizada en Proxmox. La solución permite centralizar archivos, facilitar el acceso a la información y mejorar la organización de los datos dentro de un entorno controlado.<text:line-break/><text:line-break/>Para valorar la viabilidad del proyecto, se analizan los aspectos técnicos, económicos, operativos y legales, así como los riesgos, limitaciones y alternativas posibles.</text:p>
      <text:h text:style-name="P38" text:outline-level="3"><text:bookmark-start text:name="__RefHeading___Toc518_193255832"/>2.1.1 Tipología y palabras clave<text:bookmark-end text:name="__RefHeading___Toc518_193255832"/></text:h>
      <text:p text:style-name="P37">Este proyecto pertenece a la tipología de implantación, administración y documentación de un servicio en red, ya que consiste en desplegar, configurar y validar una plataforma de nube privada accesible mediante navegador web.<text:line-break/><text:line-break/>También se puede clasificar como un proyecto de virtualización y servicios cloud, debido al uso de Proxmox como entorno de virtualización y Nextcloud como aplicación principal de almacenamiento y colaboración.<text:line-break/><text:line-break/>Palabras clave en castellano:<text:line-break/>Nextcloud, nube privada, Proxmox, HTTPS, almacenamiento, ngrok.<text:line-break/><text:line-break/>Palabras clave en inglés:<text:line-break/>Nextcloud, private cloud, Proxmox, HTTPS, storage, ngrok.</text:p>
      <text:h text:style-name="P39" text:outline-level="3"><text:bookmark-start text:name="__RefHeading___Toc520_193255832"/>2.1.2 Descripción<text:bookmark-end text:name="__RefHeading___Toc520_193255832"/></text:h>
      <text:p text:style-name="P40">El proyecto PrivaNube consiste en la implantación de una nube privada basada en Nextcloud, destinada a centralizar el almacenamiento de archivos y facilitar el acceso a la información de forma organizada.<text:line-break/><text:line-break/>La solución se aloja sobre un servidor virtualizado mediante Proxmox, aprovechando los recursos asignados para el desarrollo del proyecto. Nextcloud permite gestionar archivos, usuarios y servicios adicionales como calendario, contactos y compartición de documentos.<text:line-break/><text:line-break/>El sistema dispone de acceso local mediante la dirección: https://10.4.0.206<text:line-break/><text:line-break/>Además, se ha habilitado el acceso externo a la interfaz web mediante una URL pública generada con ngrok: https://backache-aneurism-marsupial.ngrok-free.dev<text:line-break/><text:line-break/>Gracias a esta configuración, el proyecto permite demostrar el funcionamiento de una nube privada en un entorno realista, tanto desde la red local como desde ubicaciones externas.</text:p>
      <text:h text:style-name="Heading_20_3" text:outline-level="3">2.1.3 Objetivos del proyecto</text:h>
      <text:p text:style-name="P33"><text:span text:style-name="T16">El proyecto se ha planteado siguiendo un enfoque MVP (Minimum Viable Product), es decir, una versión mínima funcional que permita validar el objetivo principal del sistema sin añadir complejidad innecesaria.<text:line-break/><text:line-break/>El MVP de PrivaNube se centra en los siguientes elementos:<text:line-break/><text:line-break/></text:span><text:span text:style-name="T17">· </text:span><text:span text:style-name="T16">Servidor virtualizado mediante Proxmox.<text:line-break/></text:span><text:span text:style-name="T17">· </text:span><text:span text:style-name="T16">Instalación y configuración de Nextcloud.<text:line-break/></text:span><text:span text:style-name="T17">· </text:span><text:span text:style-name="T16">Acceso local seguro mediante HTTPS.<text:line-break/></text:span><text:span text:style-name="T17">· </text:span><text:span text:style-name="T16">Acceso externo a la interfaz web mediante ngrok.<text:line-break/></text:span><text:span text:style-name="T17">· </text:span><text:span text:style-name="T16">Validación del funcionamiento desde diferentes equipos.<text:line-break/></text:span><text:span text:style-name="T17">· </text:span><text:span text:style-name="T16">Uso básico de la plataforma para almacenamiento y acceso a archivos.<text:line-break/><text:line-break/>No se contempla en esta fase una implantación empresarial completa con dominio propio definitivo, alta disponibilidad o integración avanzada con otros sistemas. Estas mejoras quedan planteadas como posibles ampliaciones futuras.<text:line-break/><text:line-break/>Este enfoque permite asegurar primero el funcionamiento principal de la solución antes de añadir elementos más complejos.</text:span></text:p>
      <text:h text:style-name="P39" text:outline-level="3"><text:bookmark-start text:name="__RefHeading___Toc524_193255832"/>2.1.4 Clasificación de los objetivos<text:bookmark-end text:name="__RefHeading___Toc524_193255832"/></text:h>
      <text:p text:style-name="P33"><text:span text:style-name="T16">El objetivo principal del proyecto es implantar una nube privada funcional basada en Nextcloud, desplegada sobre una infraestructura virtualizada mediante Proxmox, que permita centralizar archivos y acceder a ellos de forma segura.<text:line-break/><text:line-break/>Los objetivos principales son:<text:line-break/><text:line-break/></text:span><text:span text:style-name="T17">· </text:span><text:span text:style-name="T16">Implantar una plataforma de nube privada mediante Nextcloud.<text:line-break/></text:span><text:span text:style-name="T17">· </text:span><text:span text:style-name="T16">Centralizar el almacenamiento de archivos de la empresa.<text:line-break/></text:span><text:span text:style-name="T17">· </text:span><text:span text:style-name="T16">Desplegar el servicio sobre un entorno virtualizado con Proxmox.<text:line-break/></text:span><text:span text:style-name="T17">· </text:span><text:span text:style-name="T16">Configurar acceso seguro mediante HTTPS.<text:line-break/></text:span><text:span text:style-name="T17">· </text:span><text:span text:style-name="T16">Permitir el acceso local al servicio desde la red del centro.<text:line-break/></text:span><text:span text:style-name="T17">· </text:span><text:span text:style-name="T16">Validar el acceso externo mediante ngrok.<text:line-break/></text:span><text:span text:style-name="T17">· </text:span><text:span text:style-name="T16">Comprobar el funcionamiento de la plataforma desde diferentes equipos.<text:line-break/></text:span><text:span text:style-name="T17">· </text:span><text:span text:style-name="T16">Documentar la instalación, configuración, pruebas y limitaciones detectadas.</text:span></text:p>
      <text:h text:style-name="P38" text:outline-level="3"><text:bookmark-start text:name="__RefHeading___Toc526_193255832"/>2.1.5 Definiciones, acrónimos y abreviaciones<text:bookmark-end text:name="__RefHeading___Toc526_193255832"/></text:h>
      <text:p text:style-name="P33"><text:span text:style-name="T18">· </text:span>En este apartado se recogen algunos términos técnicos utilizados durante el desarrollo del proyecto:</text:p>
      <text:p text:style-name="P33"><text:span text:style-name="T18">· </text:span>Nextcloud: plataforma de software libre que permite crear una nube privada para almacenar archivos, compartir documentos y utilizar herramientas colaborativas.</text:p>
      <text:p text:style-name="P33"><text:span text:style-name="T18">· </text:span>Nube privada: sistema de almacenamiento y servicios online gestionado por la propia organización, sin depender completamente de proveedores externos.</text:p>
      <text:p text:style-name="P33"><text:span text:style-name="T18">· </text:span>Usuario: cuenta individual que permite acceder a la plataforma con unos permisos determinados.</text:p>
      <text:p text:style-name="P33"><text:span text:style-name="T18">· </text:span>Grupo: conjunto de usuarios organizados según su función o departamento dentro de la empresa.</text:p>
      <text:p text:style-name="P33"><text:span text:style-name="T18">· </text:span>Permisos: reglas que determinan qué puede ver, modificar, compartir o utilizar cada usuario dentro del sistema.</text:p>
      <text:p text:style-name="P33"><text:span text:style-name="T18">· </text:span>Calendario compartido: herramienta que permite organizar eventos, reuniones y tareas visibles para determinados usuarios o grupos.</text:p>
      <text:p text:style-name="P33"><text:span text:style-name="T18">· </text:span>Chat interno: sistema de comunicación entre usuarios dentro de la propia plataforma.</text:p>
      <text:p text:style-name="P33"><text:span text:style-name="T18">· </text:span>Videollamada: función que permite realizar reuniones online mediante audio y vídeo.</text:p>
      <text:p text:style-name="P33"><text:span text:style-name="T18">· </text:span>Software libre: tipo de software que puede ser utilizado, estudiado, modificado y distribuido bajo ciertas condiciones.</text:p>
      <text:p text:style-name="P33"><text:span text:style-name="T18">· </text:span>Servidor: equipo o máquina encargada de ofrecer servicios a otros dispositivos de la red.</text:p>
      <text:p text:style-name="P33"><text:span text:style-name="T19">· </text:span>Administrador: usuario con permisos avanzados para configurar la plataforma, gestionar cuentas y controlar el sistema.</text:p>
      <text:h text:style-name="P38" text:outline-level="3"><text:bookmark-start text:name="__RefHeading___Toc528_193255832"/><text:soft-page-break/>2.1.6 Partes interesadas<text:bookmark-end text:name="__RefHeading___Toc528_193255832"/></text:h>
      <text:p text:style-name="P33"><text:span text:style-name="T19">· </text:span>Las partes interesadas del proyecto son aquellas personas o entidades que participan en el desarrollo, uso o valoración de la solución implantada.</text:p>
      <text:p text:style-name="P33"><text:span text:style-name="T19">· </text:span>En primer lugar, se encuentra la empresa Infosur, como organización para la que se plantea la implantación de PrivaNube. La solución está orientada a mejorar la gestión de archivos, calendarios, comunicación interna y reuniones online.</text:p>
      <text:p text:style-name="P33"><text:span text:style-name="T19">· </text:span>También forman parte del proyecto los usuarios finales, que utilizarán la plataforma para acceder a documentos, consultar calendarios, comunicarse mediante chat o participar en reuniones online, siempre según los permisos asignados.</text:p>
      <text:p text:style-name="P33"><text:span text:style-name="T19">· </text:span>Otra parte interesada es el administrador del sistema, encargado de configurar Nextcloud, crear usuarios y grupos, asignar permisos, revisar el funcionamiento de la plataforma y realizar tareas básicas de mantenimiento.</text:p>
      <text:p text:style-name="P33"><text:span text:style-name="T19">· </text:span>Por último, el centro educativo y el profesorado también forman parte del proyecto, ya que evaluarán la planificación, documentación, desarrollo técnico y resultados obtenidos.</text:p>
      <text:h text:style-name="P38" text:outline-level="3"><text:bookmark-start text:name="__RefHeading___Toc530_193255832"/>2.1.7 Referencias<text:bookmark-end text:name="__RefHeading___Toc530_193255832"/></text:h>
      <text:p text:style-name="P33"><text:span text:style-name="T19">· </text:span>Para el desarrollo del proyecto se han tomado como referencia diferentes fuentes relacionadas con la implantación de servicios en red, administración de sistemas y uso de plataformas colaborativas.</text:p>
      <text:p text:style-name="P33"><text:span text:style-name="T19">· </text:span>Las principales referencias utilizadas son:</text:p>
      <text:p text:style-name="P33">- Documentación oficial de Nextcloud.</text:p>
      <text:p text:style-name="P33">- Documentación sobre administración básica de servidores Linux.</text:p>
      <text:p text:style-name="P33">- Información técnica sobre usuarios, grupos y permisos en plataformas colaborativas.</text:p>
      <text:p text:style-name="P33">- Materiales trabajados durante el ciclo formativo de Sistemas Microinformáticos y Redes.</text:p>
      <text:p text:style-name="P33">- Requisitos y estructura indicados en el documento de planificación del Proyecto Intermodular.</text:p>
      <text:h text:style-name="P39" text:outline-level="3"><text:bookmark-start text:name="__RefHeading___Toc532_193255832"/>2.1.8 Documentación del proyecto<text:bookmark-end text:name="__RefHeading___Toc532_193255832"/></text:h>
      <text:p text:style-name="P33"><text:span text:style-name="T20">· </text:span>La documentación del proyecto recoge de forma ordenada todas las fases realizadas durante el desarrollo de PrivaNube.</text:p>
      <text:p text:style-name="P33"><text:span text:style-name="T20">· </text:span>En ella se incluyen la planificación inicial, el análisis de necesidades, el estudio de viabilidad, el diseño de la solución, la implementación de Nextcloud, la configuración de usuarios, grupos y permisos, así como las pruebas realizadas sobre archivos, calendario, chat y videollamadas.</text:p>
      <text:p text:style-name="P33"><text:span text:style-name="T20">· </text:span>También se incorporarán capturas de pantalla y explicaciones técnicas que permitan justificar el trabajo realizado y comprobar el correcto funcionamiento de la plataforma.</text:p>
      <text:p text:style-name="P33"><text:span text:style-name="T20">· </text:span>El objetivo de esta documentación es dejar constancia del proceso seguido y facilitar la comprensión, evaluación y posible mantenimiento futuro del sistema.</text:p>
      <text:h text:style-name="P31" text:outline-level="2"><text:bookmark-start text:name="__RefHeading___Toc534_193255832"/>2.2 Estudio de la situación actual<text:bookmark-end text:name="__RefHeading___Toc534_193255832"/></text:h>
      <text:h text:style-name="P38" text:outline-level="3"><text:bookmark-start text:name="__RefHeading___Toc536_193255832"/>2.2.1 Contexto<text:bookmark-end text:name="__RefHeading___Toc536_193255832"/></text:h>
      <text:p text:style-name="P33"><text:span text:style-name="T21">· </text:span>Infosur es una empresa del sector informático que trabaja con documentación, clientes, tareas internas y comunicación entre diferentes usuarios. En este tipo de entorno, la organización de la información es un aspecto importante para mantener un trabajo ordenado y eficiente.</text:p>
      <text:p text:style-name="P33"><text:span text:style-name="T21">· </text:span>Actualmente, muchas empresas necesitan disponer de herramientas que permitan almacenar archivos, compartir documentos, organizar reuniones, gestionar calendarios y comunicarse de forma interna. Por ello, el proyecto PrivaNube se plantea como una solución para centralizar estos servicios en una plataforma privada basada en Nextcloud.</text:p>
      <text:h text:style-name="P38" text:outline-level="3"><text:bookmark-start text:name="__RefHeading___Toc538_193255832"/>2.2.2 Lógica del sistema<text:bookmark-end text:name="__RefHeading___Toc538_193255832"/></text:h>
      <text:p text:style-name="P33"><text:span text:style-name="T21">· La lógica del sistema se basa en una plataforma centralizada a la que los usuarios podrán acceder mediante navegador web, tanto desde la red local como desde el exterior mediante el dominio configurado.</text:span> Cada usuario contará con una cuenta propia y unos permisos determinados según su función dentro de la empresa.</text:p>
      <text:p text:style-name="P33"><text:span text:style-name="T21">· </text:span>El sistema permitirá almacenar archivos, compartir carpetas, gestionar calendarios, utilizar chat interno y realizar reuniones online. El acceso a estas funciones dependerá de los grupos y permisos configurados por el administrador.</text:p>
      <text:p text:style-name="P33"><text:span text:style-name="T21">· </text:span>De esta forma, no todos los usuarios tendrán acceso a los mismos recursos, sino que la plataforma se organizará según las necesidades de cada perfil.</text:p>
      <text:h text:style-name="P39" text:outline-level="3"><text:bookmark-start text:name="__RefHeading___Toc540_193255832"/>2.2.3 Descripción física<text:bookmark-end text:name="__RefHeading___Toc540_193255832"/></text:h>
      <text:p text:style-name="P33"><text:span text:style-name="T21">· </text:span>La solución se implantará sobre un servidor preparado para alojar Nextcloud y los servicios necesarios para su funcionamiento. Este servidor será el encargado de ofrecer acceso a la plataforma, almacenar los datos y gestionar las cuentas de usuario.</text:p>
      <text:p text:style-name="P33"><text:span text:style-name="T21">· </text:span>Los usuarios accederán al sistema desde equipos cliente conectados a la red, utilizando un navegador web. Desde estos equipos podrán iniciar sesión, subir y descargar archivos, consultar calendarios, participar en chats y acceder a reuniones online.</text:p>
      <text:p text:style-name="P33"><text:span text:style-name="T21">· </text:span>La estructura física básica estará formada por el servidor, la red de conexión y los dispositivos cliente utilizados por los usuarios.</text:p>
      <text:p text:style-name="P41">· Además, la solución contará con acceso externo mediante dominio, permitiendo que los usuarios autorizados puedan acceder a la plataforma fuera de la red local.</text:p>
      <text:h text:style-name="P38" text:outline-level="3"><text:bookmark-start text:name="__RefHeading___Toc542_193255832"/>2.2.4 Diagnóstico del sistema actual<text:bookmark-end text:name="__RefHeading___Toc542_193255832"/></text:h>
      <text:p text:style-name="P33"><text:span text:style-name="T21">· </text:span>La situación actual presenta la necesidad de mejorar la organización y centralización de la información. Si los archivos se encuentran repartidos entre distintos equipos, correos electrónicos o servicios externos, puede resultar más difícil controlar el acceso, mantener una estructura ordenada y evitar pérdidas de información.</text:p>
      <text:p text:style-name="P33"><text:span text:style-name="T21">· </text:span>También puede existir una dependencia de herramientas externas para tareas como compartir documentos, organizar reuniones o comunicarse entre usuarios. Esto puede generar falta de control sobre los datos y una gestión menos unificada.</text:p>
      <text:p text:style-name="P33"><text:span text:style-name="T21">· </text:span>Por este motivo, se considera adecuada la implantación de una nube privada que permita reunir en una misma plataforma el almacenamiento, los permisos, los calendarios, el chat y las reuniones online.</text:p>
      <text:h text:style-name="P38" text:outline-level="3"><text:bookmark-start text:name="__RefHeading___Toc544_193255832"/>2.2.5 Normativa y legislación<text:bookmark-end text:name="__RefHeading___Toc544_193255832"/></text:h>
      <text:p text:style-name="P33"><text:span text:style-name="T21">· </text:span>Al tratarse de una plataforma destinada a almacenar información y gestionar usuarios, el proyecto debe tener en cuenta la protección de datos y la seguridad de la información.</text:p>
      <text:p text:style-name="P33"><text:span text:style-name="T21">· </text:span>La solución debe respetar principios básicos como el control de acceso mediante usuarios y contraseñas, la asignación de permisos adecuados, la limitación del acceso a la información según cada perfil y la protección de los datos almacenados.</text:p>
      <text:p text:style-name="P33"><text:span text:style-name="T21">· </text:span>Además, al estar orientado a un entorno empresarial, es importante considerar el cumplimiento de la normativa de protección de datos vigente, especialmente en relación con el tratamiento, almacenamiento y acceso a información interna o de clientes.</text:p>
      <text:h text:style-name="P34" text:outline-level="2"><text:bookmark-start text:name="__RefHeading___Toc546_193255832"/>2.3 Requisitos del sistema<text:bookmark-end text:name="__RefHeading___Toc546_193255832"/></text:h>
      <text:h text:style-name="P38" text:outline-level="3"><text:bookmark-start text:name="__RefHeading___Toc548_193255832"/>2.3.1 Requisitos<text:bookmark-end text:name="__RefHeading___Toc548_193255832"/></text:h>
      <text:p text:style-name="P33"><text:span text:style-name="T22">· </text:span>Para que el proyecto PrivaNube funcione correctamente, el sistema debe cumplir una serie de requisitos técnicos y funcionales.</text:p>
      <text:p text:style-name="P33"><text:span text:style-name="T22">· </text:span>En primer lugar, será necesario disponer de un servidor donde instalar Nextcloud y los servicios necesarios para su funcionamiento. Este servidor deberá contar con recursos suficientes de almacenamiento, memoria y procesador para permitir el acceso de varios usuarios.</text:p>
      <text:p text:style-name="P33"><text:span text:style-name="T22">· </text:span>También será necesario configurar una base de datos, un servidor web y los componentes necesarios para que la plataforma pueda ejecutarse correctamente. Además, el sistema deberá permitir la creación de usuarios y grupos, la asignación de permisos y el acceso mediante navegador web.</text:p>
      <text:p text:style-name="P33"><text:span text:style-name="T22">· </text:span>Desde el punto de vista funcional, la plataforma deberá permitir almacenar archivos, compartir documentos, usar calendarios, realizar reuniones online, utilizar chat interno y controlar el acceso a estos servicios según los permisos configurados.</text:p>
      <text:p text:style-name="P41">· También será necesario configurar el acceso externo mediante un dominio, permitiendo que la plataforma pueda ser utilizada desde fuera de la red local de forma controlada.</text:p>
      <text:h text:style-name="P38" text:outline-level="3"><text:bookmark-start text:name="__RefHeading___Toc550_193255832"/>2.3.2 Restricciones del sistema<text:bookmark-end text:name="__RefHeading___Toc550_193255832"/></text:h>
      <text:p text:style-name="P33"><text:span text:style-name="T22">· </text:span>El proyecto presenta algunas restricciones que deben tenerse en cuenta durante su desarrollo.</text:p>
      <text:p text:style-name="P33"><text:span text:style-name="T22">· </text:span>La primera restricción está relacionada con los recursos disponibles, ya que la solución se implantará en un entorno limitado y no en una infraestructura empresarial completa. Por este motivo, el sistema se adaptará a un escenario de pruebas realista, pero controlado.</text:p>
      <text:p text:style-name="P33"><text:span text:style-name="T22">· </text:span>Otra restricción importante es el tiempo disponible para realizar el proyecto, documentarlo y comprobar su funcionamiento. Por ello, se priorizarán las funciones principales de Nextcloud: archivos, usuarios, grupos, permisos, calendario, chat y videollamadas.</text:p>
      <text:p text:style-name="P33"><text:span text:style-name="T22">· </text:span>También se tendrá en cuenta que la solución debe ser sencilla de administrar y comprensible para su evaluación, evitando configuraciones excesivamente complejas que no aporten valor directo al objetivo principal del proyecto.</text:p>
      <text:h text:style-name="P39" text:outline-level="3"><text:bookmark-start text:name="__RefHeading___Toc552_193255832"/>2.3.3 Catalogación y priorización de los requisitos<text:bookmark-end text:name="__RefHeading___Toc552_193255832"/></text:h>
      <text:p text:style-name="P33"><text:span text:style-name="T22">· </text:span>Los requisitos del sistema se pueden clasificar según su importancia dentro del proyecto.</text:p>
      <text:p text:style-name="P33"><text:span text:style-name="T22">· </text:span>Los requisitos prioritarios son aquellos necesarios para que la plataforma funcione correctamente. Entre ellos se encuentran la instalación de Nextcloud, el acceso mediante navegador, la creación de usuarios y grupos, la gestión de permisos y el almacenamiento de archivos.</text:p>
      <text:p text:style-name="P33"><text:span text:style-name="T22">· </text:span>Los requisitos importantes son aquellos que amplían la utilidad de la plataforma, como los calendarios compartidos, el chat interno y las videollamadas. Estas funciones mejoran la colaboración dentro de la empresa y aportan más valor al proyecto.</text:p>
      <text:p text:style-name="P33"><text:span text:style-name="T22">· </text:span>Por último, existen requisitos secundarios o de ampliación que podrían mejorarse en el futuro, como una configuración avanzada de seguridad, copias de seguridad automáticas o la integración con otros servicios empresariales..</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42">Prioridad</text:p>
            </table:table-cell>
            <table:table-cell table:style-name="Tabla2.A1" office:value-type="string">
              <text:p text:style-name="P42">Requisito</text:p>
            </table:table-cell>
            <table:table-cell table:style-name="Tabla2.A1" office:value-type="string">
              <text:p text:style-name="P42">Importancia</text:p>
            </table:table-cell>
          </table:table-row>
        </table:table-header-rows>
        <table:table-row>
          <table:table-cell table:style-name="Tabla2.A1" office:value-type="string">
            <text:p text:style-name="P43">Alta</text:p>
          </table:table-cell>
          <table:table-cell table:style-name="Tabla2.A1" office:value-type="string">
            <text:p text:style-name="P43">Instalación de Nextcloud</text:p>
          </table:table-cell>
          <table:table-cell table:style-name="Tabla2.A1" office:value-type="string">
            <text:p text:style-name="P43">Necesario para el funcionamiento del sistema</text:p>
          </table:table-cell>
        </table:table-row>
        <table:table-row>
          <table:table-cell table:style-name="Tabla2.A1" office:value-type="string">
            <text:p text:style-name="P43">Alta</text:p>
          </table:table-cell>
          <table:table-cell table:style-name="Tabla2.A1" office:value-type="string">
            <text:p text:style-name="P43">Usuarios, grupos y permisos</text:p>
          </table:table-cell>
          <table:table-cell table:style-name="Tabla2.A1" office:value-type="string">
            <text:p text:style-name="P43">Controla el acceso a la plataforma</text:p>
          </table:table-cell>
        </table:table-row>
        <table:table-row>
          <table:table-cell table:style-name="Tabla2.A1" office:value-type="string">
            <text:p text:style-name="P43">Alta</text:p>
          </table:table-cell>
          <table:table-cell table:style-name="Tabla2.A1" office:value-type="string">
            <text:p text:style-name="P43">Almacenamiento de archivos</text:p>
          </table:table-cell>
          <table:table-cell table:style-name="Tabla2.A1" office:value-type="string">
            <text:p text:style-name="P43">Función principal del proyecto</text:p>
          </table:table-cell>
        </table:table-row>
        <table:table-row>
          <table:table-cell table:style-name="Tabla2.A1" office:value-type="string">
            <text:p text:style-name="P43">Media</text:p>
          </table:table-cell>
          <table:table-cell table:style-name="Tabla2.A1" office:value-type="string">
            <text:p text:style-name="P43">Calendarios compartidos</text:p>
          </table:table-cell>
          <table:table-cell table:style-name="Tabla2.A1" office:value-type="string">
            <text:p text:style-name="P43">Mejora la organización interna</text:p>
          </table:table-cell>
        </table:table-row>
        <table:table-row>
          <table:table-cell table:style-name="Tabla2.A1" office:value-type="string">
            <text:p text:style-name="P43">Media</text:p>
          </table:table-cell>
          <table:table-cell table:style-name="Tabla2.A1" office:value-type="string">
            <text:p text:style-name="P43">Chat y videollamadas</text:p>
          </table:table-cell>
          <table:table-cell table:style-name="Tabla2.A1" office:value-type="string">
            <text:p text:style-name="P43">Mejora la comunicación entre usuarios</text:p>
          </table:table-cell>
        </table:table-row>
        <table:table-row>
          <table:table-cell table:style-name="Tabla2.A1" office:value-type="string">
            <text:p text:style-name="P43">Baja</text:p>
          </table:table-cell>
          <table:table-cell table:style-name="Tabla2.A1" office:value-type="string">
            <text:p text:style-name="P43">Copias de seguridad automáticas</text:p>
          </table:table-cell>
          <table:table-cell table:style-name="Tabla2.A1" office:value-type="string">
            <text:p text:style-name="P43">Mejora futura del sistema</text:p>
          </table:table-cell>
        </table:table-row>
        <table:table-row>
          <table:table-cell table:style-name="Tabla2.A1" office:value-type="string">
            <text:p text:style-name="P43">Alta </text:p>
          </table:table-cell>
          <table:table-cell table:style-name="Tabla2.A1" office:value-type="string">
            <text:p text:style-name="P43">Acceso externo mediante dominio </text:p>
          </table:table-cell>
          <table:table-cell table:style-name="Tabla2.A1" office:value-type="string">
            <text:p text:style-name="P43">Permite acceder a la plataforma desde fuera de la red local </text:p>
          </table:table-cell>
        </table:table-row>
      </table:table>
      <text:h text:style-name="P31" text:outline-level="2" text:is-list-header="true"><text:bookmark-start text:name="__RefHeading___Toc554_193255832"/>2.4 Alternativas y selección de la solución<text:bookmark-end text:name="__RefHeading___Toc554_193255832"/></text:h>
      <text:h text:style-name="P38" text:outline-level="3"><text:bookmark-start text:name="__RefHeading___Toc556_193255832"/>2.4.1 Alternativa 1: Servicios externos en la nube<text:bookmark-end text:name="__RefHeading___Toc556_193255832"/></text:h>
      <text:p text:style-name="P33"><text:span text:style-name="T23">· </text:span>Una posible alternativa sería utilizar servicios externos como Google Drive, OneDrive o Dropbox. Estas plataformas permiten almacenar archivos, compartir documentos y acceder a la información desde distintos dispositivos.</text:p>
      <text:p text:style-name="P33"><text:span text:style-name="T23">· </text:span>La principal ventaja de esta opción es que no requiere instalar ni mantener un servidor propio, ya que toda la infraestructura depende del proveedor externo. Además, suelen ser herramientas fáciles de usar y conocidas por muchos usuarios.</text:p>
      <text:p text:style-name="P33"><text:span text:style-name="T23">· </text:span>Sin embargo, esta alternativa implica una mayor dependencia de terceros, menor control sobre la ubicación y gestión de los datos, posibles limitaciones según el plan contratado y costes asociados al número de usuarios o al espacio de almacenamiento necesario.</text:p>
      <text:p text:style-name="P33"><text:soft-page-break/><text:span text:style-name="T23">· </text:span>Por estos motivos, aunque es una opción cómoda, no se considera la más adecuada para un proyecto orientado a implantar una solución propia, administrable y controlada por la empresa.</text:p>
      <text:h text:style-name="P38" text:outline-level="3"><text:bookmark-start text:name="__RefHeading___Toc558_193255832"/>2.4.2 Alternativa 2: Nube privada con Nextcloud<text:bookmark-end text:name="__RefHeading___Toc558_193255832"/></text:h>
      <text:p text:style-name="P33"><text:span text:style-name="T23">· </text:span>La segunda alternativa consiste en implantar una nube privada mediante Nextcloud. Esta solución permite disponer de una plataforma propia para la gestión de archivos, usuarios, grupos, permisos, calendarios, chat y reuniones online.</text:p>
      <text:p text:style-name="P33"><text:span text:style-name="T23">· </text:span>Nextcloud ofrece mayor control sobre la información, ya que la empresa puede administrar directamente el sistema, definir permisos, gestionar usuarios y decidir qué servicios estarán disponibles para cada grupo. Además, al tratarse de software libre, permite una mayor flexibilidad y adaptación a las necesidades del proyecto.</text:p>
      <text:p text:style-name="P33"><text:span text:style-name="T23">· </text:span>Esta alternativa requiere una configuración inicial más completa y un mantenimiento básico del servidor, pero ofrece una solución más personalizable, privada y adecuada para demostrar conocimientos de administración de sistemas y servicios en red.</text:p>
      <text:h text:style-name="P38" text:outline-level="3"><text:bookmark-start text:name="__RefHeading___Toc560_193255832"/>2.4.x Conclusiones<text:bookmark-end text:name="__RefHeading___Toc560_193255832"/></text:h>
      <text:p text:style-name="P33"><text:span text:style-name="T23">· </text:span>Tras comparar ambas alternativas, se selecciona la implantación de una nube privada con Nextcloud como solución principal del proyecto.</text:p>
      <text:p text:style-name="P33"><text:span text:style-name="T23">· </text:span>Aunque los servicios externos en la nube son sencillos de utilizar, no ofrecen el mismo nivel de control, personalización y administración que una solución propia. En cambio, Nextcloud permite crear una plataforma adaptada a Infosur, con gestión de usuarios, permisos, archivos, calendarios, chat, videollamadas y acceso externo mediante dominio.</text:p>
      <text:p text:style-name="P33"><text:span text:style-name="T23">· </text:span>Por tanto, PrivaNube se considera la opción más adecuada, ya que cumple mejor los objetivos del proyecto y permite aplicar de forma práctica los conocimientos adquiridos durante el ciclo de Sistemas Microinformáticos y Redes.</text:p>
      <text:h text:style-name="P34" text:outline-level="2"><text:bookmark-start text:name="__RefHeading___Toc562_193255832"/>2.5 Planificación del proyecto<text:bookmark-end text:name="__RefHeading___Toc562_193255832"/></text:h>
      <text:h text:style-name="P38" text:outline-level="3"><text:bookmark-start text:name="__RefHeading___Toc564_193255832"/>2.5.1 Recursos del proyecto<text:bookmark-end text:name="__RefHeading___Toc564_193255832"/></text:h>
      <text:p text:style-name="P33"><text:span text:style-name="T24">· </text:span>Para el desarrollo del proyecto PrivaNube será necesario contar con una serie de recursos técnicos, humanos y documentales.</text:p>
      <text:p text:style-name="P33"><text:span text:style-name="T24">· </text:span>En cuanto a los recursos técnicos, se utilizará un servidor o máquina virtual donde se instalará Nextcloud y los servicios necesarios para su funcionamiento. También serán necesarios equipos cliente para realizar pruebas de acceso, subida de archivos, uso de calendarios, chat, videollamadas y permisos.</text:p>
      <text:p text:style-name="P33"><text:span text:style-name="T24">· </text:span>Como recursos software se empleará un sistema operativo servidor, Nextcloud, un servidor web, una base de datos y las herramientas necesarias para configurar el acceso externo mediante dominio.</text:p>
      <text:p text:style-name="P33">El principal recurso humano será el alumno encargado del proyecto, responsable de la planificación, instalación, configuración, pruebas y documentación. Además, el profesorado actuará como parte supervisora y evaluadora del trabajo realizado.</text:p>
      <text:h text:style-name="P38" text:outline-level="3"><text:bookmark-start text:name="__RefHeading___Toc566_193255832"/>2.5.2 Tareas del proyecto<text:bookmark-end text:name="__RefHeading___Toc566_193255832"/></text:h>
      <text:p text:style-name="P33"><text:span text:style-name="T24">· </text:span>Las tareas del proyecto se organizarán por fases, siguiendo una estructura ordenada desde el análisis inicial hasta la validación final de la solución.</text:p>
      <text:p text:style-name="P33"><text:span text:style-name="T24">· </text:span>En primer lugar, se realizará el estudio de viabilidad, donde se analizará la situación inicial, los requisitos, las alternativas posibles, los riesgos y el presupuesto estimado.</text:p>
      <text:p text:style-name="P33"><text:span text:style-name="T24">· </text:span>Después se llevará a cabo la fase de análisis y diseño, en la que se definirán los usuarios, grupos, permisos, servicios necesarios y estructura general de la plataforma.</text:p>
      <text:p text:style-name="P33"><text:span text:style-name="T24">· </text:span>A continuación, se realizará la implementación técnica, que incluirá la instalación de Nextcloud, la configuración del servidor, la creación de usuarios y grupos, la activación de calendarios, chat, videollamadas y el acceso externo mediante dominio.</text:p>
      <text:p text:style-name="P33"><text:span text:style-name="T24">· </text:span>Finalmente, se realizarán pruebas de funcionamiento y se elaborará la documentación final del proyecto.</text:p>
      <text:h text:style-name="P39" text:outline-level="3"><text:bookmark-start text:name="__RefHeading___Toc568_193255832"/>2.5.3 Planificación temporal<text:bookmark-end text:name="__RefHeading___Toc568_193255832"/></text:h>
      <text:p text:style-name="P33"><text:span text:style-name="T25">· </text:span>La planificación temporal del proyecto se organizará en varias fases para facilitar el seguimiento del trabajo y controlar el avance de cada tarea.</text:p>
      <text:p text:style-name="P33"><text:span text:style-name="T25">· </text:span>Las primeras fases estarán dedicadas al estudio de viabilidad, análisis de requisitos y diseño de la solución. Posteriormente, se realizará la instalación y configuración de Nextcloud, junto con los servicios principales de la plataforma.</text:p>
      <text:p text:style-name="P33"><text:span text:style-name="T25">· </text:span>Una vez completada la implementación, se realizarán pruebas sobre el acceso de usuarios, permisos, archivos, calendarios, chat, videollamadas y acceso externo mediante dominio.</text:p>
      <text:p text:style-name="P33"><text:span text:style-name="T25">· </text:span>La fase final estará destinada a corregir posibles errores, revisar la documentación, preparar las capturas necesarias y completar la memoria del proyecto.</text:p>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table-cell table:style-name="Tabla3.A1" office:value-type="string">
              <text:p text:style-name="P42">Tipo</text:p>
            </table:table-cell>
            <table:table-cell table:style-name="Tabla3.A1" office:value-type="string">
              <text:p text:style-name="P42">Nº</text:p>
            </table:table-cell>
            <table:table-cell table:style-name="Tabla3.A1" office:value-type="string">
              <text:p text:style-name="P42">Tarea</text:p>
            </table:table-cell>
            <table:table-cell table:style-name="Tabla3.A1" office:value-type="string">
              <text:p text:style-name="P42">Duración</text:p>
            </table:table-cell>
            <table:table-cell table:style-name="Tabla3.A1" office:value-type="string">
              <text:p text:style-name="P42">Estado</text:p>
            </table:table-cell>
          </table:table-row>
        </table:table-header-rows>
        <table:table-row>
          <table:table-cell table:style-name="Tabla3.A1" office:value-type="string">
            <text:p text:style-name="P43">EV</text:p>
          </table:table-cell>
          <table:table-cell table:style-name="Tabla3.A1" office:value-type="string">
            <text:p text:style-name="P43">1</text:p>
          </table:table-cell>
          <table:table-cell table:style-name="Tabla3.A1" office:value-type="string">
            <text:p text:style-name="P43">Estudio de viabilidad del proyecto</text:p>
          </table:table-cell>
          <table:table-cell table:style-name="Tabla3.A1" office:value-type="string">
            <text:p text:style-name="P43">3 h</text:p>
          </table:table-cell>
          <table:table-cell table:style-name="Tabla3.A1" office:value-type="string">
            <text:p text:style-name="P43">C</text:p>
          </table:table-cell>
        </table:table-row>
        <table:table-row>
          <table:table-cell table:style-name="Tabla3.A1" office:value-type="string">
            <text:p text:style-name="P43">EV</text:p>
          </table:table-cell>
          <table:table-cell table:style-name="Tabla3.A1" office:value-type="string">
            <text:p text:style-name="P43">2</text:p>
          </table:table-cell>
          <table:table-cell table:style-name="Tabla3.A1" office:value-type="string">
            <text:p text:style-name="P43">Análisis de la situación actual</text:p>
          </table:table-cell>
          <table:table-cell table:style-name="Tabla3.A1" office:value-type="string">
            <text:p text:style-name="P43">2 h</text:p>
          </table:table-cell>
          <table:table-cell table:style-name="Tabla3.A1" office:value-type="string">
            <text:p text:style-name="P43">C</text:p>
          </table:table-cell>
        </table:table-row>
        <table:table-row>
          <table:table-cell table:style-name="Tabla3.A1" office:value-type="string">
            <text:p text:style-name="P43">EV</text:p>
          </table:table-cell>
          <table:table-cell table:style-name="Tabla3.A1" office:value-type="string">
            <text:p text:style-name="P43">3</text:p>
          </table:table-cell>
          <table:table-cell table:style-name="Tabla3.A1" office:value-type="string">
            <text:p text:style-name="P43">Definición de requisitos y restricciones</text:p>
          </table:table-cell>
          <table:table-cell table:style-name="Tabla3.A1" office:value-type="string">
            <text:p text:style-name="P43">2 h</text:p>
          </table:table-cell>
          <table:table-cell table:style-name="Tabla3.A1" office:value-type="string">
            <text:p text:style-name="P43">C</text:p>
          </table:table-cell>
        </table:table-row>
        <table:table-row>
          <table:table-cell table:style-name="Tabla3.A1" office:value-type="string">
            <text:p text:style-name="P43">A</text:p>
          </table:table-cell>
          <table:table-cell table:style-name="Tabla3.A1" office:value-type="string">
            <text:p text:style-name="P43">4</text:p>
          </table:table-cell>
          <table:table-cell table:style-name="Tabla3.A1" office:value-type="string">
            <text:p text:style-name="P43">Análisis de usuarios, grupos y permisos</text:p>
          </table:table-cell>
          <table:table-cell table:style-name="Tabla3.A1" office:value-type="string">
            <text:p text:style-name="P43">2 h</text:p>
          </table:table-cell>
          <table:table-cell table:style-name="Tabla3.A1" office:value-type="string">
            <text:p text:style-name="P43">C</text:p>
          </table:table-cell>
        </table:table-row>
        <table:table-row>
          <table:table-cell table:style-name="Tabla3.A1" office:value-type="string">
            <text:p text:style-name="P43">D</text:p>
          </table:table-cell>
          <table:table-cell table:style-name="Tabla3.A1" office:value-type="string">
            <text:p text:style-name="P43">5</text:p>
          </table:table-cell>
          <table:table-cell table:style-name="Tabla3.A1" office:value-type="string">
            <text:p text:style-name="P43">Diseño de la arquitectura de PrivaNube</text:p>
          </table:table-cell>
          <table:table-cell table:style-name="Tabla3.A1" office:value-type="string">
            <text:p text:style-name="P43">3 h</text:p>
          </table:table-cell>
          <table:table-cell table:style-name="Tabla3.A1" office:value-type="string">
            <text:p text:style-name="P43">C</text:p>
          </table:table-cell>
        </table:table-row>
        <table:table-row>
          <table:table-cell table:style-name="Tabla3.A1" office:value-type="string">
            <text:p text:style-name="P43">I</text:p>
          </table:table-cell>
          <table:table-cell table:style-name="Tabla3.A1" office:value-type="string">
            <text:p text:style-name="P43">6</text:p>
          </table:table-cell>
          <table:table-cell table:style-name="Tabla3.A1" office:value-type="string">
            <text:p text:style-name="P43">Instalación del servidor y servicios base</text:p>
          </table:table-cell>
          <table:table-cell table:style-name="Tabla3.A1" office:value-type="string">
            <text:p text:style-name="P43">4 h</text:p>
          </table:table-cell>
          <table:table-cell table:style-name="Tabla3.A1" office:value-type="string">
            <text:p text:style-name="P43">C</text:p>
          </table:table-cell>
        </table:table-row>
        <table:table-row>
          <table:table-cell table:style-name="Tabla3.A1" office:value-type="string">
            <text:p text:style-name="P43">I</text:p>
          </table:table-cell>
          <table:table-cell table:style-name="Tabla3.A1" office:value-type="string">
            <text:p text:style-name="P43">7</text:p>
          </table:table-cell>
          <table:table-cell table:style-name="Tabla3.A1" office:value-type="string">
            <text:p text:style-name="P43">Instalación y configuración de Nextcloud</text:p>
          </table:table-cell>
          <table:table-cell table:style-name="Tabla3.A1" office:value-type="string">
            <text:p text:style-name="P43">5 h</text:p>
          </table:table-cell>
          <table:table-cell table:style-name="Tabla3.A1" office:value-type="string">
            <text:p text:style-name="P43">C</text:p>
          </table:table-cell>
        </table:table-row>
        <table:table-row>
          <table:table-cell table:style-name="Tabla3.A1" office:value-type="string">
            <text:p text:style-name="P43">I</text:p>
          </table:table-cell>
          <table:table-cell table:style-name="Tabla3.A1" office:value-type="string">
            <text:p text:style-name="P43">8</text:p>
          </table:table-cell>
          <table:table-cell table:style-name="Tabla3.A1" office:value-type="string">
            <text:p text:style-name="P43">Configuración de usuarios, grupos y permisos</text:p>
          </table:table-cell>
          <table:table-cell table:style-name="Tabla3.A1" office:value-type="string">
            <text:p text:style-name="P43">3 h</text:p>
          </table:table-cell>
          <table:table-cell table:style-name="Tabla3.A1" office:value-type="string">
            <text:p text:style-name="P43">C</text:p>
          </table:table-cell>
        </table:table-row>
        <table:table-row>
          <table:table-cell table:style-name="Tabla3.A1" office:value-type="string">
            <text:p text:style-name="P43">I</text:p>
          </table:table-cell>
          <table:table-cell table:style-name="Tabla3.A1" office:value-type="string">
            <text:p text:style-name="P43">9</text:p>
          </table:table-cell>
          <table:table-cell table:style-name="Tabla3.A1" office:value-type="string">
            <text:p text:style-name="P43">Configuración de calendario, chat y videollamadas</text:p>
          </table:table-cell>
          <table:table-cell table:style-name="Tabla3.A1" office:value-type="string">
            <text:p text:style-name="P43">3 h</text:p>
          </table:table-cell>
          <table:table-cell table:style-name="Tabla3.A1" office:value-type="string">
            <text:p text:style-name="P43">C</text:p>
          </table:table-cell>
        </table:table-row>
        <table:table-row>
          <table:table-cell table:style-name="Tabla3.A1" office:value-type="string">
            <text:p text:style-name="P43">I</text:p>
          </table:table-cell>
          <table:table-cell table:style-name="Tabla3.A1" office:value-type="string">
            <text:p text:style-name="P43">10</text:p>
          </table:table-cell>
          <table:table-cell table:style-name="Tabla3.A1" office:value-type="string">
            <text:p text:style-name="P43">Configuración del acceso externo mediante dominio</text:p>
          </table:table-cell>
          <table:table-cell table:style-name="Tabla3.A1" office:value-type="string">
            <text:p text:style-name="P43">3 h</text:p>
          </table:table-cell>
          <table:table-cell table:style-name="Tabla3.A1" office:value-type="string">
            <text:p text:style-name="P43">C</text:p>
          </table:table-cell>
        </table:table-row>
        <table:table-row>
          <table:table-cell table:style-name="Tabla3.A1" office:value-type="string">
            <text:p text:style-name="P43">P</text:p>
          </table:table-cell>
          <table:table-cell table:style-name="Tabla3.A1" office:value-type="string">
            <text:p text:style-name="P43">11</text:p>
          </table:table-cell>
          <table:table-cell table:style-name="Tabla3.A1" office:value-type="string">
            <text:p text:style-name="P43">Pruebas de acceso, archivos y permisos</text:p>
          </table:table-cell>
          <table:table-cell table:style-name="Tabla3.A1" office:value-type="string">
            <text:p text:style-name="P43">3 h</text:p>
          </table:table-cell>
          <table:table-cell table:style-name="Tabla3.A1" office:value-type="string">
            <text:p text:style-name="P43">C</text:p>
          </table:table-cell>
        </table:table-row>
        <table:table-row>
          <table:table-cell table:style-name="Tabla3.A1" office:value-type="string">
            <text:p text:style-name="P43">P</text:p>
          </table:table-cell>
          <table:table-cell table:style-name="Tabla3.A1" office:value-type="string">
            <text:p text:style-name="P43">12</text:p>
          </table:table-cell>
          <table:table-cell table:style-name="Tabla3.A1" office:value-type="string">
            <text:p text:style-name="P43">Pruebas de calendario, chat y reuniones online</text:p>
          </table:table-cell>
          <table:table-cell table:style-name="Tabla3.A1" office:value-type="string">
            <text:p text:style-name="P43">2 h</text:p>
          </table:table-cell>
          <table:table-cell table:style-name="Tabla3.A1" office:value-type="string">
            <text:p text:style-name="P43">C</text:p>
          </table:table-cell>
        </table:table-row>
        <table:table-row>
          <table:table-cell table:style-name="Tabla3.A1" office:value-type="string">
            <text:p text:style-name="P43">E</text:p>
          </table:table-cell>
          <table:table-cell table:style-name="Tabla3.A1" office:value-type="string">
            <text:p text:style-name="P43">13</text:p>
          </table:table-cell>
          <table:table-cell table:style-name="Tabla3.A1" office:value-type="string">
            <text:p text:style-name="P43">Capturas, revisión y documentación final</text:p>
          </table:table-cell>
          <table:table-cell table:style-name="Tabla3.A1" office:value-type="string">
            <text:p text:style-name="P43">6 h</text:p>
          </table:table-cell>
          <table:table-cell table:style-name="Tabla3.A1" office:value-type="string">
            <text:p text:style-name="P43">R</text:p>
          </table:table-cell>
        </table:table-row>
      </table:table>
      <text:p text:style-name="P33"/>
      <text:h text:style-name="P34" text:outline-level="2"><text:bookmark-start text:name="__RefHeading___Toc570_193255832"/>2.6 Evaluación de riesgos<text:bookmark-end text:name="__RefHeading___Toc570_193255832"/></text:h>
      <text:h text:style-name="P38" text:outline-level="3"><text:bookmark-start text:name="__RefHeading___Toc572_193255832"/>2.6.1 Lista de riesgos<text:bookmark-end text:name="__RefHeading___Toc572_193255832"/></text:h>
      <text:p text:style-name="P33"><text:span text:style-name="T26">· </text:span>Durante el desarrollo del proyecto PrivaNube pueden aparecer diferentes riesgos que afecten a la instalación, configuración, funcionamiento o documentación de la solución.</text:p>
      <text:p text:style-name="P33"><text:span text:style-name="T26">· </text:span>Los principales riesgos identificados son los siguientes:</text:p>
      <text:p text:style-name="P33">- Fallos durante la instalación o configuración de Nextcloud.</text:p>
      <text:p text:style-name="P33">- Problemas de acceso externo mediante el dominio configurado.</text:p>
      <text:p text:style-name="P33">- Errores en la creación de usuarios, grupos o permisos.</text:p>
      <text:p text:style-name="P33">- Funcionamiento incorrecto de servicios como calendario, chat o videollamadas.</text:p>
      <text:p text:style-name="P33">- Pérdida de información por una mala configuración o falta de copias de seguridad.</text:p>
      <text:p text:style-name="P33">- Limitaciones de recursos del servidor utilizado para el proyecto.</text:p>
      <text:p text:style-name="P33">- Problemas de conectividad entre los equipos cliente y la plataforma.</text:p>
      <text:p text:style-name="P33">- Retrasos en la documentación o en la realización de pruebas.</text:p>
      <text:h text:style-name="P38" text:outline-level="3"><text:bookmark-start text:name="__RefHeading___Toc574_193255832"/>2.6.2 Catalogación de riesgos<text:bookmark-end text:name="__RefHeading___Toc574_193255832"/></text:h>
      <text:p text:style-name="P33"><text:span text:style-name="T27">· </text:span>Los riesgos del proyecto se pueden clasificar según su impacto y probabilidad.</text:p>
      <text:p text:style-name="P33"><text:span text:style-name="T27">· </text:span>Los riesgos de mayor impacto son aquellos que podrían impedir el funcionamiento general de la plataforma, como una instalación incorrecta de Nextcloud, problemas graves de acceso al servidor o fallos en el acceso externo mediante dominio.</text:p>
      <text:p text:style-name="P33"><text:span text:style-name="T27">· </text:span>Los riesgos de impacto medio están relacionados con funcionalidades concretas, como errores en permisos, calendario, chat, videollamadas o compartición de archivos. Estos problemas no impedirían necesariamente el uso completo de la plataforma, pero sí afectarían a su utilidad.</text:p>
      <text:p text:style-name="P33"><text:span text:style-name="T27">· </text:span>Por último, los riesgos de menor impacto están relacionados con retrasos en la documentación, pequeños errores de configuración o ajustes visuales de la plataforma. Aunque deben corregirse, no comprometen directamente el funcionamiento principal del sistema.</text:p>
      <text:h text:style-name="P39" text:outline-level="3"><text:bookmark-start text:name="__RefHeading___Toc576_193255832"/>2.6.3 Plan de contingencia<text:bookmark-end text:name="__RefHeading___Toc576_193255832"/></text:h>
      <text:p text:style-name="P33">Para reducir el impacto de los riesgos identificados, se establecen varias medidas de contingencia.</text:p>
      <text:p text:style-name="P33">En caso de fallo durante la instalación o configuración de Nextcloud, se revisarán los servicios principales del servidor, la base de datos, el servidor web y los registros de error para localizar el problema.</text:p>
      <text:p text:style-name="P33">Si se producen problemas con el acceso externo mediante dominio, se comprobará la configuración DNS, el servicio utilizado para el acceso externo y la conectividad desde fuera de la red local.</text:p>
      <text:p text:style-name="P33">Ante errores en usuarios, grupos o permisos, se revisará la configuración desde el panel de administración de Nextcloud y se realizarán pruebas con cuentas de usuario diferentes.</text:p>
      <text:p text:style-name="P33">Si alguna función colaborativa, como calendario, chat o videollamadas, no funciona correctamente, se comprobará que la aplicación correspondiente esté instalada, activada y asignada a los usuarios o grupos adecuados.</text:p>
      <text:p text:style-name="P33">Además, se mantendrán capturas y anotaciones del proceso para facilitar la revisión del proyecto y poder justificar los cambios realizados durante su desarrollo.</text:p>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42">Riesgo</text:p>
            </table:table-cell>
            <table:table-cell table:style-name="Tabla4.A1" office:value-type="string">
              <text:p text:style-name="P42">Probabilidad</text:p>
            </table:table-cell>
            <table:table-cell table:style-name="Tabla4.A1" office:value-type="string">
              <text:p text:style-name="P42">Impacto</text:p>
            </table:table-cell>
            <table:table-cell table:style-name="Tabla4.A1" office:value-type="string">
              <text:p text:style-name="P42">Medida de control</text:p>
            </table:table-cell>
          </table:table-row>
        </table:table-header-rows>
        <table:table-row>
          <table:table-cell table:style-name="Tabla4.A1" office:value-type="string">
            <text:p text:style-name="P43">Fallo en instalación de Nextcloud</text:p>
          </table:table-cell>
          <table:table-cell table:style-name="Tabla4.A1" office:value-type="string">
            <text:p text:style-name="P43">Media</text:p>
          </table:table-cell>
          <table:table-cell table:style-name="Tabla4.A1" office:value-type="string">
            <text:p text:style-name="P43">Alto</text:p>
          </table:table-cell>
          <table:table-cell table:style-name="Tabla4.A1" office:value-type="string">
            <text:p text:style-name="P43">Revisar servicios, logs y configuración</text:p>
          </table:table-cell>
        </table:table-row>
        <table:table-row>
          <table:table-cell table:style-name="Tabla4.A1" office:value-type="string">
            <text:p text:style-name="P43">Error en acceso externo por dominio</text:p>
          </table:table-cell>
          <table:table-cell table:style-name="Tabla4.A1" office:value-type="string">
            <text:p text:style-name="P43">Media</text:p>
          </table:table-cell>
          <table:table-cell table:style-name="Tabla4.A1" office:value-type="string">
            <text:p text:style-name="P43">Alto</text:p>
          </table:table-cell>
          <table:table-cell table:style-name="Tabla4.A1" office:value-type="string">
            <text:p text:style-name="P43">Comprobar DNS, túnel/acceso externo y conectividad</text:p>
          </table:table-cell>
        </table:table-row>
        <table:table-row>
          <table:table-cell table:style-name="Tabla4.A1" office:value-type="string">
            <text:p text:style-name="P43">Permisos mal configurados</text:p>
          </table:table-cell>
          <table:table-cell table:style-name="Tabla4.A1" office:value-type="string">
            <text:p text:style-name="P43">Media</text:p>
          </table:table-cell>
          <table:table-cell table:style-name="Tabla4.A1" office:value-type="string">
            <text:p text:style-name="P43">Medio</text:p>
          </table:table-cell>
          <table:table-cell table:style-name="Tabla4.A1" office:value-type="string">
            <text:p text:style-name="P43">Probar con varios usuarios y grupos</text:p>
          </table:table-cell>
        </table:table-row>
        <table:table-row>
          <table:table-cell table:style-name="Tabla4.A1" office:value-type="string">
            <text:p text:style-name="P43">Fallo en calendario/chat/videollamadas</text:p>
          </table:table-cell>
          <table:table-cell table:style-name="Tabla4.A1" office:value-type="string">
            <text:p text:style-name="P43">Media</text:p>
          </table:table-cell>
          <table:table-cell table:style-name="Tabla4.A1" office:value-type="string">
            <text:p text:style-name="P43">Medio</text:p>
          </table:table-cell>
          <table:table-cell table:style-name="Tabla4.A1" office:value-type="string">
            <text:p text:style-name="P43">Revisar apps activadas y permisos</text:p>
          </table:table-cell>
        </table:table-row>
        <table:table-row>
          <table:table-cell table:style-name="Tabla4.A1" office:value-type="string">
            <text:p text:style-name="P43">Recursos insuficientes del servidor</text:p>
          </table:table-cell>
          <table:table-cell table:style-name="Tabla4.A1" office:value-type="string">
            <text:p text:style-name="P43">Baja</text:p>
          </table:table-cell>
          <table:table-cell table:style-name="Tabla4.A1" office:value-type="string">
            <text:p text:style-name="P43">Medio</text:p>
          </table:table-cell>
          <table:table-cell table:style-name="Tabla4.A1" office:value-type="string">
            <text:p text:style-name="P43">Ajustar servicios y limitar pruebas</text:p>
          </table:table-cell>
        </table:table-row>
        <table:table-row>
          <table:table-cell table:style-name="Tabla4.A1" office:value-type="string">
            <text:p text:style-name="P43">Retraso en documentación</text:p>
          </table:table-cell>
          <table:table-cell table:style-name="Tabla4.A1" office:value-type="string">
            <text:p text:style-name="P43">Media</text:p>
          </table:table-cell>
          <table:table-cell table:style-name="Tabla4.A1" office:value-type="string">
            <text:p text:style-name="P43">Medio</text:p>
          </table:table-cell>
          <table:table-cell table:style-name="Tabla4.A1" office:value-type="string">
            <text:p text:style-name="P43">Planificar capturas y redactar por fases</text:p>
          </table:table-cell>
        </table:table-row>
      </table:table>
      <text:p text:style-name="P33"/>
      <text:h text:style-name="P34" text:outline-level="2"><text:bookmark-start text:name="__RefHeading___Toc578_193255832"/>2.7 Presupuesto<text:bookmark-end text:name="__RefHeading___Toc578_193255832"/></text:h>
      <text:h text:style-name="P38" text:outline-level="3"><text:bookmark-start text:name="__RefHeading___Toc580_193255832"/>2.7.1 Estimación de coste material<text:bookmark-end text:name="__RefHeading___Toc580_193255832"/></text:h>
      <text:p text:style-name="P33"><text:span text:style-name="T28">· </text:span>Para la realización del proyecto PrivaNube no se ha producido ningún coste económico directo, ya que los recursos principales han sido proporcionados por el entorno educativo.</text:p>
      <text:p text:style-name="P33"><text:span text:style-name="T28">· </text:span>El servidor utilizado para alojar la plataforma Nextcloud ha sido creado en Proxmox por el profesorado, y el almacenamiento necesario para el proyecto ha sido asignado dentro de dicha infraestructura. Además, el dominio o sistema de acceso externo empleado para acceder a la plataforma se ha utilizado de forma gratuita.</text:p>
      <text:p text:style-name="P33"><text:span text:style-name="T28">· </text:span>También se ha empleado software libre o gratuito, como Nextcloud, el sistema operativo servidor y los servicios necesarios para el funcionamiento de la plataforma. Por tanto, el coste material real del proyecto es de 0 €.</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42">Recurso</text:p>
            </table:table-cell>
            <table:table-cell table:style-name="Tabla5.A1" office:value-type="string">
              <text:p text:style-name="P42">Descripción</text:p>
            </table:table-cell>
            <table:table-cell table:style-name="Tabla5.A1" office:value-type="string">
              <text:p text:style-name="P42">Coste real</text:p>
            </table:table-cell>
          </table:table-row>
        </table:table-header-rows>
        <table:table-row>
          <table:table-cell table:style-name="Tabla5.A1" office:value-type="string">
            <text:p text:style-name="P43">Servidor en Proxmox</text:p>
          </table:table-cell>
          <table:table-cell table:style-name="Tabla5.A1" office:value-type="string">
            <text:p text:style-name="P43">Proporcionado por el profesorado</text:p>
          </table:table-cell>
          <table:table-cell table:style-name="Tabla5.A1" office:value-type="string">
            <text:p text:style-name="P43">0 €</text:p>
          </table:table-cell>
        </table:table-row>
        <table:table-row>
          <table:table-cell table:style-name="Tabla5.A1" office:value-type="string">
            <text:p text:style-name="P43">Almacenamiento</text:p>
          </table:table-cell>
          <table:table-cell table:style-name="Tabla5.A1" office:value-type="string">
            <text:p text:style-name="P43">Asignado dentro del entorno del proyecto</text:p>
          </table:table-cell>
          <table:table-cell table:style-name="Tabla5.A1" office:value-type="string">
            <text:p text:style-name="P43">0 €</text:p>
          </table:table-cell>
        </table:table-row>
        <table:table-row>
          <table:table-cell table:style-name="Tabla5.A1" office:value-type="string">
            <text:p text:style-name="P43">Dominio / acceso externo</text:p>
          </table:table-cell>
          <table:table-cell table:style-name="Tabla5.A1" office:value-type="string">
            <text:p text:style-name="P43">Servicio gratuito</text:p>
          </table:table-cell>
          <table:table-cell table:style-name="Tabla5.A1" office:value-type="string">
            <text:p text:style-name="P43">0 €</text:p>
          </table:table-cell>
        </table:table-row>
        <table:table-row>
          <table:table-cell table:style-name="Tabla5.A1" office:value-type="string">
            <text:p text:style-name="P43">Nextcloud</text:p>
          </table:table-cell>
          <table:table-cell table:style-name="Tabla5.A1" office:value-type="string">
            <text:p text:style-name="P43">Software libre</text:p>
          </table:table-cell>
          <table:table-cell table:style-name="Tabla5.A1" office:value-type="string">
            <text:p text:style-name="P43">0 €</text:p>
          </table:table-cell>
        </table:table-row>
        <table:table-row>
          <table:table-cell table:style-name="Tabla5.A1" office:value-type="string">
            <text:p text:style-name="P43">Sistema operativo servidor</text:p>
          </table:table-cell>
          <table:table-cell table:style-name="Tabla5.A1" office:value-type="string">
            <text:p text:style-name="P43">Software libre</text:p>
          </table:table-cell>
          <table:table-cell table:style-name="Tabla5.A1" office:value-type="string">
            <text:p text:style-name="P43">0 €</text:p>
          </table:table-cell>
        </table:table-row>
        <table:table-row>
          <table:table-cell table:style-name="Tabla5.A1" office:value-type="string">
            <text:p text:style-name="P43">Servidor web y base de datos</text:p>
          </table:table-cell>
          <table:table-cell table:style-name="Tabla5.A1" office:value-type="string">
            <text:p text:style-name="P43">Software libre</text:p>
          </table:table-cell>
          <table:table-cell table:style-name="Tabla5.A1" office:value-type="string">
            <text:p text:style-name="P43">0 €</text:p>
          </table:table-cell>
        </table:table-row>
        <table:table-row>
          <table:table-cell table:style-name="Tabla5.A1" office:value-type="string">
            <text:p text:style-name="P43">Equipos cliente de prueba</text:p>
          </table:table-cell>
          <table:table-cell table:style-name="Tabla5.A1" office:value-type="string">
            <text:p text:style-name="P43">Recursos ya disponibles</text:p>
          </table:table-cell>
          <table:table-cell table:style-name="Tabla5.A1" office:value-type="string">
            <text:p text:style-name="P43">0 €</text:p>
          </table:table-cell>
        </table:table-row>
      </table:table>
      <text:p text:style-name="P33"><text:span text:style-name="T28">· </text:span>El coste material total del proyecto es de 0 €, ya que no ha sido necesario adquirir hardware, licencias ni servicios de pago para su desarrollo.</text:p>
      <text:h text:style-name="P39" text:outline-level="3"><text:bookmark-start text:name="__RefHeading___Toc582_193255832"/>2.7.2 Estimación de coste personal<text:bookmark-end text:name="__RefHeading___Toc582_193255832"/></text:h>
      <text:p text:style-name="P33"><text:span text:style-name="T28">· </text:span>Aunque el proyecto no ha supuesto un coste económico directo, sí ha requerido una inversión de tiempo para su planificación, configuración, pruebas y documentación.</text:p>
      <text:p text:style-name="P33"><text:span text:style-name="T28">· </text:span>Al tratarse de un Proyecto Intermodular académico, este tiempo no representa un gasto real, pero puede valorarse de forma orientativa para comprender el esfuerzo dedicado al desarrollo de la solución.</text:p>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42">Tarea</text:p>
            </table:table-cell>
            <table:table-cell table:style-name="Tabla6.A1" office:value-type="string">
              <text:p text:style-name="P42">Horas estimadas</text:p>
            </table:table-cell>
            <table:table-cell table:style-name="Tabla6.A1" office:value-type="string">
              <text:p text:style-name="P42">Coste real</text:p>
            </table:table-cell>
          </table:table-row>
        </table:table-header-rows>
        <table:table-row>
          <table:table-cell table:style-name="Tabla6.A1" office:value-type="string">
            <text:p text:style-name="P43">Análisis inicial y viabilidad</text:p>
          </table:table-cell>
          <table:table-cell table:style-name="Tabla6.A1" office:value-type="string">
            <text:p text:style-name="P43">4 h</text:p>
          </table:table-cell>
          <table:table-cell table:style-name="Tabla6.A1" office:value-type="string">
            <text:p text:style-name="P43">0 €</text:p>
          </table:table-cell>
        </table:table-row>
        <table:table-row>
          <table:table-cell table:style-name="Tabla6.A1" office:value-type="string">
            <text:p text:style-name="P43">Diseño de la solución</text:p>
          </table:table-cell>
          <table:table-cell table:style-name="Tabla6.A1" office:value-type="string">
            <text:p text:style-name="P43">3 h</text:p>
          </table:table-cell>
          <table:table-cell table:style-name="Tabla6.A1" office:value-type="string">
            <text:p text:style-name="P43">0 €</text:p>
          </table:table-cell>
        </table:table-row>
        <table:table-row>
          <table:table-cell table:style-name="Tabla6.A1" office:value-type="string">
            <text:p text:style-name="P43">Configuración de Nextcloud</text:p>
          </table:table-cell>
          <table:table-cell table:style-name="Tabla6.A1" office:value-type="string">
            <text:p text:style-name="P43">5 h</text:p>
          </table:table-cell>
          <table:table-cell table:style-name="Tabla6.A1" office:value-type="string">
            <text:p text:style-name="P43">0 €</text:p>
          </table:table-cell>
        </table:table-row>
        <table:table-row>
          <table:table-cell table:style-name="Tabla6.A1" office:value-type="string">
            <text:p text:style-name="P43">Usuarios, grupos y permisos</text:p>
          </table:table-cell>
          <table:table-cell table:style-name="Tabla6.A1" office:value-type="string">
            <text:p text:style-name="P43">3 h</text:p>
          </table:table-cell>
          <table:table-cell table:style-name="Tabla6.A1" office:value-type="string">
            <text:p text:style-name="P43">0 €</text:p>
          </table:table-cell>
        </table:table-row>
        <table:table-row>
          <table:table-cell table:style-name="Tabla6.A1" office:value-type="string">
            <text:p text:style-name="P43">Calendario, chat y videollamadas</text:p>
          </table:table-cell>
          <table:table-cell table:style-name="Tabla6.A1" office:value-type="string">
            <text:p text:style-name="P43">3 h</text:p>
          </table:table-cell>
          <table:table-cell table:style-name="Tabla6.A1" office:value-type="string">
            <text:p text:style-name="P43">0 €</text:p>
          </table:table-cell>
        </table:table-row>
        <table:table-row>
          <table:table-cell table:style-name="Tabla6.A1" office:value-type="string">
            <text:p text:style-name="P43">Acceso externo mediante dominio</text:p>
          </table:table-cell>
          <table:table-cell table:style-name="Tabla6.A1" office:value-type="string">
            <text:p text:style-name="P43">3 h</text:p>
          </table:table-cell>
          <table:table-cell table:style-name="Tabla6.A1" office:value-type="string">
            <text:p text:style-name="P43">0 €</text:p>
          </table:table-cell>
        </table:table-row>
        <table:table-row>
          <table:table-cell table:style-name="Tabla6.A1" office:value-type="string">
            <text:p text:style-name="P43">Pruebas de funcionamiento</text:p>
          </table:table-cell>
          <table:table-cell table:style-name="Tabla6.A1" office:value-type="string">
            <text:p text:style-name="P43">4 h</text:p>
          </table:table-cell>
          <table:table-cell table:style-name="Tabla6.A1" office:value-type="string">
            <text:p text:style-name="P43">0 €</text:p>
          </table:table-cell>
        </table:table-row>
        <table:table-row>
          <table:table-cell table:style-name="Tabla6.A1" office:value-type="string">
            <text:p text:style-name="P43">Documentación del proyecto</text:p>
          </table:table-cell>
          <table:table-cell table:style-name="Tabla6.A1" office:value-type="string">
            <text:p text:style-name="P43">8 h</text:p>
          </table:table-cell>
          <table:table-cell table:style-name="Tabla6.A1" office:value-type="string">
            <text:p text:style-name="P43">0 €</text:p>
          </table:table-cell>
        </table:table-row>
      </table:table>
      <text:p text:style-name="P33"><text:span text:style-name="T29">· </text:span>El coste personal real también se considera de 0 €, ya que el trabajo ha sido realizado por el alumno como parte del proceso formativo del Proyecto Intermodular.</text:p>
      <text:h text:style-name="P38" text:outline-level="3"><text:bookmark-start text:name="__RefHeading___Toc584_193255832"/>2.7.3 Resumen y análisis coste-beneficio<text:bookmark-end text:name="__RefHeading___Toc584_193255832"/></text:h>
      <text:p text:style-name="P33"><text:span text:style-name="T29">· </text:span>El presupuesto real del proyecto PrivaNube es de 0 €, al haberse utilizado recursos proporcionados por el centro educativo, almacenamiento asignado por el profesorado, dominio gratuito y software libre.</text:p>
      <text:p text:style-name="P33"><text:span text:style-name="T29">· </text:span>A pesar de no haber generado costes económicos, el proyecto ofrece beneficios importantes. Permite disponer de una plataforma privada basada en Nextcloud para gestionar archivos, usuarios, grupos, permisos, calendarios, chat, videollamadas y acceso externo mediante dominio.</text:p>
      <text:p text:style-name="P33"><text:span text:style-name="T29">· </text:span>Desde el punto de vista coste-beneficio, el resultado es positivo, ya que se consigue una solución funcional sin inversión económica directa. Además, el proyecto permite aplicar conocimientos de administración de sistemas, redes, servicios web, gestión de usuarios y documentación técnica en un entorno práctico y realista.</text:p>
      <table:table table:name="Tabla7" table:style-name="Tabla7">
        <table:table-column table:style-name="Tabla7.A"/>
        <table:table-column table:style-name="Tabla7.B"/>
        <table:table-header-rows>
          <table:table-row>
            <table:table-cell table:style-name="Tabla7.A1" office:value-type="string">
              <text:p text:style-name="P42">Concepto</text:p>
            </table:table-cell>
            <table:table-cell table:style-name="Tabla7.A1" office:value-type="string">
              <text:p text:style-name="P42">Coste real</text:p>
            </table:table-cell>
          </table:table-row>
        </table:table-header-rows>
        <table:table-row>
          <table:table-cell table:style-name="Tabla7.A1" office:value-type="string">
            <text:p text:style-name="P43">Coste material</text:p>
          </table:table-cell>
          <table:table-cell table:style-name="Tabla7.A1" office:value-type="string">
            <text:p text:style-name="P43">0 €</text:p>
          </table:table-cell>
        </table:table-row>
        <table:table-row>
          <table:table-cell table:style-name="Tabla7.A1" office:value-type="string">
            <text:p text:style-name="P43">Coste personal</text:p>
          </table:table-cell>
          <table:table-cell table:style-name="Tabla7.A1" office:value-type="string">
            <text:p text:style-name="P43">0 €</text:p>
          </table:table-cell>
        </table:table-row>
        <table:table-row>
          <table:table-cell table:style-name="Tabla7.A1" office:value-type="string">
            <text:p text:style-name="P43">Coste total del proyecto</text:p>
          </table:table-cell>
          <table:table-cell table:style-name="Tabla7.A1" office:value-type="string">
            <text:p text:style-name="P43">0 €</text:p>
          </table:table-cell>
        </table:table-row>
      </table:table>
      <text:p text:style-name="P33"/>
      <text:h text:style-name="P34" text:outline-level="2"><text:bookmark-start text:name="__RefHeading___Toc586_193255832"/>2.8 Conclusiones<text:bookmark-end text:name="__RefHeading___Toc586_193255832"/></text:h>
      <text:p text:style-name="P33"><text:span text:style-name="T30">· </text:span>Tras realizar el estudio de viabilidad, se considera que el proyecto PrivaNube es adecuado y viable para el entorno planteado. La solución permite implantar una plataforma privada basada en Nextcloud, utilizando recursos proporcionados por el centro educativo y herramientas de software libre.</text:p>
      <text:p text:style-name="P33"><text:span text:style-name="T30">· </text:span>El proyecto no requiere una inversión económica directa y permite cubrir necesidades importantes como el almacenamiento de archivos, la gestión de usuarios y grupos, la asignación de permisos, el uso de calendarios, el chat interno, las videollamadas y el acceso externo mediante dominio.</text:p>
      <text:p text:style-name="P33"><text:span text:style-name="T30">· </text:span>Por tanto, se concluye que la implantación de PrivaNube es una solución útil, realista y coherente con los objetivos del Proyecto Intermodular.</text:p>
      <text:h text:style-name="P38" text:outline-level="3"><text:bookmark-start text:name="__RefHeading___Toc588_193255832"/>2.8.1 Beneficios<text:bookmark-end text:name="__RefHeading___Toc588_193255832"/></text:h>
      <text:p text:style-name="P33"><text:span text:style-name="T30">· </text:span>Los principales beneficios del proyecto son los siguientes:</text:p>
      <text:p text:style-name="P33">- Permite centralizar archivos y documentación en una única plataforma.</text:p>
      <text:p text:style-name="P33">- Facilita la gestión de usuarios, grupos y permisos.</text:p>
      <text:p text:style-name="P33">- Mejora la organización interna mediante calendarios compartidos.</text:p>
      <text:p text:style-name="P33">- Incorpora herramientas de comunicación como chat y videollamadas.</text:p>
      <text:p text:style-name="P33">- Permite el acceso externo mediante dominio.</text:p>
      <text:p text:style-name="P33">- Utiliza software libre, reduciendo costes de licencias.</text:p>
      <text:p text:style-name="P33">- Aprovecha recursos ya disponibles en el entorno educativo.</text:p>
      <text:p text:style-name="P33">- Permite aplicar conocimientos reales de administración de sistemas, redes y servicios web.</text:p>
      <text:p text:style-name="P33"><text:span text:style-name="T30">· </text:span>En conjunto, PrivaNube aporta una solución práctica y completa para gestionar información y comunicación interna de forma más controlada.</text:p>
      <text:h text:style-name="P39" text:outline-level="3"><text:bookmark-start text:name="__RefHeading___Toc590_193255832"/>2.8.2 Inconvenientes<text:bookmark-end text:name="__RefHeading___Toc590_193255832"/></text:h>
      <text:p text:style-name="P33"><text:span text:style-name="T30">· </text:span>Aunque el proyecto presenta varias ventajas, también existen algunos inconvenientes que deben tenerse en cuenta.</text:p>
      <text:p text:style-name="P33"><text:span text:style-name="T30">· </text:span>Uno de los principales inconvenientes es que la plataforma requiere configuración y mantenimiento técnico. A diferencia de un servicio comercial externo, Nextcloud necesita ser administrado correctamente para evitar errores de acceso, problemas de permisos o fallos en los servicios instalados.</text:p>
      <text:p text:style-name="P33"><text:span text:style-name="T30">· </text:span>También pueden aparecer dificultades relacionadas con el acceso externo mediante dominio, la configuración de aplicaciones adicionales o el rendimiento del servidor si aumentan los usuarios o el volumen de archivos.</text:p>
      <text:p text:style-name="P33"><text:span text:style-name="T30">· </text:span>Además, al tratarse de un proyecto realizado en un entorno educativo, la infraestructura utilizada es limitada y no equivale completamente a una implantación empresarial en producción.</text:p>
      <text:p text:style-name="P33"><text:span text:style-name="T30">· </text:span>Aun así, estos inconvenientes no impiden la viabilidad del proyecto, ya que son asumibles dentro del alcance planteado y pueden controlarse mediante una buena configuración, pruebas y documenta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Negrita" style:font-family-generic="swiss" style:font-pitch="variable"/>
    <style:font-face style:name="Calibri1" svg:font-family="Calibri" style:font-adornments="Negrita itálica" style:font-family-generic="swiss" style:font-pitch="variable"/>
    <style:font-face style:name="Calibri2" svg:font-family="Calibri" style:font-adornments="Normal" style:font-family-generic="swiss" style:font-pitch="variable"/>
    <style:font-face style:name="Calibri3" svg:font-family="Calibri,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pitch="variable"/>
    <style:font-face style:name="Montserrat Black" svg:font-family="'Montserrat Black'" style:font-adornments="Regular" style:font-pitch="variable"/>
    <style:font-face style:name="Montserrat Medium" svg:font-family="'Montserrat Mediu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2" fo:font-family="Calibri" style:font-style-name="Normal"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5cm" fo:margin-bottom="0.25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master-page-name="">
      <loext:graphic-properties draw:fill="none" draw:fill-color="#3465a4"/>
      <style:paragraph-properties fo:margin-top="0.423cm" fo:margin-bottom="0.212cm" style:contextual-spacing="false" fo:text-align="start" style:justify-single-word="false" style:page-number="auto" fo:background-color="transparent" fo:padding="0.049cm" fo:border-left="none" fo:border-right="none" fo:border-top="none" fo:border-bottom="1.5pt solid #1f3a5f">
        <style:tab-stops/>
      </style:paragraph-properties>
      <style:text-properties fo:color="#1f3a5f" loext:opacity="100%" style:font-name="Calibri" fo:font-family="Calibri" style:font-style-name="Negrita" style:font-family-generic="swiss" style:font-pitch="variable" fo:font-size="18pt" style:text-underline-style="none" fo:font-weight="bold" fo:background-color="transparent" style:font-size-asian="18pt" style:font-weight-asian="bold" style:font-size-complex="18pt" style:font-weight-complex="bold" style:text-overline-style="none" style:text-overline-color="font-color"/>
    </style:style>
    <style:style style:name="Title" style:family="paragraph" style:parent-style-name="Heading" style:next-style-name="Text_20_body" style:class="chapter">
      <loext:graphic-properties draw:fill="solid" draw:fill-color="#2a6099"/>
      <style:paragraph-properties fo:text-align="center" style:justify-single-word="false" fo:background-color="#2a6099"/>
      <style:text-properties style:font-name="Calibri" fo:font-family="Calibri" style:font-style-name="Negrita" style:font-family-generic="swiss" style:font-pitch="variable" fo:font-size="30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master-page-name="">
      <loext:graphic-properties draw:fill="none" draw:fill-color="#5983b0"/>
      <style:paragraph-properties fo:margin-top="0.353cm" fo:margin-bottom="0.212cm" style:contextual-spacing="false" fo:line-height="100%" fo:text-align="start" style:justify-single-word="false" style:page-number="auto" fo:background-color="transparent">
        <style:tab-stops/>
      </style:paragraph-properties>
      <style:text-properties fo:color="#4a6fa5" loext:opacity="100%" style:font-name="Calibri" fo:font-family="Calibri" style:font-style-name="Negrita"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loext:graphic-properties draw:fill="solid" draw:fill-color="#729fcf"/>
      <style:paragraph-properties fo:margin-top="0.247cm" fo:margin-bottom="0.212cm" style:contextual-spacing="false" fo:text-align="start" style:justify-single-word="false" fo:background-color="#729fcf"/>
      <style:text-properties fo:color="#ffffff" loext:opacity="100%" style:font-name="Calibri" fo:font-family="Calibri" style:font-style-name="Negrita"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master-page-name="">
      <loext:graphic-properties draw:fill="solid" draw:fill-color="#b4c7dc"/>
      <style:paragraph-properties fo:margin-top="0.212cm" fo:margin-bottom="0.212cm" style:contextual-spacing="false" fo:text-align="center" style:justify-single-word="false" style:page-number="auto" fo:background-color="#b4c7dc"/>
      <style:text-properties fo:color="#ffffff" loext:opacity="100%" style:font-name="Calibri1" fo:font-family="Calibri" style:font-style-name="Negrita itálica" style:font-family-generic="swiss" style:font-pitch="variable" fo:font-size="12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6ff0f" officeooo:paragraph-rsid="0016ff0f"/>
    </style:style>
    <style:style style:name="MP2"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tab-stops>
          <style:tab-stop style:position="8.255cm" style:type="center"/>
          <style:tab-stop style:position="16.51cm" style:type="right"/>
        </style:tab-stops>
      </style:paragraph-properties>
      <style:text-properties fo:font-variant="normal" fo:text-transform="none" fo:color="#595959" loext:opacity="100%" style:font-name="Calibri3" fo:font-size="10pt" fo:language="es" fo:country="ES" fo:font-style="normal" fo:font-weight="normal" officeooo:paragraph-rsid="0016ff0f"/>
    </style:style>
    <style:style style:name="MT1" style:family="text">
      <style:text-properties officeooo:rsid="0018a2a4"/>
    </style:style>
    <style:page-layout style:name="Mpm1">
      <style:page-layout-properties fo:page-width="21.001cm" fo:page-height="30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next-style-name="First_20_Page">
      <style:header>
        <text:p text:style-name="MP1">Jairo Motero García<text:tab/>2SMR<text:tab/><text:span text:style-name="MT1">Documentación</text:span> del TFG</text:p>
      </style:header>
      <style:footer>
        <text:p text:style-name="MP2">Documento de planificación inicial del Proyecto Intermodular</text:p>
      </style:footer>
    </style:master-page>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2T20:02:32.005584200</meta:creation-date>
    <dc:date>2026-05-20T21:15:15.494316600</dc:date>
    <meta:editing-duration>PT6H5M49S</meta:editing-duration>
    <meta:editing-cycles>30</meta:editing-cycles>
    <meta:generator>LibreOffice/25.2.7.2$Windows_X86_64 LibreOffice_project/5cbfd1ab6520636bb5f7b99185aa69bd7456825d</meta:generator>
    <meta:document-statistic meta:table-count="7" meta:image-count="0" meta:object-count="0" meta:page-count="23" meta:paragraph-count="436" meta:word-count="5674" meta:character-count="38238" meta:non-whitespace-character-count="32957"/>
  </office:meta>
</office:document-meta>
</file>