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383cm" fo:margin-left="-0.381cm" fo:margin-top="0cm" fo:margin-bottom="0cm" table:align="left"/>
    </style:style>
    <style:style style:name="Table1.A" style:family="table-column">
      <style:table-column-properties style:column-width="7.661cm"/>
    </style:style>
    <style:style style:name="Table1.B" style:family="table-column">
      <style:table-column-properties style:column-width="7.7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372cm" fo:margin-left="-0.381cm" fo:margin-top="0cm" fo:margin-bottom="0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0.874cm"/>
    </style:style>
    <style:style style:name="Table2.1" style:family="table-row">
      <style:table-row-properties style:min-row-height="0.6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.212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352e4" officeooo:paragraph-rsid="000352e4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5" style:family="paragraph" style:parent-style-name="Standard">
      <style:text-properties fo:font-size="9pt" fo:font-style="italic" style:font-size-asian="9pt" style:font-style-asian="italic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fo:font-style="italic" style:font-size-asian="9pt" style:font-style-asian="italic" style:font-size-complex="9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style="normal" officeooo:rsid="00038d70" officeooo:paragraph-rsid="00038d70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alibri" fo:font-style="normal" style:font-style-asian="normal" style:font-style-complex="normal"/>
    </style:style>
    <style:style style:name="P12" style:family="paragraph" style:parent-style-name="Standard">
      <style:text-properties officeooo:paragraph-rsid="0004a3c1"/>
    </style:style>
    <style:style style:name="P13" style:family="paragraph" style:parent-style-name="Standard">
      <style:text-properties fo:font-style="italic" style:font-style-asian="italic"/>
    </style:style>
    <style:style style:name="P14" style:family="paragraph" style:parent-style-name="Heading_20_1" style:list-style-name="WWNum1">
      <style:paragraph-properties fo:margin-left="0cm" fo:margin-right="0cm" fo:text-indent="0cm" style:auto-text-indent="false"/>
    </style:style>
    <style:style style:name="P15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style:text-properties fo:font-style="normal" officeooo:rsid="00038d70" officeooo:paragraph-rsid="0007650d" style:font-style-asian="normal" style:font-style-complex="normal"/>
    </style:style>
    <style:style style:name="T1" style:family="text">
      <style:text-properties fo:color="#ffffff" loext:opacity="100%" fo:font-weight="normal" style:font-weight-asian="normal" style:font-weight-complex="normal"/>
    </style:style>
    <style:style style:name="T2" style:family="text">
      <style:text-properties fo:color="#ffffff" loext:opacity="100%" fo:font-weight="normal" officeooo:rsid="0004a3c1" style:font-weight-asian="normal" style:font-weight-complex="normal"/>
    </style:style>
    <style:style style:name="T3" style:family="text">
      <style:text-properties fo:color="#ffffff" loext:opacity="100%" fo:font-weight="normal" officeooo:rsid="0007650d" style:font-weight-asian="normal" style:font-weight-complex="normal"/>
    </style:style>
    <style:style style:name="T4" style:family="text">
      <style:text-properties officeooo:rsid="0004a3c1"/>
    </style:style>
    <style:style style:name="T5" style:family="text">
      <style:text-properties fo:font-weight="bold" officeooo:rsid="0004a3c1" style:font-weight-asian="bold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a3c1" style:font-weight-asian="normal" style:font-weight-complex="normal"/>
    </style:style>
    <style:style style:name="T9" style:family="text">
      <style:text-properties fo:font-weight="normal" officeooo:rsid="0007650d" style:font-weight-asian="normal" style:font-weight-complex="normal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color="#000000" loext:opacity="100%" fo:font-weight="normal" officeooo:rsid="0004a3c1" style:font-weight-asian="normal" style:font-weight-complex="normal"/>
    </style:style>
    <style:style style:name="T12" style:family="text">
      <style:text-properties fo:color="#000000" loext:opacity="100%" fo:font-weight="normal" officeooo:rsid="0007650d" style:font-weight-asian="normal" style:font-weight-complex="normal"/>
    </style:style>
    <style:style style:name="T13" style:family="text">
      <style:text-properties officeooo:rsid="00080f33"/>
    </style:style>
    <style:style style:name="T14" style:family="text">
      <style:text-properties officeooo:rsid="000848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Dpto. Informática - I.E.S. La Marisma</text:p>
          </table:table-cell>
          <table:table-cell table:style-name="Table1.A1" office:value-type="string">
            <text:p text:style-name="P6"><text:bookmark text:name="_d315k7i4y7vh"/>C.F.G.M. Sistemas Microinformáticos y Redes</text:p>
          </table:table-cell>
        </table:table-row>
      </table:table>
      <text:p text:style-name="Title">PROPUESTA DE PROYECTO 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Nombre del proyecto:</text:p>
          </table:table-cell>
          <table:table-cell table:style-name="Table2.B1" office:value-type="string">
            <text:p text:style-name="P3">Priva<text:span text:style-name="T13">t</text:span>wolk</text:p>
          </table:table-cell>
        </table:table-row>
        <table:table-row table:style-name="Table2.1">
          <table:table-cell table:style-name="Table2.A1" office:value-type="string">
            <text:p text:style-name="P7">Alumno:</text:p>
          </table:table-cell>
          <table:table-cell table:style-name="Table2.B2" office:value-type="string">
            <text:p text:style-name="P3">Jairo Motero García</text:p>
          </table:table-cell>
        </table:table-row>
        <table:table-row table:style-name="Table2.1">
          <table:table-cell table:style-name="Table2.A1" office:value-type="string">
            <text:p text:style-name="P7">Curso:</text:p>
          </table:table-cell>
          <table:table-cell table:style-name="Table2.B2" office:value-type="string">
            <text:p text:style-name="P3">2ºSMR</text:p>
          </table:table-cell>
        </table:table-row>
        <table:table-row table:style-name="Table2.1">
          <table:table-cell table:style-name="Table2.A1" office:value-type="string">
            <text:p text:style-name="P7">Tutor:</text:p>
          </table:table-cell>
          <table:table-cell table:style-name="Table2.B2" office:value-type="string">
            <text:p text:style-name="P4">Déjese este campo en blanco.</text:p>
          </table:table-cell>
        </table:table-row>
      </table:table>
      <text:p text:style-name="P1"/>
      <text:list text:style-name="WWNum1">
        <text:list-item>
          <text:p text:style-name="P14">OBJETIVOS<text:tab/></text:p>
        </text:list-item>
      </text:list>
      <text:p text:style-name="P16"><text:span text:style-name="T11">· </text:span><text:span text:style-name="T10">Crear una </text:span><text:span text:style-name="Strong_20_Emphasis"><text:span text:style-name="T10">intranet</text:span></text:span><text:span text:style-name="T10"> con </text:span><text:span text:style-name="Strong_20_Emphasis"><text:span text:style-name="T10">Nextclo</text:span></text:span><text:span text:style-name="Strong_20_Emphasis"><text:span text:style-name="T12">ud </text:span></text:span><text:span text:style-name="T10">para que la empresa pueda guardar, compartir y trabajar con sus archivos de forma segura.</text:span></text:p>
      <text:p text:style-name="P8"><text:span text:style-name="T11">· </text:span><text:span text:style-name="T10">Mejorar la </text:span><text:span text:style-name="Strong_20_Emphasis"><text:span text:style-name="T10">organización y comunicación</text:span></text:span><text:span text:style-name="T10"> entre los empleados.</text:span></text:p>
      <text:p text:style-name="P8"><text:span text:style-name="T11">· </text:span><text:span text:style-name="T10">Tener </text:span><text:span text:style-name="Strong_20_Emphasis"><text:span text:style-name="T10">copias de seguridad automáticas</text:span></text:span><text:span text:style-name="T10"> para evitar pérdida de datos.</text:span></text:p>
      <text:p text:style-name="P8"><text:span text:style-name="T11">· </text:span><text:span text:style-name="T10">Acceder a los archivos desde cualquier lugar con </text:span><text:span text:style-name="Strong_20_Emphasis"><text:span text:style-name="T10">usuario y contraseña.</text:span></text:span></text:p>
      <text:list text:continue-numbering="true" text:style-name="WWNum1">
        <text:list-item>
          <text:p text:style-name="P14">ANÁLISIS DE LO EXISTENTE</text:p>
        </text:list-item>
      </text:list>
      <text:p text:style-name="P11"><text:span text:style-name="T4">· </text:span>Los archivos están repartidos entre los ordenadores y pendrives.</text:p>
      <text:p text:style-name="P11"><text:span text:style-name="T4">· </text:span>No hay un sistema central para guardar documentos.</text:p>
      <text:p text:style-name="P11"><text:span text:style-name="T4">· </text:span>No se hacen copias de seguridad.</text:p>
      <text:p text:style-name="P11"><text:span text:style-name="T4">· </text:span>Se pierde tiempo buscando archivos y hay riesgo de pérdida de información.</text:p>
      <text:list text:continue-numbering="true" text:style-name="WWNum1">
        <text:list-item>
          <text:p text:style-name="P14">ANÁLISIS DEL SISTEMA</text:p>
        </text:list-item>
      </text:list>
      <text:p text:style-name="P9"><text:span text:style-name="T4">· </text:span>El sistema tendrá usuarios y carpetas por departamento.</text:p>
      <text:p text:style-name="P9"><text:span text:style-name="T4">· </text:span>Cada usuario podrá subir, descargar y compartir archivos <text:span text:style-name="T14">rapido y facil</text:span>.</text:p>
      <text:p text:style-name="P9"><text:span text:style-name="T4">· </text:span>Se podrá editar documentos en línea.</text:p>
      <text:p text:style-name="P9"><text:span text:style-name="T4">· </text:span>Se harán copias de seguridad automáticas.</text:p>
      <text:p text:style-name="P9"><text:span text:style-name="T4">· </text:span>Acceso mediante HTTPS y contraseñas seguras.</text:p>
      <text:p text:style-name="P9"><text:line-break/><text:span text:style-name="T5">· Herramientas:</text:span></text:p>
      <text:p text:style-name="P12"><text:span text:style-name="T6">Backup automático → </text:span><text:a xlink:type="simple" xlink:href="https://www.borgbackup.org/" text:style-name="Internet_20_link" text:visited-style-name="Visited_20_Internet_20_Link">https://www.borgbackup.org/ </text:a></text:p>
      <text:p text:style-name="P12"><text:span text:style-name="Strong_20_Emphasis"><text:span text:style-name="T6">Nextcloud → </text:span></text:span><text:a xlink:type="simple" xlink:href="https://www.borgbackup.org/" text:style-name="Internet_20_link" text:visited-style-name="Visited_20_Internet_20_Link"><text:span text:style-name="Strong_20_Emphasis"><text:span text:style-name="T6">https://nextcloud.com/install/ </text:span></text:span></text:a></text:p>
      <text:list text:continue-numbering="true" text:style-name="WWNum1">
        <text:list-item>
          <text:p text:style-name="P14">DISEÑO DEL SISTEMA </text:p>
        </text:list-item>
      </text:list>
      <text:p text:style-name="P13"><text:span text:style-name="T6">Un </text:span><text:span text:style-name="Strong_20_Emphasis"><text:span text:style-name="T6">servidor con Ubuntu</text:span></text:span><text:span text:style-name="T6"> donde se instala Nextcloud</text:span></text:p>
      <text:p text:style-name="P10">Se crean usuarios y grupos</text:p>
      <text:p text:style-name="P10">Configuración de copias de seguridad</text:p>
      <text:p text:style-name="P2"/>
      <text:list text:continue-numbering="true" text:style-name="WWNum1">
        <text:list-item>
          <text:p text:style-name="P14"><text:soft-page-break/>ESTIMACIÓN DE COSTES</text:p>
        </text:list-item>
      </text:list>
      <text:p text:style-name="P13"><text:span text:style-name="Strong_20_Emphasis">Software:</text:span> Gratis (Nextcloud y OnlyOffice son libres)</text:p>
      <text:p text:style-name="Standard"><text:span text:style-name="Strong_20_Emphasis">Hardware:</text:span> Un ordenador o servidor con 8 GB RAM y 1 TB disco. </text:p>
      <text:p text:style-name="Standard"><text:span text:style-name="Strong_20_Emphasis">Coste aproximado:</text:span> <text:span text:style-name="T4">300</text:span>€ si ya se dispone de equip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5-11-04T08:54:45.125000000</dc:date>
    <meta:editing-duration>PT4H37M6S</meta:editing-duration>
    <meta:editing-cycles>6</meta:editing-cycles>
    <meta:document-statistic meta:table-count="2" meta:image-count="0" meta:object-count="0" meta:page-count="2" meta:paragraph-count="38" meta:word-count="234" meta:character-count="1495" meta:non-whitespace-character-count="1286"/>
    <meta:user-defined meta:name="AppVersion">15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