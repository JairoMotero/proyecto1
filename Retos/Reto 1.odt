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0BDFE4237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color="#ffffff" loext:opacity="100%" officeooo:rsid="001d1f50" officeooo:paragraph-rsid="001d1f50"/>
    </style:style>
    <style:style style:name="P2" style:family="paragraph" style:parent-style-name="Text_20_body">
      <style:text-properties fo:color="#ffffff" loext:opacity="100%" officeooo:rsid="001d1f50" officeooo:paragraph-rsid="001d1f50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color="#00a933" loext:opacity="100%" style:font-name="Arial1" fo:background-color="transparent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3">
      <style:text-properties officeooo:paragraph-rsid="001d217d"/>
    </style:style>
    <style:style style:name="P10" style:family="paragraph" style:parent-style-name="Text_20_body">
      <style:text-properties style:font-name="Arial1" fo:font-size="12pt" officeooo:rsid="001d217d" officeooo:paragraph-rsid="001d217d" style:font-size-asian="12pt" style:font-size-complex="12pt"/>
    </style:style>
    <style:style style:name="P11" style:family="paragraph" style:parent-style-name="Text_20_body">
      <style:text-properties style:font-name="Arial1" fo:font-size="12pt" style:font-size-asian="12pt" style:font-size-complex="12pt"/>
    </style:style>
    <style:style style:name="P12" style:family="paragraph" style:parent-style-name="Text_20_body">
      <style:text-properties style:font-name="Arial1" fo:font-size="12pt" officeooo:rsid="001e2b17" officeooo:paragraph-rsid="001e2b17" style:font-size-asian="12pt" style:font-size-complex="12pt"/>
    </style:style>
    <style:style style:name="T1" style:family="text">
      <style:text-properties officeooo:rsid="00174ca5"/>
    </style:style>
    <style:style style:name="T2" style:family="text">
      <style:text-properties fo:color="#158466" loext:opacity="100%" officeooo:rsid="00174ca5"/>
    </style:style>
    <style:style style:name="T3" style:family="text">
      <style:text-properties fo:color="#158466" loext:opacity="100%"/>
    </style:style>
    <style:style style:name="T4" style:family="text">
      <style:text-properties officeooo:rsid="0019a91a"/>
    </style:style>
    <style:style style:name="T5" style:family="text">
      <style:text-properties officeooo:rsid="0017fe19"/>
    </style:style>
    <style:style style:name="T6" style:family="text">
      <style:text-properties style:font-name="Arial1" fo:font-size="12pt" style:font-size-asian="12pt" style:font-size-complex="12pt"/>
    </style:style>
    <style:style style:name="T7" style:family="text">
      <style:text-properties style:font-name="Arial1" fo:font-size="12pt" officeooo:rsid="001d217d" style:font-size-asian="12pt" style:font-size-complex="12pt"/>
    </style:style>
    <style:style style:name="T8" style:family="text">
      <style:text-properties officeooo:rsid="001d217d"/>
    </style:style>
    <style:style style:name="T9" style:family="text">
      <style:text-properties officeooo:rsid="001aa761"/>
    </style:style>
    <style:style style:name="T10" style:family="text">
      <style:text-properties officeooo:rsid="001c6b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21_1613817647"/>Reto 1<text:bookmark-end text:name="__RefHeading___Toc121_1613817647"/></text:h>
      <text:p text:style-name="P2"><draw:frame draw:style-name="fr1" draw:name="Imagen1" text:anchor-type="char" svg:x="0.318cm" svg:y="1.393cm" svg:width="16.365cm" svg:height="11.583cm" draw:z-index="0"><draw:image xlink:href="Pictures/100000000000010B000000BDFE423779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Índice</text:p>
          </text:index-title>
          <text:p text:style-name="P4"><text:a xlink:type="simple" xlink:href="#__RefHeading___Toc121_1613817647" text:style-name="Index_20_Link" text:visited-style-name="Index_20_Link">Reto 1<text:tab/>1</text:a></text:p>
          <text:p text:style-name="P5"><text:a xlink:type="simple" xlink:href="#__RefHeading___Toc123_1613817647" text:style-name="Index_20_Link" text:visited-style-name="Index_20_Link">1. Información General<text:tab/>3</text:a></text:p>
          <text:p text:style-name="P6"><text:a xlink:type="simple" xlink:href="#__RefHeading___Toc125_1613817647" text:style-name="Index_20_Link" text:visited-style-name="Index_20_Link">· Nombre de la Empresa<text:tab/>3</text:a></text:p>
          <text:p text:style-name="P6"><text:a xlink:type="simple" xlink:href="#__RefHeading___Toc127_1613817647" text:style-name="Index_20_Link" text:visited-style-name="Index_20_Link">· Qué productor o servicios ofrece<text:tab/>3</text:a></text:p>
          <text:p text:style-name="P6"><text:a xlink:type="simple" xlink:href="#__RefHeading___Toc129_1613817647" text:style-name="Index_20_Link" text:visited-style-name="Index_20_Link">· Cuántas personas trabajan allí<text:tab/>3</text:a></text:p>
          <text:p text:style-name="P6"><text:a xlink:type="simple" xlink:href="#__RefHeading___Toc131_1613817647" text:style-name="Index_20_Link" text:visited-style-name="Index_20_Link">· A quién van dirigido sus productos o servicios<text:tab/>3</text:a></text:p>
          <text:p text:style-name="P5"><text:a xlink:type="simple" xlink:href="#__RefHeading___Toc133_1613817647" text:style-name="Index_20_Link" text:visited-style-name="Index_20_Link">2. Organización Interna<text:tab/>3</text:a></text:p>
          <text:p text:style-name="P6"><text:a xlink:type="simple" xlink:href="#__RefHeading___Toc135_1613817647" text:style-name="Index_20_Link" text:visited-style-name="Index_20_Link">· ¿Cuántos departamentos tiene?<text:tab/>3</text:a></text:p>
          <text:p text:style-name="P6"><text:a xlink:type="simple" xlink:href="#__RefHeading___Toc137_1613817647" text:style-name="Index_20_Link" text:visited-style-name="Index_20_Link">· ¿Qué hace cada departamento?<text:tab/>3</text:a></text:p>
          <text:p text:style-name="P6"><text:a xlink:type="simple" xlink:href="#__RefHeading___Toc139_1613817647" text:style-name="Index_20_Link" text:visited-style-name="Index_20_Link">· ¿Quién toma las decisiones?<text:tab/>3</text:a></text:p>
          <text:p text:style-name="P5"><text:a xlink:type="simple" xlink:href="#__RefHeading___Toc141_1613817647" text:style-name="Index_20_Link" text:visited-style-name="Index_20_Link">3. Trabajo de las personas<text:tab/>3</text:a></text:p>
          <text:p text:style-name="P6"><text:a xlink:type="simple" xlink:href="#__RefHeading___Toc143_1613817647" text:style-name="Index_20_Link" text:visited-style-name="Index_20_Link">· ¿Qué tareas hacen los empleados cada día?<text:tab/>3</text:a></text:p>
          <text:p text:style-name="P6"><text:a xlink:type="simple" xlink:href="#__RefHeading___Toc145_1613817647" text:style-name="Index_20_Link" text:visited-style-name="Index_20_Link">· ¿Cómo se comunican entre ellos?<text:tab/>3</text:a></text:p>
          <text:p text:style-name="P6"><text:a xlink:type="simple" xlink:href="#__RefHeading___Toc147_1613817647" text:style-name="Index_20_Link" text:visited-style-name="Index_20_Link">· ¿Qué herramientas o programas usan?<text:tab/>3</text:a></text:p>
          <text:p text:style-name="P5"><text:a xlink:type="simple" xlink:href="#__RefHeading___Toc149_1613817647" text:style-name="Index_20_Link" text:visited-style-name="Index_20_Link">4. Mejora y Sostenibilidad<text:tab/>3</text:a></text:p>
          <text:p text:style-name="P6"><text:a xlink:type="simple" xlink:href="#__RefHeading___Toc151_1613817647" text:style-name="Index_20_Link" text:visited-style-name="Index_20_Link">· ¿La empresa hace algo por el medio ambiente?<text:tab/>3</text:a></text:p>
          <text:p text:style-name="P6"><text:a xlink:type="simple" xlink:href="#__RefHeading___Toc153_1613817647" text:style-name="Index_20_Link" text:visited-style-name="Index_20_Link">· ¿Qué cosas podrían mejorar?<text:tab/>3</text:a></text:p>
        </text:index-body>
      </text:table-of-content>
      <text:p text:style-name="P7"/>
      <text:h text:style-name="P8" text:outline-level="2"><text:bookmark-start text:name="__RefHeading___Toc123_1613817647"/><text:span text:style-name="T1">1. </text:span>Información General<text:bookmark-end text:name="__RefHeading___Toc123_1613817647"/></text:h>
      <text:h text:style-name="P9" text:outline-level="3"><text:bookmark-start text:name="__RefHeading___Toc125_1613817647"/><text:span text:style-name="T2">· </text:span><text:span text:style-name="T3">Nombre de la Empresa</text:span><text:bookmark-end text:name="__RefHeading___Toc125_1613817647"/></text:h>
      <text:p text:style-name="P10">La empresa se llama Infosur.</text:p>
      <text:h text:style-name="P9" text:outline-level="3"><text:bookmark-start text:name="__RefHeading___Toc127_1613817647"/><text:span text:style-name="T2">· </text:span><text:span text:style-name="T3">Qué productor o servicios ofrece</text:span><text:bookmark-end text:name="__RefHeading___Toc127_1613817647"/></text:h>
      <text:p text:style-name="P11"><text:span text:style-name="T4">Venta y reparaciones de</text:span><text:span text:style-name="T5"> electrodomésticos.</text:span></text:p>
      <text:h text:style-name="P9" text:outline-level="3"><text:bookmark-start text:name="__RefHeading___Toc129_1613817647"/><text:span text:style-name="T2">· </text:span><text:span text:style-name="T3">Cuántas personas trabajan allí</text:span><text:bookmark-end text:name="__RefHeading___Toc129_1613817647"/></text:h>
      <text:p text:style-name="P10">Solo trabaja una persona que seria el propietario de la empresa.</text:p>
      <text:h text:style-name="P9" text:outline-level="3"><text:bookmark-start text:name="__RefHeading___Toc131_1613817647"/><text:span text:style-name="T2">· </text:span><text:span text:style-name="T3">A quién van dirigido sus productos o servicios</text:span><text:bookmark-end text:name="__RefHeading___Toc131_1613817647"/></text:h>
      <text:p text:style-name="Text_20_body"><text:span text:style-name="T6">A los clientes y gente de la calle.</text:span><text:line-break/></text:p>
      <text:h text:style-name="Heading_20_2" text:outline-level="2"><text:bookmark-start text:name="__RefHeading___Toc133_1613817647"/><text:span text:style-name="T1">2. </text:span>Organización Interna<text:bookmark-end text:name="__RefHeading___Toc133_1613817647"/></text:h>
      <text:h text:style-name="P9" text:outline-level="3"><text:bookmark-start text:name="__RefHeading___Toc135_1613817647"/><text:span text:style-name="T2">· </text:span><text:span text:style-name="T3">¿Cuántos departamentos tiene?</text:span><text:bookmark-end text:name="__RefHeading___Toc135_1613817647"/></text:h>
      <text:p text:style-name="P10">Solo tiene la tienda que se ubica en Huelva.</text:p>
      <text:h text:style-name="P9" text:outline-level="3"><text:bookmark-start text:name="__RefHeading___Toc137_1613817647"/><text:span text:style-name="T2">· </text:span><text:span text:style-name="T3">¿Qué hace cada departamento?</text:span><text:bookmark-end text:name="__RefHeading___Toc137_1613817647"/></text:h>
      <text:p text:style-name="P11">Solo tiene uno y lo que hace es arreglar dispositivos electrónicos.</text:p>
      <text:h text:style-name="P9" text:outline-level="3"><text:bookmark-start text:name="__RefHeading___Toc139_1613817647"/><text:span text:style-name="T2">· </text:span><text:span text:style-name="T3">¿Quién toma las decisiones?</text:span><text:bookmark-end text:name="__RefHeading___Toc139_1613817647"/></text:h>
      <text:p text:style-name="Text_20_body"><text:span text:style-name="T7">El jefe que seria la única persona en que trabaja en la tienda.</text:span><text:line-break/></text:p>
      <text:h text:style-name="Heading_20_2" text:outline-level="2"><text:bookmark-start text:name="__RefHeading___Toc141_1613817647"/><text:span text:style-name="T1">3. </text:span>Trabajo de las personas<text:bookmark-end text:name="__RefHeading___Toc141_1613817647"/></text:h>
      <text:h text:style-name="P9" text:outline-level="3"><text:bookmark-start text:name="__RefHeading___Toc143_1613817647"/><text:span text:style-name="T2">· </text:span><text:span text:style-name="T3">¿Qué tareas hacen los empleados cada día?</text:span><text:bookmark-end text:name="__RefHeading___Toc143_1613817647"/></text:h>
      <text:p text:style-name="P11">Arregla <text:span text:style-name="T8">electrodomésticos que le traen los clientes.</text:span></text:p>
      <text:h text:style-name="P9" text:outline-level="3"><text:bookmark-start text:name="__RefHeading___Toc145_1613817647"/><text:span text:style-name="T2">· </text:span><text:span text:style-name="T3">¿Cómo se comunican entre ellos?</text:span><text:bookmark-end text:name="__RefHeading___Toc145_1613817647"/></text:h>
      <text:p text:style-name="P10">Se comunican hablando ya que la tienda no es muy grande.</text:p>
      <text:h text:style-name="P9" text:outline-level="3"><text:bookmark-start text:name="__RefHeading___Toc147_1613817647"/><text:span text:style-name="T2">· </text:span><text:span text:style-name="T3">¿Qué herramientas o programas usan?</text:span><text:bookmark-end text:name="__RefHeading___Toc147_1613817647"/></text:h>
      <text:p text:style-name="P11">Herramientas: Un microscopio para las placas, destornilladores, aire <text:span text:style-name="T8">comprimido</text:span>, etc.</text:p>
      <text:p text:style-name="Text_20_body"><text:span text:style-name="T6">Programas: Usa una aplicación para mirar si los mandos de pley están bien, Google calendar para apuntar los trabajos, etc...</text:span><text:line-break/></text:p>
      <text:h text:style-name="Heading_20_2" text:outline-level="2"><text:bookmark-start text:name="__RefHeading___Toc149_1613817647"/><text:span text:style-name="T1">4. </text:span>Mejora y Sostenibilidad<text:bookmark-end text:name="__RefHeading___Toc149_1613817647"/></text:h>
      <text:h text:style-name="P9" text:outline-level="3"><text:bookmark-start text:name="__RefHeading___Toc151_1613817647"/><text:span text:style-name="T2">· </text:span><text:span text:style-name="T3">¿La empresa hace algo por el medio ambiente?</text:span><text:bookmark-end text:name="__RefHeading___Toc151_1613817647"/></text:h>
      <text:p text:style-name="P11"><text:span text:style-name="T5">Si, </text:span><text:span text:style-name="T9">lleva materiales electrodomésticos a un punto </text:span><text:span text:style-name="T10">de entrega.</text:span></text:p>
      <text:h text:style-name="Heading_20_3" text:outline-level="3"><text:bookmark-start text:name="__RefHeading___Toc153_1613817647"/><text:span text:style-name="T2">· </text:span><text:span text:style-name="T3">¿Qué cosas podrían mejorar?</text:span><text:bookmark-end text:name="__RefHeading___Toc153_1613817647"/></text:h>
      <text:p text:style-name="P12">Se podría mejorar la teleasistencia o la pagina web ya que no usa la pagina web y no tiene nada, ni catalogo ni na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align="center" style:justify-single-word="false" style:page-number="auto"/>
      <style:text-properties fo:color="#ffffff" loext:opacity="100%" style:font-name="Arial1" fo:font-family="Arial" style:font-family-generic="swiss" style:font-pitch="variable" fo:font-size="20pt" fo:font-weight="bold" fo:background-color="transparent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style:page-number="auto"/>
      <style:text-properties style:font-name="Arial3" fo:font-family="Arial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style:page-number="auto">
        <style:tab-stops/>
      </style:paragraph-properties>
      <style:text-properties style:font-name="Arial3" fo:font-family="Arial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1" fo:font-weight="bold" officeooo:rsid="001d1f50" officeooo:paragraph-rsid="001d1f5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airo Motero García<text:tab/>2ºSMR<text:tab/>Proyecto Intermodular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08:18:38.200000000</meta:creation-date>
    <dc:date>2025-09-29T17:25:04.539152900</dc:date>
    <meta:editing-duration>PT41M47S</meta:editing-duration>
    <meta:editing-cycles>10</meta:editing-cycles>
    <meta:generator>LibreOffice/25.2.5.2$Windows_X86_64 LibreOffice_project/03d19516eb2e1dd5d4ccd751a0d6f35f35e08022</meta:generator>
    <meta:document-statistic meta:table-count="0" meta:image-count="1" meta:object-count="0" meta:page-count="3" meta:paragraph-count="49" meta:word-count="347" meta:character-count="1962" meta:non-whitespace-character-count="1661"/>
  </office:meta>
</office:document-meta>
</file>