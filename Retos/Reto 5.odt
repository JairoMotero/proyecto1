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F88788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  <style:text-properties officeooo:paragraph-rsid="00139cd9"/>
    </style:style>
    <style:style style:name="P5" style:family="paragraph" style:parent-style-name="Text_20_body">
      <style:text-properties officeooo:paragraph-rsid="00139cd9"/>
    </style:style>
    <style:style style:name="P6" style:family="paragraph" style:parent-style-name="Text_20_body">
      <style:text-properties style:font-name="Arial" fo:font-size="12pt" officeooo:paragraph-rsid="00139cd9" style:font-size-asian="12pt" style:font-size-complex="12pt"/>
    </style:style>
    <style:style style:name="P7" style:family="paragraph" style:parent-style-name="Heading_20_2">
      <style:paragraph-properties fo:break-before="page"/>
      <style:text-properties officeooo:paragraph-rsid="00152047"/>
    </style:style>
    <style:style style:name="P8" style:family="paragraph" style:parent-style-name="Text_20_body">
      <style:text-properties fo:font-weight="bold" officeooo:paragraph-rsid="00152047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152047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paragraph-properties fo:text-align="center" style:justify-single-word="false"/>
    </style:style>
    <style:style style:name="T1" style:family="text">
      <style:text-properties fo:font-size="14pt" fo:font-weight="bold" officeooo:rsid="00174ca5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158466" loext:opacity="100%" officeooo:rsid="00174ca5"/>
    </style:style>
    <style:style style:name="T4" style:family="text">
      <style:text-properties fo:color="#158466" loext:opacity="100%"/>
    </style:style>
    <style:style style:name="T5" style:family="text">
      <style:text-properties officeooo:rsid="0019a91a"/>
    </style:style>
    <style:style style:name="T6" style:family="text">
      <style:text-properties officeooo:rsid="0017fe19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1d217d" style:font-size-asian="12pt" style:font-size-complex="12pt"/>
    </style:style>
    <style:style style:name="T9" style:family="text">
      <style:text-properties officeooo:rsid="001d217d"/>
    </style:style>
    <style:style style:name="T10" style:family="text">
      <style:text-properties officeooo:rsid="001aa761"/>
    </style:style>
    <style:style style:name="T11" style:family="text">
      <style:text-properties officeooo:rsid="001c6bdc"/>
    </style:style>
    <style:style style:name="T12" style:family="text">
      <style:text-properties officeooo:rsid="00152047"/>
    </style:style>
    <style:style style:name="T13" style:family="text">
      <style:text-properties fo:font-weight="bold" officeooo:rsid="00152047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_1321053146"/>Proyecto Intermodular : Reto 5 <draw:frame draw:style-name="fr1" draw:name="Imagen1" text:anchor-type="char" svg:y="3.498cm" svg:width="13.993cm" svg:height="20.99cm" draw:z-index="0"><draw:image xlink:href="Pictures/100000000000040000000600F88788D1.png" xlink:type="simple" xlink:show="embed" xlink:actuate="onLoad" draw:mime-type="image/png"/></draw:frame><text:bookmark-end text:name="__RefHeading___Toc1_1321053146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">Indice</text:p>
          </text:index-title>
          <text:p text:style-name="P2"><text:a xlink:type="simple" xlink:href="#__RefHeading___Toc1_1321053146" text:style-name="Index_20_Link" text:visited-style-name="Index_20_Link">Proyecto Intermodular : Reto 5<text:tab/>1</text:a></text:p>
          <text:p text:style-name="P3"><text:a xlink:type="simple" xlink:href="#__RefHeading___Toc3_1321053146" text:style-name="Index_20_Link" text:visited-style-name="Index_20_Link">Reto 1<text:tab/>3</text:a></text:p>
          <text:p text:style-name="P3"><text:a xlink:type="simple" xlink:href="#__RefHeading___Toc5_1321053146" text:style-name="Index_20_Link" text:visited-style-name="Index_20_Link">Reto 2<text:tab/>4</text:a></text:p>
          <text:p text:style-name="P3"><text:a xlink:type="simple" xlink:href="#__RefHeading___Toc7_1321053146" text:style-name="Index_20_Link" text:visited-style-name="Index_20_Link">Reto 3<text:tab/>5</text:a></text:p>
          <text:p text:style-name="P3"><text:a xlink:type="simple" xlink:href="#__RefHeading___Toc9_1321053146" text:style-name="Index_20_Link" text:visited-style-name="Index_20_Link">Reto 4<text:tab/>6</text:a></text:p>
        </text:index-body>
      </text:table-of-content>
      <text:p text:style-name="Text_20_body"/>
      <text:h text:style-name="P4" text:outline-level="2">Reto 1</text:h>
      <text:p text:style-name="P5"><text:span text:style-name="T1">1. </text:span><text:span text:style-name="T2">Información General</text:span></text:p>
      <text:p text:style-name="P5"><text:span text:style-name="T3">· </text:span><text:span text:style-name="T4">Nombre de la Empresa<text:line-break/></text:span>La empresa se llama Infosur.</text:p>
      <text:p text:style-name="Text_20_body"><text:span text:style-name="T3">· </text:span><text:span text:style-name="T4">Qué productor o servicios ofrece<text:line-break/></text:span><text:span text:style-name="T5">Venta y reparaciones de</text:span><text:span text:style-name="T6"> electrodomésticos.</text:span></text:p>
      <text:p text:style-name="Text_20_body"><text:span text:style-name="T3">· </text:span><text:span text:style-name="T4">Cuántas personas trabajan allí<text:line-break/></text:span>Solo trabaja una persona que seria el propietario de la empresa.</text:p>
      <text:p text:style-name="P5"><text:span text:style-name="T3">· </text:span><text:span text:style-name="T4">A quién van dirigido sus productos o servicios<text:line-break/></text:span><text:span text:style-name="T7">A los clientes y gente de la calle.</text:span></text:p>
      <text:p text:style-name="P5"><text:span text:style-name="T1">2. </text:span><text:span text:style-name="T2">Organización Interna</text:span></text:p>
      <text:p text:style-name="Text_20_body"><text:span text:style-name="T3">· </text:span><text:span text:style-name="T4">¿Cuántos departamentos tiene?<text:line-break/></text:span>Solo tiene la tienda que se ubica en Huelva.</text:p>
      <text:p text:style-name="Text_20_body"><text:span text:style-name="T3">· </text:span><text:span text:style-name="T4">¿Qué hace cada departamento?<text:line-break/></text:span>Solo tiene uno y lo que hace es arreglar dispositivos electrónicos.</text:p>
      <text:p text:style-name="P5"><text:span text:style-name="T3">· </text:span><text:span text:style-name="T4">¿Quién toma las decisiones?<text:line-break/></text:span><text:span text:style-name="T8">El jefe que seria la única persona en que trabaja en la tienda.</text:span></text:p>
      <text:p text:style-name="P5"><text:span text:style-name="T1">3. </text:span><text:span text:style-name="T2">Trabajo de las personas</text:span></text:p>
      <text:p text:style-name="Text_20_body"><text:span text:style-name="T3">· </text:span><text:span text:style-name="T4">¿Qué tareas hacen los empleados cada día?<text:line-break/></text:span>Arregla <text:span text:style-name="T9">electrodomésticos que le traen los clientes.</text:span></text:p>
      <text:p text:style-name="Text_20_body"><text:span text:style-name="T3">· </text:span><text:span text:style-name="T4">¿Cómo se comunican entre ellos?<text:line-break/></text:span>Se comunican hablando ya que la tienda no es muy grande.</text:p>
      <text:p text:style-name="Text_20_body"><text:span text:style-name="T3">· </text:span><text:span text:style-name="T4">¿Qué herramientas o programas usan?<text:line-break/></text:span>Herramientas: Un microscopio para las placas, destornilladores, aire <text:span text:style-name="T9">comprimido</text:span>, etc.</text:p>
      <text:p text:style-name="P6">Programas: Usa una aplicación para mirar si los mandos de pley están bien, Google calendar para apuntar los trabajos, etc.</text:p>
      <text:p text:style-name="P5"><text:span text:style-name="T1">4. </text:span><text:span text:style-name="T2">Mejora y Sostenibilidad</text:span></text:p>
      <text:p text:style-name="Text_20_body"><text:span text:style-name="T3">· </text:span><text:span text:style-name="T4">¿La empresa hace algo por el medio ambiente?<text:line-break/></text:span><text:span text:style-name="T6">Si, </text:span><text:span text:style-name="T10">lleva materiales electrodomésticos a un punto </text:span><text:span text:style-name="T11">de entrega.</text:span></text:p>
      <text:p text:style-name="Text_20_body"><text:span text:style-name="T3">· </text:span><text:span text:style-name="T4">¿Qué cosas podrían mejorar?<text:line-break/></text:span>Se podría mejorar la teleasistencia o la pagina web ya que no usa la pagina web y no tiene nada, ni catalogo ni nada.</text:p>
      <text:h text:style-name="P7" text:outline-level="2"><text:bookmark-start text:name="__RefHeading___Toc5_1321053146"/>Reto 2<text:bookmark-end text:name="__RefHeading___Toc5_1321053146"/></text:h>
      <text:p text:style-name="P8"><text:span text:style-name="T12">· </text:span>OBJETIVOS</text:p>
      <text:p text:style-name="Text_20_body">- Crear una intranet con Nextcloud para que la empresa pueda guardar, compartir y trabajar con sus archivos de forma segura.</text:p>
      <text:p text:style-name="Text_20_body">- Mejorar la organización y comunicación entre los empleados.</text:p>
      <text:p text:style-name="Text_20_body">- Tener copias de seguridad automáticas para evitar pérdida de datos.</text:p>
      <text:p text:style-name="Text_20_body">- Acceder a los archivos desde cualquier lugar con usuario y contraseña.</text:p>
      <text:p text:style-name="P9"/>
      <text:p text:style-name="P9"><text:span text:style-name="T12">· </text:span>ANÁLISIS DE LO EXISTENTE</text:p>
      <text:p text:style-name="Text_20_body">- Los archivos están repartidos entre los ordenadores y pendrives.</text:p>
      <text:p text:style-name="Text_20_body">- No hay un sistema central para guardar documentos.</text:p>
      <text:p text:style-name="Text_20_body">- No se hacen copias de seguridad.</text:p>
      <text:p text:style-name="Text_20_body">- Se pierde tiempo buscando archivos y hay riesgo de pérdida de información.</text:p>
      <text:p text:style-name="P9"/>
      <text:p text:style-name="P9"><text:span text:style-name="T12">· </text:span>ANÁLISIS DEL SISTEMA</text:p>
      <text:p text:style-name="Text_20_body">- El sistema tendrá usuarios y carpetas por departamento.</text:p>
      <text:p text:style-name="Text_20_body">- Cada usuario podrá subir, descargar y compartir archivos rapido y facil.</text:p>
      <text:p text:style-name="Text_20_body">- Se podrá editar documentos en línea.</text:p>
      <text:p text:style-name="Text_20_body">- Se harán copias de seguridad automáticas.</text:p>
      <text:p text:style-name="P10">- Acceso mediante HTTPS y contraseñas seguras.</text:p>
      <text:p text:style-name="P10"><text:span text:style-name="T13">·</text:span><text:span text:style-name="T14"> Herramientas:</text:span></text:p>
      <text:p text:style-name="Text_20_body">- Backup automático → <text:a xlink:type="simple" xlink:href="https://www.borgbackup.org/" text:style-name="Internet_20_link" text:visited-style-name="Visited_20_Internet_20_Link">https://www.borgbackup.org/ </text:a></text:p>
      <text:p text:style-name="P10">- Nextcloud → <text:a xlink:type="simple" xlink:href="https://nextcloud.com/install/" text:style-name="Internet_20_link" text:visited-style-name="Visited_20_Internet_20_Link">https://nextcloud.com/install/</text:a></text:p>
      <text:p text:style-name="P8"/>
      <text:p text:style-name="P8"><text:span text:style-name="T12">· </text:span>DISEÑO DEL SISTEMA </text:p>
      <text:p text:style-name="Text_20_body">- Un servidor con Ubuntu donde se instala Nextcloud</text:p>
      <text:p text:style-name="Text_20_body">- Se crean usuarios y grupos</text:p>
      <text:p text:style-name="Text_20_body">- Configuración de copias de seguridad</text:p>
      <text:h text:style-name="P11" text:outline-level="2"><text:bookmark-start text:name="__RefHeading___Toc7_1321053146"/>Reto 3<text:bookmark-end text:name="__RefHeading___Toc7_1321053146"/></text:h>
      <text:p text:style-name="P12"><text:a xlink:type="simple" xlink:href="https://github.com/JairoMotero/proyecto1.git" text:style-name="Internet_20_link" text:visited-style-name="Visited_20_Internet_20_Link"><text:span text:style-name="T15">https://github.com/JairoMotero/proyecto1.git</text:span></text:a></text:p>
      <text:h text:style-name="P11" text:outline-level="2"><text:bookmark-start text:name="__RefHeading___Toc9_1321053146"/>Reto 4<text:bookmark-end text:name="__RefHeading___Toc9_132105314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2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Arial1" fo:font-family="Arial" style:font-style-name="Negrita" style:font-family-generic="swiss" style:font-pitch="variable" fo:font-size="3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style:font-name="Arial1" fo:font-family="Arial" style:font-style-name="Negrita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style:page-number="auto">
        <style:tab-stops/>
      </style:paragraph-properties>
      <style:text-properties style:font-name="Arial1" fo:font-family="Arial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ea17" officeooo:paragraph-rsid="0012ea17"/>
    </style:style>
    <style:page-layout style:name="Mpm1">
      <style:page-layout-properties fo:page-width="21.001cm" fo:page-height="30cm" style:num-format="1" style:print-orientation="portrait" fo:margin-top="2cm" fo:margin-bottom="2cm" fo:margin-left="2cm" fo:margin-right="2cm" fo:background-color="#ffffff" style:writing-mode="lr-tb" draw:fill="solid" draw:fill-color="#ffff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MP1">Jairo Motero García<text:tab/>2ºSMR<text:tab/>Proyecto Intermodula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2:15:21.304834500</meta:creation-date>
    <dc:date>2025-11-30T12:40:51.680558500</dc:date>
    <meta:editing-duration>PT25M30S</meta:editing-duration>
    <meta:editing-cycles>4</meta:editing-cycles>
    <meta:generator>LibreOffice/25.2.7.2$Windows_X86_64 LibreOffice_project/5cbfd1ab6520636bb5f7b99185aa69bd7456825d</meta:generator>
    <meta:document-statistic meta:table-count="0" meta:image-count="1" meta:object-count="0" meta:page-count="6" meta:paragraph-count="53" meta:word-count="451" meta:character-count="2693" meta:non-whitespace-character-count="2292"/>
  </office:meta>
</office:document-meta>
</file>